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bbbebf" loext:opacity="100%" style:font-name="Droid Sans Mono" fo:font-size="10.5pt" fo:font-weight="normal" fo:background-color="#121314"/>
    </style:style>
    <style:style style:name="P2" style:family="paragraph" style:parent-style-name="Text_20_body">
      <style:text-properties fo:color="#bbbebf" loext:opacity="100%" style:font-name="Droid Sans Mono" fo:font-size="10.5pt" fo:font-weight="normal" officeooo:rsid="00081a4e" fo:background-color="#121314"/>
    </style:style>
    <style:style style:name="P3" style:family="paragraph" style:parent-style-name="Standard">
      <style:text-properties fo:color="#bbbebf" loext:opacity="100%" style:font-name="Droid Sans Mono" fo:font-size="10.5pt" fo:font-weight="normal" officeooo:rsid="000b4291" officeooo:paragraph-rsid="000b4291" fo:background-color="#121314"/>
    </style:style>
    <style:style style:name="P4" style:family="paragraph" style:parent-style-name="Standard">
      <style:text-properties fo:color="#bbbebf" loext:opacity="100%" style:font-name="Droid Sans Mono" fo:font-size="10.5pt" fo:font-weight="normal" officeooo:paragraph-rsid="000f3e48" fo:background-color="#121314"/>
    </style:style>
    <style:style style:name="P5" style:family="paragraph" style:parent-style-name="Standard">
      <style:text-properties fo:color="#bbbebf" loext:opacity="100%" style:font-name="Droid Sans Mono" fo:font-size="10.5pt" fo:font-weight="normal" officeooo:rsid="0012c6da" officeooo:paragraph-rsid="0012c6da" fo:background-color="#121314"/>
    </style:style>
    <style:style style:name="P6" style:family="paragraph" style:parent-style-name="Standard">
      <style:text-properties fo:color="#bbbebf" loext:opacity="100%" style:font-name="Droid Sans Mono" fo:font-size="10.5pt" fo:font-weight="normal" officeooo:paragraph-rsid="00149ca8" fo:background-color="#121314"/>
    </style:style>
    <style:style style:name="P7" style:family="paragraph" style:parent-style-name="Standard">
      <style:text-properties fo:color="#bbbebf" loext:opacity="100%" style:font-name="Droid Sans Mono" fo:font-size="10.5pt" fo:font-weight="normal" officeooo:rsid="001bbfe1" officeooo:paragraph-rsid="001bbfe1" fo:background-color="#121314"/>
    </style:style>
    <style:style style:name="P8" style:family="paragraph" style:parent-style-name="Standard">
      <style:text-properties officeooo:paragraph-rsid="00081a4e"/>
    </style:style>
    <style:style style:name="P9" style:family="paragraph" style:parent-style-name="Text_20_body">
      <style:text-properties officeooo:paragraph-rsid="00081a4e"/>
    </style:style>
    <style:style style:name="P10" style:family="paragraph" style:parent-style-name="Text_20_body">
      <style:text-properties officeooo:rsid="00081a4e" officeooo:paragraph-rsid="00081a4e"/>
    </style:style>
    <style:style style:name="P11" style:family="paragraph" style:parent-style-name="Standard">
      <style:text-properties officeooo:rsid="00081a4e" officeooo:paragraph-rsid="00081a4e"/>
    </style:style>
    <style:style style:name="P12" style:family="paragraph" style:parent-style-name="Standard">
      <style:text-properties officeooo:rsid="00083310" officeooo:paragraph-rsid="00083310"/>
    </style:style>
    <style:style style:name="P13" style:family="paragraph" style:parent-style-name="Standard">
      <style:text-properties officeooo:rsid="000b4291" officeooo:paragraph-rsid="000b4291"/>
    </style:style>
    <style:style style:name="P14" style:family="paragraph" style:parent-style-name="Standard">
      <style:text-properties officeooo:rsid="000bde0e" officeooo:paragraph-rsid="000bde0e"/>
    </style:style>
    <style:style style:name="P15" style:family="paragraph" style:parent-style-name="Standard">
      <style:paragraph-properties style:line-height-at-least="0.198in"/>
      <style:text-properties officeooo:rsid="000bde0e"/>
    </style:style>
    <style:style style:name="P16" style:family="paragraph" style:parent-style-name="Standard">
      <style:text-properties officeooo:rsid="000c7b4a" officeooo:paragraph-rsid="000c7b4a"/>
    </style:style>
    <style:style style:name="P17" style:family="paragraph" style:parent-style-name="Standard">
      <style:paragraph-properties fo:break-before="page"/>
      <style:text-properties officeooo:rsid="000c7b4a" officeooo:paragraph-rsid="000c7b4a"/>
    </style:style>
    <style:style style:name="P18" style:family="paragraph" style:parent-style-name="Standard">
      <style:text-properties officeooo:rsid="000f3e48" officeooo:paragraph-rsid="000f3e48"/>
    </style:style>
    <style:style style:name="P19" style:family="paragraph" style:parent-style-name="Text_20_body">
      <style:text-properties officeooo:paragraph-rsid="000f3e48"/>
    </style:style>
    <style:style style:name="P20" style:family="paragraph" style:parent-style-name="Standard">
      <style:text-properties officeooo:rsid="000fdc87" officeooo:paragraph-rsid="000fdc87"/>
    </style:style>
    <style:style style:name="P21" style:family="paragraph" style:parent-style-name="Standard">
      <style:text-properties officeooo:rsid="0012c6da" officeooo:paragraph-rsid="0012c6da"/>
    </style:style>
    <style:style style:name="P22" style:family="paragraph" style:parent-style-name="Standard">
      <style:text-properties officeooo:rsid="00149ca8" officeooo:paragraph-rsid="00149ca8"/>
    </style:style>
    <style:style style:name="P23" style:family="paragraph" style:parent-style-name="Standard">
      <style:paragraph-properties style:line-height-at-least="0.198in"/>
      <style:text-properties officeooo:rsid="00149ca8" officeooo:paragraph-rsid="001bbfe1"/>
    </style:style>
    <style:style style:name="P24" style:family="paragraph" style:parent-style-name="Standard">
      <style:paragraph-properties style:line-height-at-least="0.198in"/>
      <style:text-properties officeooo:rsid="001a3293" officeooo:paragraph-rsid="001a3293"/>
    </style:style>
    <style:style style:name="P25" style:family="paragraph" style:parent-style-name="Standard">
      <style:paragraph-properties style:line-height-at-least="0.198in"/>
      <style:text-properties officeooo:rsid="001bbfe1" officeooo:paragraph-rsid="001bbfe1"/>
    </style:style>
    <style:style style:name="P26" style:family="paragraph" style:parent-style-name="Standard">
      <style:text-properties officeooo:rsid="001bbfe1" officeooo:paragraph-rsid="001bbfe1"/>
    </style:style>
    <style:style style:name="P27" style:family="paragraph" style:parent-style-name="Standard">
      <style:text-properties officeooo:rsid="001efd03" officeooo:paragraph-rsid="001efd03"/>
    </style:style>
    <style:style style:name="P28" style:family="paragraph" style:parent-style-name="Standard">
      <style:text-properties officeooo:rsid="001efd03" officeooo:paragraph-rsid="001efd03"/>
    </style:style>
    <style:style style:name="P29" style:family="paragraph" style:parent-style-name="Standard">
      <style:text-properties officeooo:rsid="0024d00d" officeooo:paragraph-rsid="0024d00d"/>
    </style:style>
    <style:style style:name="P30" style:family="paragraph" style:parent-style-name="Standard">
      <style:text-properties officeooo:rsid="002588a5" officeooo:paragraph-rsid="002588a5"/>
    </style:style>
    <style:style style:name="T1" style:family="text">
      <style:text-properties fo:color="#c9d1d9" loext:opacity="100%"/>
    </style:style>
    <style:style style:name="T2" style:family="text">
      <style:text-properties fo:color="#bbbebf" loext:opacity="100%" style:font-name="Droid Sans Mono" fo:font-size="10.5pt" fo:font-weight="normal" fo:background-color="#121314" loext:char-shading-value="0"/>
    </style:style>
    <style:style style:name="T3" style:family="text">
      <style:text-properties fo:color="#a5d6ff" loext:opacity="100%"/>
    </style:style>
    <style:style style:name="T4" style:family="text">
      <style:text-properties fo:color="#d4d4d4" loext:opacity="100%"/>
    </style:style>
    <style:style style:name="T5" style:family="text">
      <style:text-properties fo:color="#d4d4d4" loext:opacity="100%" style:font-name="Droid Sans Mono" fo:font-size="10.5pt" fo:font-weight="normal" fo:background-color="#121314" loext:char-shading-value="0"/>
    </style:style>
    <style:style style:name="T6" style:family="text">
      <style:text-properties fo:color="#ffa657" loext:opacity="100%"/>
    </style:style>
    <style:style style:name="T7" style:family="text">
      <style:text-properties fo:color="#d2a8ff" loext:opacity="100%"/>
    </style:style>
    <style:style style:name="T8" style:family="text">
      <style:text-properties fo:color="#b5cea8" loext:opacity="100%"/>
    </style:style>
    <style:style style:name="T9" style:family="text">
      <style:text-properties fo:color="#b5cea8" loext:opacity="100%" style:font-name="Droid Sans Mono" fo:font-size="10.5pt" fo:font-weight="normal" fo:background-color="#121314" loext:char-shading-value="0"/>
    </style:style>
    <style:style style:name="T10" style:family="text">
      <style:text-properties fo:color="#569cd6" loext:opacity="100%"/>
    </style:style>
    <style:style style:name="T11" style:family="text">
      <style:text-properties officeooo:rsid="00081a4e"/>
    </style:style>
    <style:style style:name="T12" style:family="text">
      <style:text-properties fo:color="#79c0ff" loext:opacity="100%"/>
    </style:style>
    <style:style style:name="T13" style:family="text">
      <style:text-properties fo:color="#79c0ff" loext:opacity="100%" style:font-name="Droid Sans Mono" fo:font-size="10.5pt" fo:font-weight="normal" fo:background-color="#121314" loext:char-shading-value="0"/>
    </style:style>
    <style:style style:name="T14" style:family="text">
      <style:text-properties officeooo:rsid="00083310"/>
    </style:style>
    <style:style style:name="T15" style:family="text">
      <style:text-properties officeooo:rsid="000b4291"/>
    </style:style>
    <style:style style:name="T16" style:family="text">
      <style:text-properties fo:color="#4ec9b0" loext:opacity="100%"/>
    </style:style>
    <style:style style:name="T17" style:family="text">
      <style:text-properties officeooo:rsid="000c7b4a"/>
    </style:style>
    <style:style style:name="T18" style:family="text">
      <style:text-properties officeooo:rsid="000f3e48"/>
    </style:style>
    <style:style style:name="T19" style:family="text">
      <style:text-properties fo:color="#ff7b72" loext:opacity="100%"/>
    </style:style>
    <style:style style:name="T20" style:family="text">
      <style:text-properties fo:color="#c586c0" loext:opacity="100%"/>
    </style:style>
    <style:style style:name="T21" style:family="text">
      <style:text-properties officeooo:rsid="00101fc5"/>
    </style:style>
    <style:style style:name="T22" style:family="text">
      <style:text-properties officeooo:rsid="0012c6da"/>
    </style:style>
    <style:style style:name="T23" style:family="text">
      <style:text-properties fo:color="#8b949e" loext:opacity="100%"/>
    </style:style>
    <style:style style:name="T24" style:family="text">
      <style:text-properties officeooo:rsid="001516bf"/>
    </style:style>
    <style:style style:name="T25" style:family="text">
      <style:text-properties officeooo:rsid="001ab590"/>
    </style:style>
    <style:style style:name="T26" style:family="text">
      <style:text-properties officeooo:rsid="001bbfe1"/>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officeooo:rsid="001eb156"/>
    </style:style>
    <style:style style:name="T29" style:family="text">
      <style:text-properties officeooo:rsid="0021b155"/>
    </style:style>
    <style:style style:name="T30" style:family="text">
      <style:text-properties officeooo:rsid="0021cc47"/>
    </style:style>
    <style:style style:name="T31" style:family="text">
      <style:text-properties officeooo:rsid="002348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turning to the Gazebo wind thing. It's been a few days since I've chatted here so I forgot what we were doing.</text:p>
      <text:p text:style-name="Text_20_body"/>
      <text:p text:style-name="Text_20_body">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 </text:p>
      <text:p text:style-name="Text_20_body"/>
      <text:p text:style-name="Text_20_body">Here's what I have done so far…</text:p>
      <text:p text:style-name="P10">PHASE 1</text:p>
      <text:p text:style-name="Text_20_body">Using seed 42 for jax.rando<text:span text:style-name="T11">m and the cost function</text:span></text:p>
      <text:p text:style-name="P8">J=<text:span text:style-name="T11">\intop_{t_0}{t_f}(q_e*t*|e(t)|^2</text:span>+<text:span text:style-name="T11">r_u|u(t)|^2</text:span>)dt</text:p>
      <text:p text:style-name="P8"/>
      <text:p text:style-name="P11">where t_f=60 and the search ranges were</text:p>
      <text:p text:style-name="P8"/>
      <text:p text:style-name="P1"><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2.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8">0.1</text:span>, <text:span text:style-name="T8">2.0</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1</text:span>, <text:span text:style-name="T6">log</text:span><text:span text:style-name="T4">=</text:span><text:span text:style-name="T10">True</text:span>)</text:p>
      <text:p text:style-name="Text_20_body"/>
      <text:p text:style-name="P19"><text:span text:style-name="T11">The desired trajectory was a figure eight with a period of 30 second</text:span><text:span text:style-name="T18">s:</text:span></text:p>
      <text:p text:style-name="P19"/>
      <text:p text:style-name="P4"><text:span text:style-name="T19">def</text:span> <text:span text:style-name="T7">get_desired_state</text:span>(<text:span text:style-name="T1">self</text:span>, <text:span text:style-name="T6">t</text:span>: <text:span text:style-name="T16">float</text:span>) -&gt; <text:span text:style-name="T16">tuple</text:span>[<text:span text:style-name="T16">np</text:span>.<text:span text:style-name="T16">ndarray</text:span>, <text:span text:style-name="T16">np</text:span>.<text:span text:style-name="T16">ndarray</text:span>, <text:span text:style-name="T16">np</text:span>.<text:span text:style-name="T16">ndarray</text:span>]:</text:p>
      <text:p text:style-name="P1"><text:span text:style-name="T1">wx</text:span> <text:span text:style-name="T4">=</text:span> (<text:span text:style-name="T8">4.0</text:span> <text:span text:style-name="T4">*</text:span> <text:span text:style-name="T16">math</text:span>.<text:span text:style-name="T1">pi</text:span>) <text:span text:style-name="T4">/</text:span> <text:span text:style-name="T1">self</text:span>.<text:span text:style-name="T1">T_period</text:span> </text:p>
      <text:p text:style-name="P1"><text:span text:style-name="T1">wy</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wz</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zc</text:span> <text:span text:style-name="T4">=</text:span> <text:span text:style-name="T4">-</text:span><text:span text:style-name="T8">4.0</text:span></text:p>
      <text:p text:style-name="P1"><text:span text:style-name="T1">xd</text:span> <text:span text:style-name="T4">=</text:span> <text:span text:style-name="T8">3.0</text:span> <text:span text:style-name="T4">*</text:span> <text:span text:style-name="T16">math</text:span>.<text:span text:style-name="T7">sin</text:span>(<text:span text:style-name="T1">wx</text:span> <text:span text:style-name="T4">*</text:span> <text:span text:style-name="T6">t</text:span>)</text:p>
      <text:p text:style-name="P1"><text:span text:style-name="T1">yd</text:span> <text:span text:style-name="T4">=</text:span> <text:span text:style-name="T8">8.0</text:span> <text:span text:style-name="T4">*</text:span> <text:span text:style-name="T16">math</text:span>.<text:span text:style-name="T7">sin</text:span>(<text:span text:style-name="T1">wy</text:span> <text:span text:style-name="T4">*</text:span> <text:span text:style-name="T6">t</text:span>)</text:p>
      <text:p text:style-name="P1"><text:span text:style-name="T1">zd</text:span> <text:span text:style-name="T4">=</text:span> <text:span text:style-name="T8">0.5</text:span> <text:span text:style-name="T4">*</text:span> <text:span text:style-name="T16">math</text:span>.<text:span text:style-name="T7">sin</text:span>(<text:span text:style-name="T1">wz</text:span> <text:span text:style-name="T4">*</text:span> <text:span text:style-name="T6">t</text:span>) <text:span text:style-name="T4">+</text:span> <text:span text:style-name="T1">zc</text:span></text:p>
      <text:p text:style-name="P1"><text:span text:style-name="T1">vxd</text:span> <text:span text:style-name="T4">=</text:span> <text:span text:style-name="T8">3.0</text:span> <text:span text:style-name="T4">*</text:span> <text:span text:style-name="T1">wx</text:span> <text:span text:style-name="T4">*</text:span> <text:span text:style-name="T16">math</text:span>.<text:span text:style-name="T7">cos</text:span>(<text:span text:style-name="T1">wx</text:span> <text:span text:style-name="T4">*</text:span> <text:span text:style-name="T6">t</text:span>)</text:p>
      <text:p text:style-name="P1"><text:span text:style-name="T1">vyd</text:span> <text:span text:style-name="T4">=</text:span> <text:span text:style-name="T8">8.0</text:span> <text:span text:style-name="T4">*</text:span> <text:span text:style-name="T1">wy</text:span> <text:span text:style-name="T4">*</text:span> <text:span text:style-name="T16">math</text:span>.<text:span text:style-name="T7">cos</text:span>(<text:span text:style-name="T1">wy</text:span> <text:span text:style-name="T4">*</text:span> <text:span text:style-name="T6">t</text:span>)</text:p>
      <text:p text:style-name="P1"><text:span text:style-name="T1">vzd</text:span> <text:span text:style-name="T4">=</text:span> <text:span text:style-name="T8">0.5</text:span> <text:span text:style-name="T4">*</text:span> <text:span text:style-name="T1">wz</text:span> <text:span text:style-name="T4">*</text:span> <text:span text:style-name="T16">math</text:span>.<text:span text:style-name="T7">cos</text:span>(<text:span text:style-name="T1">wz</text:span> <text:span text:style-name="T4">*</text:span> <text:span text:style-name="T6">t</text:span>)</text:p>
      <text:p text:style-name="P1"><text:span text:style-name="T1">axd</text:span> <text:span text:style-name="T4">=</text:span> <text:span text:style-name="T4">-</text:span>(<text:span text:style-name="T1">wx</text:span><text:span text:style-name="T4">**</text:span><text:span text:style-name="T8">2</text:span>) <text:span text:style-name="T4">*</text:span> <text:span text:style-name="T1">xd</text:span></text:p>
      <text:p text:style-name="P1"><text:span text:style-name="T1">ayd</text:span> <text:span text:style-name="T4">=</text:span> <text:span text:style-name="T4">-</text:span>(<text:span text:style-name="T1">wy</text:span><text:span text:style-name="T4">**</text:span><text:span text:style-name="T8">2</text:span>) <text:span text:style-name="T4">*</text:span> <text:span text:style-name="T1">yd</text:span></text:p>
      <text:p text:style-name="P1"><text:span text:style-name="T1">azd</text:span> <text:span text:style-name="T4">=</text:span> <text:span text:style-name="T4">-</text:span>(<text:span text:style-name="T1">wz</text:span><text:span text:style-name="T4">**</text:span><text:span text:style-name="T8">2</text:span>) <text:span text:style-name="T4">*</text:span> (<text:span text:style-name="T1">zd</text:span> <text:span text:style-name="T4">-</text:span> <text:span text:style-name="T1">zc</text:span>)</text:p>
      <text:p text:style-name="P1"><text:soft-page-break/><text:span text:style-name="T20">return</text:span> (</text:p>
      <text:p text:style-name="P1"><text:span text:style-name="T16">np</text:span>.<text:span text:style-name="T7">array</text:span>([<text:span text:style-name="T1">xd</text:span>, <text:span text:style-name="T1">yd</text:span>, <text:span text:style-name="T1">zd</text:span>], <text:span text:style-name="T6">dtype</text:span><text:span text:style-name="T4">=</text:span><text:span text:style-name="T16">np</text:span>.<text:span text:style-name="T16">float64</text:span>),</text:p>
      <text:p text:style-name="P1"><text:span text:style-name="T16">np</text:span>.<text:span text:style-name="T7">array</text:span>([<text:span text:style-name="T1">vxd</text:span>, <text:span text:style-name="T1">vyd</text:span>, <text:span text:style-name="T1">vzd</text:span>], <text:span text:style-name="T6">dtype</text:span><text:span text:style-name="T4">=</text:span><text:span text:style-name="T16">np</text:span>.<text:span text:style-name="T16">float64</text:span>),</text:p>
      <text:p text:style-name="P1"><text:span text:style-name="T16">np</text:span>.<text:span text:style-name="T7">array</text:span>([<text:span text:style-name="T1">axd</text:span>, <text:span text:style-name="T1">ayd</text:span>, <text:span text:style-name="T1">azd</text:span>], <text:span text:style-name="T6">dtype</text:span><text:span text:style-name="T4">=</text:span><text:span text:style-name="T16">np</text:span>.<text:span text:style-name="T16">float64</text:span>)</text:p>
      <text:p text:style-name="P1">)</text:p>
      <text:p text:style-name="P19"/>
      <text:p text:style-name="P19"><text:span text:style-name="T11">Optuna was given</text:span> 100 trials <text:span text:style-name="T11">to find the gains in these ranges that minimize this cost. In each, the initial condition was always</text:span></text:p>
      <text:p text:style-name="P9"><text:span text:style-name="T13">FIXED_X</text:span><text:span text:style-name="T2"> </text:span><text:span text:style-name="T5">=</text:span><text:span text:style-name="T2"> </text:span><text:span text:style-name="T9">0.70</text:span></text:p>
      <text:p text:style-name="P1"><text:span text:style-name="T12">FIXED_Y</text:span> <text:span text:style-name="T4">=</text:span> <text:span text:style-name="T4">-</text:span><text:span text:style-name="T8">2.37</text:span></text:p>
      <text:p text:style-name="P1"><text:span text:style-name="T12">TARGET_Z</text:span> <text:span text:style-name="T4">=</text:span> <text:span text:style-name="T4">-</text:span><text:span text:style-name="T8">3.0</text:span></text:p>
      <text:p text:style-name="P1"/>
      <text:p text:style-name="Standard">where the <text:span text:style-name="T11">z-value is chosen by letting the quad copter first ascend to that altitude (negative z is up) before activating the controller. Th</text:span><text:span text:style-name="T14">e x-y portion of the</text:span><text:span text:style-name="T11"> initial </text:span><text:span text:style-name="T14">condition</text:span><text:span text:style-name="T11"> was randomly selected (once at the beginning, not every flight) from a 5 by 5 meter square centered at the origin. </text:span>If the quadcopter violates <text:span text:style-name="T11">a</text:span> defined spatial safety boundar<text:span text:style-name="T11">y</text:span> at some time t_fail before reaching t_<text:span text:style-name="T11">f</text:span>, the integration stops and a massive scalar penalty is added to whatever cost has accumulated up to that point:</text:p>
      <text:p text:style-name="Standard">J_fail=J(t_fail)+w_fail(t_<text:span text:style-name="T11">f</text:span>−t_fai<text:span text:style-name="T11">l)^2</text:span></text:p>
      <text:p text:style-name="Standard"/>
      <text:p text:style-name="P12">where w_fail = 1000.</text:p>
      <text:p text:style-name="P12"/>
      <text:p text:style-name="P13">PHASE 2</text:p>
      <text:p text:style-name="P16">With the same initial condition and using the initial condition function from my 1.2.0 ResNet library, </text:p>
      <text:p text:style-name="P13"/>
      <text:p text:style-name="P13">As of June 16, I ran both ResNet controllers with the search spaces:</text:p>
      <text:p text:style-name="P13"/>
      <text:p text:style-name="P3"><text:span text:style-name="T1">param_dict</text:span>[<text:span text:style-name="T3">'gamma'</text:span>] <text:span text:style-name="T4">=</text:span> <text:span text:style-name="T16">float</text:span>(<text:span text:style-name="T6">trial</text:span>.<text:span text:style-name="T7">suggest_float</text:span>(<text:span text:style-name="T3">"gamma"</text:span>, <text:span text:style-name="T8">0.5</text:span>, <text:span text:style-name="T8">50.0</text:span>))</text:p>
      <text:p text:style-name="P1"><text:span text:style-name="T1">param_dict</text:span>[<text:span text:style-name="T3">'sigma_mod'</text:span>] <text:span text:style-name="T4">=</text:span> <text:span text:style-name="T16">float</text:span>(<text:span text:style-name="T6">trial</text:span>.<text:span text:style-name="T7">suggest_float</text:span>(<text:span text:style-name="T3">"sigma_mod"</text:span>, <text:span text:style-name="T8">0.001</text:span>, <text:span text:style-name="T8">1.0</text:span>, <text:span text:style-name="T6">log</text:span><text:span text:style-name="T4">=</text:span><text:span text:style-name="T10">True</text:span>))</text:p>
      <text:p text:style-name="P1"><text:span text:style-name="T1">k_0</text:span> <text:span text:style-name="T4">=</text:span> <text:span text:style-name="T6">trial</text:span>.<text:span text:style-name="T7">suggest_categorical</text:span>(<text:span text:style-name="T3">"k_0"</text:span>, [<text:span text:style-name="T8">1</text:span>, <text:span text:style-name="T8">2</text:span>, <text:span text:style-name="T8">4</text:span>, <text:span text:style-name="T8">8</text:span>])</text:p>
      <text:p text:style-name="P1"><text:span text:style-name="T1">k_i</text:span> <text:span text:style-name="T4">=</text:span> <text:span text:style-name="T6">trial</text:span>.<text:span text:style-name="T7">suggest_categorical</text:span>(<text:span text:style-name="T3">"k_i"</text:span>, [<text:span text:style-name="T8">1</text:span>, <text:span text:style-name="T8">2</text:span>, <text:span text:style-name="T8">4</text:span>, <text:span text:style-name="T8">8</text:span>])</text:p>
      <text:p text:style-name="P1"><text:span text:style-name="T1">theta_bar_scale</text:span> <text:span text:style-name="T4">=</text:span> <text:span text:style-name="T6">trial</text:span>.<text:span text:style-name="T7">suggest_float</text:span>(<text:span text:style-name="T3">"theta_bar_scale"</text:span>, <text:span text:style-name="T8">0.001</text:span>, <text:span text:style-name="T8">1.0</text:span>, <text:span text:style-name="T6">log</text:span><text:span text:style-name="T4">=</text:span><text:span text:style-name="T10">True</text:span>)</text:p>
      <text:p text:style-name="P1"><text:span text:style-name="T1">b</text:span> <text:span text:style-name="T4">=</text:span> <text:span text:style-name="T8">1</text:span></text:p>
      <text:p text:style-name="P1"><text:span text:style-name="T1">hidden_width</text:span> <text:span text:style-name="T4">=</text:span> <text:span text:style-name="T8">16</text:span></text:p>
      <text:p text:style-name="P1"/>
      <text:p text:style-name="Standard">I have generated database using the <text:span text:style-name="T15">above</text:span> gains. <text:span text:style-name="T15">Each were run 100 times.</text:span></text:p>
      <text:p text:style-name="Standard"/>
      <text:p text:style-name="P14">For developed (ResNet inside the integral), the best cost was 107.5518 with gamma = 22.3669, sigma_mod = 0.76541, k_0 = 2, k_i =2, theta_bar_scale: 0.00132766</text:p>
      <text:p text:style-name="P14"/>
      <text:p text:style-name="P14">For the baseline (ResNet outside the integral), the best cost was 137.9704 with gamma = 37.66, sigma_m<text:span text:style-name="T17">o</text:span>d = 0.001197, k_0 = 1, k_i =8, theta_bar: 1337.21 (Scale: 0.5749)</text:p>
      <text:p text:style-name="P14"/>
      <text:p text:style-name="P18">PHASE 1 (TAKE 2)</text:p>
      <text:p text:style-name="P18">On June 17, I ran 501 trials of Phase 1 again from scratch. The best ITAE cost was 160.8355 and the best parameters were</text:p>
      <text:p text:style-name="P18"><text:soft-page-break/>Best Params: {'k1': 1.9998108856232995, 'k2': 0.6529643057605065, 'k3': 0.7406820227437091, 'k_rise': 0.003695960415369938}</text:p>
      <text:p text:style-name="P18">k1=2, k2=0.65, k3=0.74,k_rise=0.0037.</text:p>
      <text:p text:style-name="P18"/>
      <text:p text:style-name="P20"><text:span text:style-name="T27">I changed the desired trajectory </text:span>to something more interesting. I am now running 1000 trials (which stop early if the cost hasn’t improved in 100 trials). <text:span text:style-name="T21">I also remove</text:span><text:span text:style-name="T22">d</text:span><text:span text:style-name="T21"> the symmetr</text:span><text:span text:style-name="T22">y </text:span><text:span text:style-name="T21">from k_2 and k_3.</text:span></text:p>
      <text:p text:style-name="P20"/>
      <text:p text:style-name="P21">PHASE 1 (TAKE 3)</text:p>
      <text:p text:style-name="P21">It converged at trial 204. Best cost was trial 102 with value: 143.9321 and parameters: {'k1': 3.3262179738426725, 'k2': 0.2918707785937102, 'k3': 0.432471391222489, 'k_rise': 0.0496335953575354}. RMS Tracking error was .5834</text:p>
      <text:p text:style-name="P21"/>
      <text:p text:style-name="P5"><text:span text:style-name="T1">param_dict</text:span>[<text:span text:style-name="T3">'k1'</text:span>] <text:span text:style-name="T4">=</text:span> <text:span text:style-name="T6">trial</text:span>.<text:span text:style-name="T7">suggest_float</text:span>(<text:span text:style-name="T3">"k1"</text:span>, <text:span text:style-name="T8">1.0</text:span>, <text:span text:style-name="T8">8.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5.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5.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5</text:span>, <text:span text:style-name="T6">log</text:span><text:span text:style-name="T4">=</text:span><text:span text:style-name="T10">True</text:span>)</text:p>
      <text:p text:style-name="P21"/>
      <text:p text:style-name="P21"/>
      <text:p text:style-name="P22">Unfortunately k_rise was quite close to the limit so we have to rerun.</text:p>
      <text:p text:style-name="P21"/>
      <text:p text:style-name="P22">PHASE <text:span text:style-name="T24">1 (TAKE 4)</text:span></text:p>
      <text:p text:style-name="P6"><text:span text:style-name="T1">param_dict</text:span>[<text:span text:style-name="T3">'k1'</text:span>] <text:span text:style-name="T4">=</text:span> <text:span text:style-name="T6">trial</text:span>.<text:span text:style-name="T7">suggest_float</text:span>(<text:span text:style-name="T3">"k1"</text:span>, <text:span text:style-name="T8">1.0</text:span>, <text:span text:style-name="T8">8.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1.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1.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1</text:span>, <text:span text:style-name="T8">10.0</text:span>, <text:span text:style-name="T6">log</text:span><text:span text:style-name="T4">=</text:span><text:span text:style-name="T10">True</text:span>)</text:p>
      <text:p text:style-name="P1"/>
      <text:p text:style-name="P15">========================================</text:p>
      <text:p text:style-name="P15">🏆 ABSOLUTE BEST TRIAL 🏆</text:p>
      <text:p text:style-name="P15">========================================</text:p>
      <text:p text:style-name="P15">Trial Number : 479</text:p>
      <text:p text:style-name="P15">ITAE Cost <text:s text:c="3"/>: 45.3812</text:p>
      <text:p text:style-name="P15">Parameters <text:s text:c="2"/>:</text:p>
      <text:p text:style-name="P15"><text:s text:c="4"/>k1: 1.0023023754462224</text:p>
      <text:p text:style-name="P15"><text:s text:c="4"/>k2: 0.47303088708289664</text:p>
      <text:p text:style-name="P15"><text:s text:c="4"/>k3: 0.4876260355061123</text:p>
      <text:p text:style-name="P15"><text:s text:c="4"/>k_rise: 0.08491915751268746</text:p>
      <text:p text:style-name="P15"/>
      <text:p text:style-name="P15">=================================================================</text:p>
      <text:p text:style-name="P15">Rank <text:s text:c="2"/>| Trial <text:s text:c="2"/>| Cost <text:s text:c="5"/>| k1 <text:s text:c="5"/>| k2 <text:s text:c="5"/>| k3 <text:s text:c="5"/>| k_rise <text:s text:c="2"/></text:p>
      <text:p text:style-name="P15">-----------------------------------------------------------------</text:p>
      <text:p text:style-name="P15">1 <text:s text:c="5"/>| 479 <text:s text:c="4"/>| 45.4 <text:s text:c="5"/>| 1 <text:s text:c="6"/>| 0.473 <text:s text:c="2"/>| 0.488 <text:s text:c="2"/>| 0.0849 <text:s text:c="2"/></text:p>
      <text:p text:style-name="P15">2 <text:s text:c="5"/>| 553 <text:s text:c="4"/>| 45.5 <text:s text:c="5"/>| 1.01 <text:s text:c="3"/>| 0.474 <text:s text:c="2"/>| 0.488 <text:s text:c="2"/>| 0.0957 <text:s text:c="2"/></text:p>
      <text:p text:style-name="P15">3 <text:s text:c="5"/>| 540 <text:s text:c="4"/>| 45.5 <text:s text:c="5"/>| 1 <text:s text:c="6"/>| 0.471 <text:s text:c="2"/>| 0.485 <text:s text:c="2"/>| 0.116 <text:s text:c="3"/></text:p>
      <text:p text:style-name="P15">4 <text:s text:c="5"/>| 403 <text:s text:c="4"/>| 45.6 <text:s text:c="5"/>| 1.01 <text:s text:c="3"/>| 0.468 <text:s text:c="2"/>| 0.487 <text:s text:c="2"/>| 0.109 <text:s text:c="3"/></text:p>
      <text:p text:style-name="P15">5 <text:s text:c="5"/>| 411 <text:s text:c="4"/>| 45.7 <text:s text:c="5"/>| 1 <text:s text:c="6"/>| 0.472 <text:s text:c="2"/>| 0.489 <text:s text:c="2"/>| 0.111 <text:s text:c="3"/></text:p>
      <text:p text:style-name="P15">6 <text:s text:c="5"/>| 400 <text:s text:c="4"/>| 45.7 <text:s text:c="5"/>| 1.01 <text:s text:c="3"/>| 0.467 <text:s text:c="2"/>| 0.484 <text:s text:c="2"/>| 0.112 <text:s text:c="3"/></text:p>
      <text:p text:style-name="P15"><text:soft-page-break/>7 <text:s text:c="5"/>| 549 <text:s text:c="4"/>| 45.8 <text:s text:c="5"/>| 1 <text:s text:c="6"/>| 0.481 <text:s text:c="2"/>| 0.494 <text:s text:c="2"/>| 0.0955 <text:s text:c="2"/></text:p>
      <text:p text:style-name="P15">8 <text:s text:c="5"/>| 424 <text:s text:c="4"/>| 45.8 <text:s text:c="5"/>| 1.01 <text:s text:c="3"/>| 0.483 <text:s text:c="2"/>| 0.513 <text:s text:c="2"/>| 0.103 <text:s text:c="3"/></text:p>
      <text:p text:style-name="P15">9 <text:s text:c="5"/>| 634 <text:s text:c="4"/>| 45.8 <text:s text:c="5"/>| 1.01 <text:s text:c="3"/>| 0.51 <text:s text:c="3"/>| 0.519 <text:s text:c="2"/>| 0.0801 <text:s text:c="2"/></text:p>
      <text:p text:style-name="P15">10 <text:s text:c="4"/>| 409 <text:s text:c="4"/>| 45.9 <text:s text:c="5"/>| 1 <text:s text:c="6"/>| 0.475 <text:s text:c="2"/>| 0.489 <text:s text:c="2"/>| 0.114 <text:s text:c="3"/></text:p>
      <text:p text:style-name="P15">11 <text:s text:c="4"/>| 407 <text:s text:c="4"/>| 46 <text:s text:c="7"/>| 1 <text:s text:c="6"/>| 0.473 <text:s text:c="2"/>| 0.489 <text:s text:c="2"/>| 0.115 <text:s text:c="3"/></text:p>
      <text:p text:style-name="P15">12 <text:s text:c="4"/>| 467 <text:s text:c="4"/>| 46.1 <text:s text:c="5"/>| 1.01 <text:s text:c="3"/>| 0.46 <text:s text:c="3"/>| 0.475 <text:s text:c="2"/>| 0.101 <text:s text:c="3"/></text:p>
      <text:p text:style-name="P15">13 <text:s text:c="4"/>| 438 <text:s text:c="4"/>| 46.1 <text:s text:c="5"/>| 1 <text:s text:c="6"/>| 0.466 <text:s text:c="2"/>| 0.48 <text:s text:c="3"/>| 0.0924 <text:s text:c="2"/></text:p>
      <text:p text:style-name="P15">14 <text:s text:c="4"/>| 401 <text:s text:c="4"/>| 46.1 <text:s text:c="5"/>| 1.03 <text:s text:c="3"/>| 0.465 <text:s text:c="2"/>| 0.482 <text:s text:c="2"/>| 0.115 <text:s text:c="3"/></text:p>
      <text:p text:style-name="P15">15 <text:s text:c="4"/>| 574 <text:s text:c="4"/>| 46.1 <text:s text:c="5"/>| 1 <text:s text:c="6"/>| 0.472 <text:s text:c="2"/>| 0.49 <text:s text:c="3"/>| 0.096 <text:s text:c="3"/></text:p>
      <text:p text:style-name="P15">=================================================================</text:p>
      <text:p text:style-name="P15"/>
      <text:p text:style-name="P24">It ran for 679 trials. <text:span text:style-name="T25">1000 limited. Stops after 200 if best one doesn’t improve.</text:span></text:p>
      <text:p text:style-name="P24"/>
      <text:p text:style-name="P23">PHASE <text:span text:style-name="T24">1 (TAKE </text:span><text:span text:style-name="T26">5</text:span><text:span text:style-name="T24">)</text:span></text:p>
      <text:p text:style-name="P25">Changing to 500 trials limit. Stop after <text:span text:style-name="T28">50</text:span></text:p>
      <text:p text:style-name="P26">New search space is</text:p>
      <text:p text:style-name="P26"/>
      <text:p text:style-name="P7"><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3.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1">param_dict</text:span>[<text:span text:style-name="T3">'k2'</text:span>], <text:span text:style-name="T8">2.0</text:span>) <text:span text:style-name="T23"># BREAK SYMMETRY: Force k3's lower bound to be k2</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1</text:span>, <text:span text:style-name="T8">10.0</text:span>, <text:span text:style-name="T6">log</text:span><text:span text:style-name="T4">=</text:span><text:span text:style-name="T10">True</text:span>)</text:p>
      <text:p text:style-name="P1"/>
      <text:p text:style-name="P1">max@MAX-MINT ~/voxl-px4-sitl % python3 get_best_results.py <text:s/></text:p>
      <text:p text:style-name="P1">[*] Loading study 'phase1_noresnet_baseline_tuning' from sqlite:///phase1_tuning.db...</text:p>
      <text:p text:style-name="P1"/>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text:soft-page-break/>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P26"/>
      <text:p text:style-name="P27">PHASE 1 (Take 6)</text:p>
      <text:p text:style-name="P27"/>
      <text:p text:style-name="P29">I shortened to 500 trials with a cutoff of 50. It finished in 206 trials.</text:p>
      <text:p text:style-name="P27"/>
      <text:p text:style-name="P27">param_dict['k1'] = trial.suggest_float("k1", 0.0<text:span text:style-name="T30">0</text:span>1, 2.0, log=True)</text:p>
      <text:p text:style-name="P27">param_dict['k2'] = trial.suggest_float("k2", 0.0<text:span text:style-name="T30">0</text:span>1, <text:span text:style-name="T29">5</text:span>.0, log=True)</text:p>
      <text:p text:style-name="P27">param_dict['k3'] = trial.suggest_float("k3", param_dict['k2'], <text:span text:style-name="T29">5</text:span>.0) </text:p>
      <text:p text:style-name="P27">param_dict['k_rise'] = trial.suggest_float("k_rise", 0.01, <text:span text:style-name="T31">2</text:span>.0, log=True)</text:p>
      <text:p text:style-name="P27"/>
      <text:p text:style-name="P27">=================================================================</text:p>
      <text:p text:style-name="P27">Rank <text:s text:c="2"/>| Trial <text:s text:c="2"/>| Cost <text:s text:c="5"/>| k1 <text:s text:c="5"/>| k2 <text:s text:c="5"/>| k3 <text:s text:c="5"/>| k_rise <text:s text:c="2"/></text:p>
      <text:p text:style-name="P27">-----------------------------------------------------------------</text:p>
      <text:p text:style-name="P27">1 <text:s text:c="5"/>| 156 <text:s text:c="4"/>| 31.4 <text:s text:c="5"/>| 0.0906 <text:s/>| 0.15 <text:s text:c="3"/>| 1.42 <text:s text:c="3"/>| 0.141 <text:s text:c="3"/></text:p>
      <text:p text:style-name="P27">2 <text:s text:c="5"/>| 179 <text:s text:c="4"/>| 31.5 <text:s text:c="5"/>| 0.125 <text:s text:c="2"/>| 0.0763 <text:s/>| 1.53 <text:s text:c="3"/>| 0.145 <text:s text:c="3"/></text:p>
      <text:p text:style-name="P27">3 <text:s text:c="5"/>| 177 <text:s text:c="4"/>| 31.6 <text:s text:c="5"/>| 0.135 <text:s text:c="2"/>| 0.0942 <text:s/>| 1.37 <text:s text:c="3"/>| 0.152 <text:s text:c="3"/></text:p>
      <text:p text:style-name="P27">4 <text:s text:c="5"/>| 155 <text:s text:c="4"/>| 31.6 <text:s text:c="5"/>| 0.11 <text:s text:c="3"/>| 0.165 <text:s text:c="2"/>| 1.33 <text:s text:c="3"/>| 0.172 <text:s text:c="3"/></text:p>
      <text:p text:style-name="P27">5 <text:s text:c="5"/>| 185 <text:s text:c="4"/>| 31.9 <text:s text:c="5"/>| 0.162 <text:s text:c="2"/>| 0.0494 <text:s/>| 1.52 <text:s text:c="3"/>| 0.14 <text:s text:c="4"/></text:p>
      <text:p text:style-name="P27">6 <text:s text:c="5"/>| 165 <text:s text:c="4"/>| 32.1 <text:s text:c="5"/>| 0.126 <text:s text:c="2"/>| 0.215 <text:s text:c="2"/>| 1.46 <text:s text:c="3"/>| 0.188 <text:s text:c="3"/></text:p>
      <text:p text:style-name="P27">7 <text:s text:c="5"/>| 205 <text:s text:c="4"/>| 32.2 <text:s text:c="5"/>| 0.13 <text:s text:c="3"/>| 0.0415 <text:s/>| 1.61 <text:s text:c="3"/>| 0.156 <text:s text:c="3"/></text:p>
      <text:p text:style-name="P27">8 <text:s text:c="5"/>| 110 <text:s text:c="4"/>| 32.3 <text:s text:c="5"/>| 0.108 <text:s text:c="2"/>| 0.182 <text:s text:c="2"/>| 1.44 <text:s text:c="3"/>| 0.182 <text:s text:c="3"/></text:p>
      <text:p text:style-name="P27">9 <text:s text:c="5"/>| 206 <text:s text:c="4"/>| 32.3 <text:s text:c="5"/>| 0.0956 <text:s/>| 0.0386 <text:s/>| 1.38 <text:s text:c="3"/>| 0.148 <text:s text:c="3"/></text:p>
      <text:p text:style-name="P27">10 <text:s text:c="4"/>| 113 <text:s text:c="4"/>| 32.3 <text:s text:c="5"/>| 0.231 <text:s text:c="2"/>| 0.00822 | 1.39 <text:s text:c="3"/>| 0.183 <text:s text:c="3"/></text:p>
      <text:p text:style-name="P27">11 <text:s text:c="4"/>| 176 <text:s text:c="4"/>| 32.5 <text:s text:c="5"/>| 0.14 <text:s text:c="3"/>| 0.134 <text:s text:c="2"/>| 1.34 <text:s text:c="3"/>| 0.189 <text:s text:c="3"/></text:p>
      <text:p text:style-name="P27">12 <text:s text:c="4"/>| 180 <text:s text:c="4"/>| 32.6 <text:s text:c="5"/>| 0.134 <text:s text:c="2"/>| 0.0706 <text:s/>| 1.64 <text:s text:c="3"/>| 0.135 <text:s text:c="3"/></text:p>
      <text:p text:style-name="P27">13 <text:s text:c="4"/>| 203 <text:s text:c="4"/>| 32.6 <text:s text:c="5"/>| 0.126 <text:s text:c="2"/>| 0.0374 <text:s/>| 1.5 <text:s text:c="4"/>| 0.175 <text:s text:c="3"/></text:p>
      <text:p text:style-name="P27">14 <text:s text:c="4"/>| 181 <text:s text:c="4"/>| 32.6 <text:s text:c="5"/>| 0.137 <text:s text:c="2"/>| 0.0503 <text:s/>| 1.62 <text:s text:c="3"/>| 0.144 <text:s text:c="3"/></text:p>
      <text:p text:style-name="P27">15 <text:s text:c="4"/>| 178 <text:s text:c="4"/>| 32.6 <text:s text:c="5"/>| 0.135 <text:s text:c="2"/>| 0.138 <text:s text:c="2"/>| 1.48 <text:s text:c="3"/>| 0.154 <text:s text:c="3"/></text:p>
      <text:p text:style-name="P27">=================================================================</text:p>
      <text:p text:style-name="P27"/>
      <text:p text:style-name="P29">Select. <text:s/>K_1 = 0.09, k2= 0.15, k3= 1.4, k_Rise=0.14</text:p>
      <text:p text:style-name="P29"/>
      <text:p text:style-name="P30">PHASE 2 (Take 2)</text:p>
      <text:p text:style-name="P17"/>
      <text:p text:style-name="P16"/>
      <text:p text:style-name="P14"/>
      <text:p text:style-name="P13"/>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08:58:59.506469531</meta:creation-date>
    <dc:date>2026-06-20T14:08:07.801277960</dc:date>
    <meta:editing-duration>P2DT11M52S</meta:editing-duration>
    <meta:editing-cycles>22</meta:editing-cycles>
    <meta:generator>LibreOffice/7.3.7.2$Linux_X86_64 LibreOffice_project/30$Build-2</meta:generator>
    <meta:document-statistic meta:table-count="0" meta:image-count="0" meta:object-count="0" meta:page-count="6" meta:paragraph-count="163" meta:word-count="1568" meta:character-count="10522" meta:non-whitespace-character-count="7852"/>
  </office:meta>
</office:document-meta>
</file>