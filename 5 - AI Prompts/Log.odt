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Droid Sans Mono" svg:font-family="Droid Sans Mono" style:font-family-generic="system" svg:panose-1="2 11 6 4 2 2 2 2 2 4"/>
    <style:font-face style:name="Menlo" svg:font-family="Menlo" style:font-family-generic="modern" style:font-pitch="fixed" svg:panose-1="2 11 6 9 3 8 4 2 2 4"/>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extbody" style:master-page-name="MP0" style:family="paragraph">
      <style:paragraph-properties fo:break-before="page"/>
    </style:style>
    <style:style style:name="P2" style:parent-style-name="Standard" style:family="paragraph">
      <style:paragraph-properties style:line-height-at-least="0.1979in"/>
    </style:style>
    <style:style style:name="T3" style:parent-style-name="DefaultParagraphFont" style:family="text">
      <style:text-properties style:font-name="Droid Sans Mono" fo:color="#C9D1D9" fo:font-size="10.5pt" style:font-size-asian="10.5pt" fo:background-color="#121314"/>
    </style:style>
    <style:style style:name="T4" style:parent-style-name="DefaultParagraphFont" style:family="text">
      <style:text-properties style:font-name="Droid Sans Mono" fo:color="#BBBEBF" fo:font-size="10.5pt" style:font-size-asian="10.5pt" fo:background-color="#121314"/>
    </style:style>
    <style:style style:name="T5" style:parent-style-name="DefaultParagraphFont" style:family="text">
      <style:text-properties style:font-name="Droid Sans Mono" fo:color="#A5D6FF" fo:font-size="10.5pt" style:font-size-asian="10.5pt" fo:background-color="#121314"/>
    </style:style>
    <style:style style:name="T6" style:parent-style-name="DefaultParagraphFont" style:family="text">
      <style:text-properties style:font-name="Droid Sans Mono" fo:color="#BBBEBF" fo:font-size="10.5pt" style:font-size-asian="10.5pt" fo:background-color="#121314"/>
    </style:style>
    <style:style style:name="T7" style:parent-style-name="DefaultParagraphFont" style:family="text">
      <style:text-properties style:font-name="Droid Sans Mono" fo:color="#D4D4D4" fo:font-size="10.5pt" style:font-size-asian="10.5pt" fo:background-color="#121314"/>
    </style:style>
    <style:style style:name="T8" style:parent-style-name="DefaultParagraphFont" style:family="text">
      <style:text-properties style:font-name="Droid Sans Mono" fo:color="#BBBEBF" fo:font-size="10.5pt" style:font-size-asian="10.5pt" fo:background-color="#121314"/>
    </style:style>
    <style:style style:name="T9" style:parent-style-name="DefaultParagraphFont" style:family="text">
      <style:text-properties style:font-name="Droid Sans Mono" fo:color="#FFA657" fo:font-size="10.5pt" style:font-size-asian="10.5pt" fo:background-color="#121314"/>
    </style:style>
    <style:style style:name="T10" style:parent-style-name="DefaultParagraphFont" style:family="text">
      <style:text-properties style:font-name="Droid Sans Mono" fo:color="#BBBEBF" fo:font-size="10.5pt" style:font-size-asian="10.5pt" fo:background-color="#121314"/>
    </style:style>
    <style:style style:name="T11" style:parent-style-name="DefaultParagraphFont" style:family="text">
      <style:text-properties style:font-name="Droid Sans Mono" fo:color="#D2A8FF" fo:font-size="10.5pt" style:font-size-asian="10.5pt" fo:background-color="#121314"/>
    </style:style>
    <style:style style:name="T12" style:parent-style-name="DefaultParagraphFont" style:family="text">
      <style:text-properties style:font-name="Droid Sans Mono" fo:color="#BBBEBF" fo:font-size="10.5pt" style:font-size-asian="10.5pt" fo:background-color="#121314"/>
    </style:style>
    <style:style style:name="T13" style:parent-style-name="DefaultParagraphFont" style:family="text">
      <style:text-properties style:font-name="Droid Sans Mono" fo:color="#A5D6FF" fo:font-size="10.5pt" style:font-size-asian="10.5pt" fo:background-color="#121314"/>
    </style:style>
    <style:style style:name="T14" style:parent-style-name="DefaultParagraphFont" style:family="text">
      <style:text-properties style:font-name="Droid Sans Mono" fo:color="#BBBEBF" fo:font-size="10.5pt" style:font-size-asian="10.5pt" fo:background-color="#121314"/>
    </style:style>
    <style:style style:name="T15" style:parent-style-name="DefaultParagraphFont" style:family="text">
      <style:text-properties style:font-name="Droid Sans Mono" fo:color="#B5CEA8" fo:font-size="10.5pt" style:font-size-asian="10.5pt" fo:background-color="#121314"/>
    </style:style>
    <style:style style:name="T16" style:parent-style-name="DefaultParagraphFont" style:family="text">
      <style:text-properties style:font-name="Droid Sans Mono" fo:color="#BBBEBF" fo:font-size="10.5pt" style:font-size-asian="10.5pt" fo:background-color="#121314"/>
    </style:style>
    <style:style style:name="T17" style:parent-style-name="DefaultParagraphFont" style:family="text">
      <style:text-properties style:font-name="Droid Sans Mono" fo:color="#B5CEA8" fo:font-size="10.5pt" style:font-size-asian="10.5pt" fo:background-color="#121314"/>
    </style:style>
    <style:style style:name="T18" style:parent-style-name="DefaultParagraphFont" style:family="text">
      <style:text-properties style:font-name="Droid Sans Mono" fo:color="#BBBEBF" fo:font-size="10.5pt" style:font-size-asian="10.5pt" fo:background-color="#121314"/>
    </style:style>
    <style:style style:name="P19" style:parent-style-name="Standard" style:family="paragraph">
      <style:paragraph-properties style:line-height-at-least="0.1979in"/>
    </style:style>
    <style:style style:name="T20" style:parent-style-name="DefaultParagraphFont" style:family="text">
      <style:text-properties style:font-name="Droid Sans Mono" fo:color="#C9D1D9" fo:font-size="10.5pt" style:font-size-asian="10.5pt" fo:background-color="#121314"/>
    </style:style>
    <style:style style:name="T21" style:parent-style-name="DefaultParagraphFont" style:family="text">
      <style:text-properties style:font-name="Droid Sans Mono" fo:color="#BBBEBF" fo:font-size="10.5pt" style:font-size-asian="10.5pt" fo:background-color="#121314"/>
    </style:style>
    <style:style style:name="T22" style:parent-style-name="DefaultParagraphFont" style:family="text">
      <style:text-properties style:font-name="Droid Sans Mono" fo:color="#A5D6FF" fo:font-size="10.5pt" style:font-size-asian="10.5pt" fo:background-color="#121314"/>
    </style:style>
    <style:style style:name="T23" style:parent-style-name="DefaultParagraphFont" style:family="text">
      <style:text-properties style:font-name="Droid Sans Mono" fo:color="#BBBEBF" fo:font-size="10.5pt" style:font-size-asian="10.5pt" fo:background-color="#121314"/>
    </style:style>
    <style:style style:name="T24" style:parent-style-name="DefaultParagraphFont" style:family="text">
      <style:text-properties style:font-name="Droid Sans Mono" fo:color="#D4D4D4" fo:font-size="10.5pt" style:font-size-asian="10.5pt" fo:background-color="#121314"/>
    </style:style>
    <style:style style:name="T25" style:parent-style-name="DefaultParagraphFont" style:family="text">
      <style:text-properties style:font-name="Droid Sans Mono" fo:color="#BBBEBF" fo:font-size="10.5pt" style:font-size-asian="10.5pt" fo:background-color="#121314"/>
    </style:style>
    <style:style style:name="T26" style:parent-style-name="DefaultParagraphFont" style:family="text">
      <style:text-properties style:font-name="Droid Sans Mono" fo:color="#FFA657" fo:font-size="10.5pt" style:font-size-asian="10.5pt" fo:background-color="#121314"/>
    </style:style>
    <style:style style:name="T27" style:parent-style-name="DefaultParagraphFont" style:family="text">
      <style:text-properties style:font-name="Droid Sans Mono" fo:color="#BBBEBF" fo:font-size="10.5pt" style:font-size-asian="10.5pt" fo:background-color="#121314"/>
    </style:style>
    <style:style style:name="T28" style:parent-style-name="DefaultParagraphFont" style:family="text">
      <style:text-properties style:font-name="Droid Sans Mono" fo:color="#D2A8FF" fo:font-size="10.5pt" style:font-size-asian="10.5pt" fo:background-color="#121314"/>
    </style:style>
    <style:style style:name="T29" style:parent-style-name="DefaultParagraphFont" style:family="text">
      <style:text-properties style:font-name="Droid Sans Mono" fo:color="#BBBEBF" fo:font-size="10.5pt" style:font-size-asian="10.5pt" fo:background-color="#121314"/>
    </style:style>
    <style:style style:name="T30" style:parent-style-name="DefaultParagraphFont" style:family="text">
      <style:text-properties style:font-name="Droid Sans Mono" fo:color="#A5D6FF" fo:font-size="10.5pt" style:font-size-asian="10.5pt" fo:background-color="#121314"/>
    </style:style>
    <style:style style:name="T31" style:parent-style-name="DefaultParagraphFont" style:family="text">
      <style:text-properties style:font-name="Droid Sans Mono" fo:color="#BBBEBF" fo:font-size="10.5pt" style:font-size-asian="10.5pt" fo:background-color="#121314"/>
    </style:style>
    <style:style style:name="T32" style:parent-style-name="DefaultParagraphFont" style:family="text">
      <style:text-properties style:font-name="Droid Sans Mono" fo:color="#B5CEA8" fo:font-size="10.5pt" style:font-size-asian="10.5pt" fo:background-color="#121314"/>
    </style:style>
    <style:style style:name="T33" style:parent-style-name="DefaultParagraphFont" style:family="text">
      <style:text-properties style:font-name="Droid Sans Mono" fo:color="#BBBEBF" fo:font-size="10.5pt" style:font-size-asian="10.5pt" fo:background-color="#121314"/>
    </style:style>
    <style:style style:name="T34" style:parent-style-name="DefaultParagraphFont" style:family="text">
      <style:text-properties style:font-name="Droid Sans Mono" fo:color="#B5CEA8" fo:font-size="10.5pt" style:font-size-asian="10.5pt" fo:background-color="#121314"/>
    </style:style>
    <style:style style:name="T35" style:parent-style-name="DefaultParagraphFont" style:family="text">
      <style:text-properties style:font-name="Droid Sans Mono" fo:color="#BBBEBF" fo:font-size="10.5pt" style:font-size-asian="10.5pt" fo:background-color="#121314"/>
    </style:style>
    <style:style style:name="P36" style:parent-style-name="Standard" style:family="paragraph">
      <style:paragraph-properties style:line-height-at-least="0.1979in"/>
    </style:style>
    <style:style style:name="T37" style:parent-style-name="DefaultParagraphFont" style:family="text">
      <style:text-properties style:font-name="Droid Sans Mono" fo:color="#C9D1D9" fo:font-size="10.5pt" style:font-size-asian="10.5pt" fo:background-color="#121314"/>
    </style:style>
    <style:style style:name="T38" style:parent-style-name="DefaultParagraphFont" style:family="text">
      <style:text-properties style:font-name="Droid Sans Mono" fo:color="#BBBEBF" fo:font-size="10.5pt" style:font-size-asian="10.5pt" fo:background-color="#121314"/>
    </style:style>
    <style:style style:name="T39" style:parent-style-name="DefaultParagraphFont" style:family="text">
      <style:text-properties style:font-name="Droid Sans Mono" fo:color="#A5D6FF" fo:font-size="10.5pt" style:font-size-asian="10.5pt" fo:background-color="#121314"/>
    </style:style>
    <style:style style:name="T40" style:parent-style-name="DefaultParagraphFont" style:family="text">
      <style:text-properties style:font-name="Droid Sans Mono" fo:color="#BBBEBF" fo:font-size="10.5pt" style:font-size-asian="10.5pt" fo:background-color="#121314"/>
    </style:style>
    <style:style style:name="T41" style:parent-style-name="DefaultParagraphFont" style:family="text">
      <style:text-properties style:font-name="Droid Sans Mono" fo:color="#D4D4D4" fo:font-size="10.5pt" style:font-size-asian="10.5pt" fo:background-color="#121314"/>
    </style:style>
    <style:style style:name="T42" style:parent-style-name="DefaultParagraphFont" style:family="text">
      <style:text-properties style:font-name="Droid Sans Mono" fo:color="#BBBEBF" fo:font-size="10.5pt" style:font-size-asian="10.5pt" fo:background-color="#121314"/>
    </style:style>
    <style:style style:name="T43" style:parent-style-name="DefaultParagraphFont" style:family="text">
      <style:text-properties style:font-name="Droid Sans Mono" fo:color="#FFA657" fo:font-size="10.5pt" style:font-size-asian="10.5pt" fo:background-color="#121314"/>
    </style:style>
    <style:style style:name="T44" style:parent-style-name="DefaultParagraphFont" style:family="text">
      <style:text-properties style:font-name="Droid Sans Mono" fo:color="#BBBEBF" fo:font-size="10.5pt" style:font-size-asian="10.5pt" fo:background-color="#121314"/>
    </style:style>
    <style:style style:name="T45" style:parent-style-name="DefaultParagraphFont" style:family="text">
      <style:text-properties style:font-name="Droid Sans Mono" fo:color="#D2A8FF" fo:font-size="10.5pt" style:font-size-asian="10.5pt" fo:background-color="#121314"/>
    </style:style>
    <style:style style:name="T46" style:parent-style-name="DefaultParagraphFont" style:family="text">
      <style:text-properties style:font-name="Droid Sans Mono" fo:color="#BBBEBF" fo:font-size="10.5pt" style:font-size-asian="10.5pt" fo:background-color="#121314"/>
    </style:style>
    <style:style style:name="T47" style:parent-style-name="DefaultParagraphFont" style:family="text">
      <style:text-properties style:font-name="Droid Sans Mono" fo:color="#A5D6FF" fo:font-size="10.5pt" style:font-size-asian="10.5pt" fo:background-color="#121314"/>
    </style:style>
    <style:style style:name="T48" style:parent-style-name="DefaultParagraphFont" style:family="text">
      <style:text-properties style:font-name="Droid Sans Mono" fo:color="#BBBEBF" fo:font-size="10.5pt" style:font-size-asian="10.5pt" fo:background-color="#121314"/>
    </style:style>
    <style:style style:name="T49" style:parent-style-name="DefaultParagraphFont" style:family="text">
      <style:text-properties style:font-name="Droid Sans Mono" fo:color="#B5CEA8" fo:font-size="10.5pt" style:font-size-asian="10.5pt" fo:background-color="#121314"/>
    </style:style>
    <style:style style:name="T50" style:parent-style-name="DefaultParagraphFont" style:family="text">
      <style:text-properties style:font-name="Droid Sans Mono" fo:color="#BBBEBF" fo:font-size="10.5pt" style:font-size-asian="10.5pt" fo:background-color="#121314"/>
    </style:style>
    <style:style style:name="T51" style:parent-style-name="DefaultParagraphFont" style:family="text">
      <style:text-properties style:font-name="Droid Sans Mono" fo:color="#B5CEA8" fo:font-size="10.5pt" style:font-size-asian="10.5pt" fo:background-color="#121314"/>
    </style:style>
    <style:style style:name="T52" style:parent-style-name="DefaultParagraphFont" style:family="text">
      <style:text-properties style:font-name="Droid Sans Mono" fo:color="#BBBEBF" fo:font-size="10.5pt" style:font-size-asian="10.5pt" fo:background-color="#121314"/>
    </style:style>
    <style:style style:name="P53" style:parent-style-name="Standard" style:family="paragraph">
      <style:paragraph-properties style:line-height-at-least="0.1979in"/>
    </style:style>
    <style:style style:name="T54" style:parent-style-name="DefaultParagraphFont" style:family="text">
      <style:text-properties style:font-name="Droid Sans Mono" fo:color="#C9D1D9" fo:font-size="10.5pt" style:font-size-asian="10.5pt" fo:background-color="#121314"/>
    </style:style>
    <style:style style:name="T55" style:parent-style-name="DefaultParagraphFont" style:family="text">
      <style:text-properties style:font-name="Droid Sans Mono" fo:color="#BBBEBF" fo:font-size="10.5pt" style:font-size-asian="10.5pt" fo:background-color="#121314"/>
    </style:style>
    <style:style style:name="T56" style:parent-style-name="DefaultParagraphFont" style:family="text">
      <style:text-properties style:font-name="Droid Sans Mono" fo:color="#A5D6FF" fo:font-size="10.5pt" style:font-size-asian="10.5pt" fo:background-color="#121314"/>
    </style:style>
    <style:style style:name="T57" style:parent-style-name="DefaultParagraphFont" style:family="text">
      <style:text-properties style:font-name="Droid Sans Mono" fo:color="#BBBEBF" fo:font-size="10.5pt" style:font-size-asian="10.5pt" fo:background-color="#121314"/>
    </style:style>
    <style:style style:name="T58" style:parent-style-name="DefaultParagraphFont" style:family="text">
      <style:text-properties style:font-name="Droid Sans Mono" fo:color="#D4D4D4" fo:font-size="10.5pt" style:font-size-asian="10.5pt" fo:background-color="#121314"/>
    </style:style>
    <style:style style:name="T59" style:parent-style-name="DefaultParagraphFont" style:family="text">
      <style:text-properties style:font-name="Droid Sans Mono" fo:color="#BBBEBF" fo:font-size="10.5pt" style:font-size-asian="10.5pt" fo:background-color="#121314"/>
    </style:style>
    <style:style style:name="T60" style:parent-style-name="DefaultParagraphFont" style:family="text">
      <style:text-properties style:font-name="Droid Sans Mono" fo:color="#FFA657" fo:font-size="10.5pt" style:font-size-asian="10.5pt" fo:background-color="#121314"/>
    </style:style>
    <style:style style:name="T61" style:parent-style-name="DefaultParagraphFont" style:family="text">
      <style:text-properties style:font-name="Droid Sans Mono" fo:color="#BBBEBF" fo:font-size="10.5pt" style:font-size-asian="10.5pt" fo:background-color="#121314"/>
    </style:style>
    <style:style style:name="T62" style:parent-style-name="DefaultParagraphFont" style:family="text">
      <style:text-properties style:font-name="Droid Sans Mono" fo:color="#D2A8FF" fo:font-size="10.5pt" style:font-size-asian="10.5pt" fo:background-color="#121314"/>
    </style:style>
    <style:style style:name="T63" style:parent-style-name="DefaultParagraphFont" style:family="text">
      <style:text-properties style:font-name="Droid Sans Mono" fo:color="#BBBEBF" fo:font-size="10.5pt" style:font-size-asian="10.5pt" fo:background-color="#121314"/>
    </style:style>
    <style:style style:name="T64" style:parent-style-name="DefaultParagraphFont" style:family="text">
      <style:text-properties style:font-name="Droid Sans Mono" fo:color="#A5D6FF" fo:font-size="10.5pt" style:font-size-asian="10.5pt" fo:background-color="#121314"/>
    </style:style>
    <style:style style:name="T65" style:parent-style-name="DefaultParagraphFont" style:family="text">
      <style:text-properties style:font-name="Droid Sans Mono" fo:color="#BBBEBF" fo:font-size="10.5pt" style:font-size-asian="10.5pt" fo:background-color="#121314"/>
    </style:style>
    <style:style style:name="T66" style:parent-style-name="DefaultParagraphFont" style:family="text">
      <style:text-properties style:font-name="Droid Sans Mono" fo:color="#B5CEA8" fo:font-size="10.5pt" style:font-size-asian="10.5pt" fo:background-color="#121314"/>
    </style:style>
    <style:style style:name="T67" style:parent-style-name="DefaultParagraphFont" style:family="text">
      <style:text-properties style:font-name="Droid Sans Mono" fo:color="#BBBEBF" fo:font-size="10.5pt" style:font-size-asian="10.5pt" fo:background-color="#121314"/>
    </style:style>
    <style:style style:name="T68" style:parent-style-name="DefaultParagraphFont" style:family="text">
      <style:text-properties style:font-name="Droid Sans Mono" fo:color="#B5CEA8" fo:font-size="10.5pt" style:font-size-asian="10.5pt" fo:background-color="#121314"/>
    </style:style>
    <style:style style:name="T69" style:parent-style-name="DefaultParagraphFont" style:family="text">
      <style:text-properties style:font-name="Droid Sans Mono" fo:color="#BBBEBF" fo:font-size="10.5pt" style:font-size-asian="10.5pt" fo:background-color="#121314"/>
    </style:style>
    <style:style style:name="T70" style:parent-style-name="DefaultParagraphFont" style:family="text">
      <style:text-properties style:font-name="Droid Sans Mono" fo:color="#FFA657" fo:font-size="10.5pt" style:font-size-asian="10.5pt" fo:background-color="#121314"/>
    </style:style>
    <style:style style:name="T71" style:parent-style-name="DefaultParagraphFont" style:family="text">
      <style:text-properties style:font-name="Droid Sans Mono" fo:color="#D4D4D4" fo:font-size="10.5pt" style:font-size-asian="10.5pt" fo:background-color="#121314"/>
    </style:style>
    <style:style style:name="T72" style:parent-style-name="DefaultParagraphFont" style:family="text">
      <style:text-properties style:font-name="Droid Sans Mono" fo:color="#569CD6" fo:font-size="10.5pt" style:font-size-asian="10.5pt" fo:background-color="#121314"/>
    </style:style>
    <style:style style:name="T73" style:parent-style-name="DefaultParagraphFont" style:family="text">
      <style:text-properties style:font-name="Droid Sans Mono" fo:color="#BBBEBF" fo:font-size="10.5pt" style:font-size-asian="10.5pt" fo:background-color="#121314"/>
    </style:style>
    <style:style style:name="T74" style:parent-style-name="DefaultParagraphFont" style:family="text">
      <style:text-properties style:font-name="Droid Sans Mono" fo:color="#FF7B72" fo:font-size="10.5pt" style:font-size-asian="10.5pt" fo:background-color="#121314"/>
    </style:style>
    <style:style style:name="T75" style:parent-style-name="DefaultParagraphFont" style:family="text">
      <style:text-properties style:font-name="Droid Sans Mono" fo:color="#BBBEBF" fo:font-size="10.5pt" style:font-size-asian="10.5pt" fo:background-color="#121314"/>
    </style:style>
    <style:style style:name="T76" style:parent-style-name="DefaultParagraphFont" style:family="text">
      <style:text-properties style:font-name="Droid Sans Mono" fo:color="#D2A8FF" fo:font-size="10.5pt" style:font-size-asian="10.5pt" fo:background-color="#121314"/>
    </style:style>
    <style:style style:name="T77" style:parent-style-name="DefaultParagraphFont" style:family="text">
      <style:text-properties style:font-name="Droid Sans Mono" fo:color="#BBBEBF" fo:font-size="10.5pt" style:font-size-asian="10.5pt" fo:background-color="#121314"/>
    </style:style>
    <style:style style:name="T78" style:parent-style-name="DefaultParagraphFont" style:family="text">
      <style:text-properties style:font-name="Droid Sans Mono" fo:color="#C9D1D9" fo:font-size="10.5pt" style:font-size-asian="10.5pt" fo:background-color="#121314"/>
    </style:style>
    <style:style style:name="T79" style:parent-style-name="DefaultParagraphFont" style:family="text">
      <style:text-properties style:font-name="Droid Sans Mono" fo:color="#BBBEBF" fo:font-size="10.5pt" style:font-size-asian="10.5pt" fo:background-color="#121314"/>
    </style:style>
    <style:style style:name="T80" style:parent-style-name="DefaultParagraphFont" style:family="text">
      <style:text-properties style:font-name="Droid Sans Mono" fo:color="#FFA657" fo:font-size="10.5pt" style:font-size-asian="10.5pt" fo:background-color="#121314"/>
    </style:style>
    <style:style style:name="T81" style:parent-style-name="DefaultParagraphFont" style:family="text">
      <style:text-properties style:font-name="Droid Sans Mono" fo:color="#BBBEBF" fo:font-size="10.5pt" style:font-size-asian="10.5pt" fo:background-color="#121314"/>
    </style:style>
    <style:style style:name="T82" style:parent-style-name="DefaultParagraphFont" style:family="text">
      <style:text-properties style:font-name="Droid Sans Mono" fo:color="#4EC9B0" fo:font-size="10.5pt" style:font-size-asian="10.5pt" fo:background-color="#121314"/>
    </style:style>
    <style:style style:name="T83" style:parent-style-name="DefaultParagraphFont" style:family="text">
      <style:text-properties style:font-name="Droid Sans Mono" fo:color="#BBBEBF" fo:font-size="10.5pt" style:font-size-asian="10.5pt" fo:background-color="#121314"/>
    </style:style>
    <style:style style:name="T84" style:parent-style-name="DefaultParagraphFont" style:family="text">
      <style:text-properties style:font-name="Droid Sans Mono" fo:color="#4EC9B0" fo:font-size="10.5pt" style:font-size-asian="10.5pt" fo:background-color="#121314"/>
    </style:style>
    <style:style style:name="T85" style:parent-style-name="DefaultParagraphFont" style:family="text">
      <style:text-properties style:font-name="Droid Sans Mono" fo:color="#BBBEBF" fo:font-size="10.5pt" style:font-size-asian="10.5pt" fo:background-color="#121314"/>
    </style:style>
    <style:style style:name="T86" style:parent-style-name="DefaultParagraphFont" style:family="text">
      <style:text-properties style:font-name="Droid Sans Mono" fo:color="#4EC9B0" fo:font-size="10.5pt" style:font-size-asian="10.5pt" fo:background-color="#121314"/>
    </style:style>
    <style:style style:name="T87" style:parent-style-name="DefaultParagraphFont" style:family="text">
      <style:text-properties style:font-name="Droid Sans Mono" fo:color="#BBBEBF" fo:font-size="10.5pt" style:font-size-asian="10.5pt" fo:background-color="#121314"/>
    </style:style>
    <style:style style:name="T88" style:parent-style-name="DefaultParagraphFont" style:family="text">
      <style:text-properties style:font-name="Droid Sans Mono" fo:color="#4EC9B0" fo:font-size="10.5pt" style:font-size-asian="10.5pt" fo:background-color="#121314"/>
    </style:style>
    <style:style style:name="T89" style:parent-style-name="DefaultParagraphFont" style:family="text">
      <style:text-properties style:font-name="Droid Sans Mono" fo:color="#BBBEBF" fo:font-size="10.5pt" style:font-size-asian="10.5pt" fo:background-color="#121314"/>
    </style:style>
    <style:style style:name="T90" style:parent-style-name="DefaultParagraphFont" style:family="text">
      <style:text-properties style:font-name="Droid Sans Mono" fo:color="#4EC9B0" fo:font-size="10.5pt" style:font-size-asian="10.5pt" fo:background-color="#121314"/>
    </style:style>
    <style:style style:name="T91" style:parent-style-name="DefaultParagraphFont" style:family="text">
      <style:text-properties style:font-name="Droid Sans Mono" fo:color="#BBBEBF" fo:font-size="10.5pt" style:font-size-asian="10.5pt" fo:background-color="#121314"/>
    </style:style>
    <style:style style:name="T92" style:parent-style-name="DefaultParagraphFont" style:family="text">
      <style:text-properties style:font-name="Droid Sans Mono" fo:color="#4EC9B0" fo:font-size="10.5pt" style:font-size-asian="10.5pt" fo:background-color="#121314"/>
    </style:style>
    <style:style style:name="T93" style:parent-style-name="DefaultParagraphFont" style:family="text">
      <style:text-properties style:font-name="Droid Sans Mono" fo:color="#BBBEBF" fo:font-size="10.5pt" style:font-size-asian="10.5pt" fo:background-color="#121314"/>
    </style:style>
    <style:style style:name="T94" style:parent-style-name="DefaultParagraphFont" style:family="text">
      <style:text-properties style:font-name="Droid Sans Mono" fo:color="#4EC9B0" fo:font-size="10.5pt" style:font-size-asian="10.5pt" fo:background-color="#121314"/>
    </style:style>
    <style:style style:name="T95" style:parent-style-name="DefaultParagraphFont" style:family="text">
      <style:text-properties style:font-name="Droid Sans Mono" fo:color="#BBBEBF" fo:font-size="10.5pt" style:font-size-asian="10.5pt" fo:background-color="#121314"/>
    </style:style>
    <style:style style:name="T96" style:parent-style-name="DefaultParagraphFont" style:family="text">
      <style:text-properties style:font-name="Droid Sans Mono" fo:color="#4EC9B0" fo:font-size="10.5pt" style:font-size-asian="10.5pt" fo:background-color="#121314"/>
    </style:style>
    <style:style style:name="T97" style:parent-style-name="DefaultParagraphFont" style:family="text">
      <style:text-properties style:font-name="Droid Sans Mono" fo:color="#BBBEBF" fo:font-size="10.5pt" style:font-size-asian="10.5pt" fo:background-color="#121314"/>
    </style:style>
    <style:style style:name="P98" style:parent-style-name="Standard" style:family="paragraph">
      <style:paragraph-properties style:line-height-at-least="0.1979in"/>
    </style:style>
    <style:style style:name="T99" style:parent-style-name="DefaultParagraphFont" style:family="text">
      <style:text-properties style:font-name="Droid Sans Mono" fo:color="#C9D1D9" fo:font-size="10.5pt" style:font-size-asian="10.5pt" fo:background-color="#121314"/>
    </style:style>
    <style:style style:name="T100" style:parent-style-name="DefaultParagraphFont" style:family="text">
      <style:text-properties style:font-name="Droid Sans Mono" fo:color="#BBBEBF" fo:font-size="10.5pt" style:font-size-asian="10.5pt" fo:background-color="#121314"/>
    </style:style>
    <style:style style:name="T101" style:parent-style-name="DefaultParagraphFont" style:family="text">
      <style:text-properties style:font-name="Droid Sans Mono" fo:color="#D4D4D4" fo:font-size="10.5pt" style:font-size-asian="10.5pt" fo:background-color="#121314"/>
    </style:style>
    <style:style style:name="T102" style:parent-style-name="DefaultParagraphFont" style:family="text">
      <style:text-properties style:font-name="Droid Sans Mono" fo:color="#BBBEBF" fo:font-size="10.5pt" style:font-size-asian="10.5pt" fo:background-color="#121314"/>
    </style:style>
    <style:style style:name="T103" style:parent-style-name="DefaultParagraphFont" style:family="text">
      <style:text-properties style:font-name="Droid Sans Mono" fo:color="#B5CEA8" fo:font-size="10.5pt" style:font-size-asian="10.5pt" fo:background-color="#121314"/>
    </style:style>
    <style:style style:name="T104" style:parent-style-name="DefaultParagraphFont" style:family="text">
      <style:text-properties style:font-name="Droid Sans Mono" fo:color="#BBBEBF" fo:font-size="10.5pt" style:font-size-asian="10.5pt" fo:background-color="#121314"/>
    </style:style>
    <style:style style:name="T105" style:parent-style-name="DefaultParagraphFont" style:family="text">
      <style:text-properties style:font-name="Droid Sans Mono" fo:color="#D4D4D4" fo:font-size="10.5pt" style:font-size-asian="10.5pt" fo:background-color="#121314"/>
    </style:style>
    <style:style style:name="T106" style:parent-style-name="DefaultParagraphFont" style:family="text">
      <style:text-properties style:font-name="Droid Sans Mono" fo:color="#BBBEBF" fo:font-size="10.5pt" style:font-size-asian="10.5pt" fo:background-color="#121314"/>
    </style:style>
    <style:style style:name="T107" style:parent-style-name="DefaultParagraphFont" style:family="text">
      <style:text-properties style:font-name="Droid Sans Mono" fo:color="#4EC9B0" fo:font-size="10.5pt" style:font-size-asian="10.5pt" fo:background-color="#121314"/>
    </style:style>
    <style:style style:name="T108" style:parent-style-name="DefaultParagraphFont" style:family="text">
      <style:text-properties style:font-name="Droid Sans Mono" fo:color="#BBBEBF" fo:font-size="10.5pt" style:font-size-asian="10.5pt" fo:background-color="#121314"/>
    </style:style>
    <style:style style:name="T109" style:parent-style-name="DefaultParagraphFont" style:family="text">
      <style:text-properties style:font-name="Droid Sans Mono" fo:color="#C9D1D9" fo:font-size="10.5pt" style:font-size-asian="10.5pt" fo:background-color="#121314"/>
    </style:style>
    <style:style style:name="T110" style:parent-style-name="DefaultParagraphFont" style:family="text">
      <style:text-properties style:font-name="Droid Sans Mono" fo:color="#BBBEBF" fo:font-size="10.5pt" style:font-size-asian="10.5pt" fo:background-color="#121314"/>
    </style:style>
    <style:style style:name="T111" style:parent-style-name="DefaultParagraphFont" style:family="text">
      <style:text-properties style:font-name="Droid Sans Mono" fo:color="#D4D4D4" fo:font-size="10.5pt" style:font-size-asian="10.5pt" fo:background-color="#121314"/>
    </style:style>
    <style:style style:name="T112" style:parent-style-name="DefaultParagraphFont" style:family="text">
      <style:text-properties style:font-name="Droid Sans Mono" fo:color="#BBBEBF" fo:font-size="10.5pt" style:font-size-asian="10.5pt" fo:background-color="#121314"/>
    </style:style>
    <style:style style:name="T113" style:parent-style-name="DefaultParagraphFont" style:family="text">
      <style:text-properties style:font-name="Droid Sans Mono" fo:color="#C9D1D9" fo:font-size="10.5pt" style:font-size-asian="10.5pt" fo:background-color="#121314"/>
    </style:style>
    <style:style style:name="T114" style:parent-style-name="DefaultParagraphFont" style:family="text">
      <style:text-properties style:font-name="Droid Sans Mono" fo:color="#BBBEBF" fo:font-size="10.5pt" style:font-size-asian="10.5pt" fo:background-color="#121314"/>
    </style:style>
    <style:style style:name="T115" style:parent-style-name="DefaultParagraphFont" style:family="text">
      <style:text-properties style:font-name="Droid Sans Mono" fo:color="#C9D1D9" fo:font-size="10.5pt" style:font-size-asian="10.5pt" fo:background-color="#121314"/>
    </style:style>
    <style:style style:name="P116" style:parent-style-name="Standard" style:family="paragraph">
      <style:paragraph-properties style:line-height-at-least="0.1979in"/>
    </style:style>
    <style:style style:name="T117" style:parent-style-name="DefaultParagraphFont" style:family="text">
      <style:text-properties style:font-name="Droid Sans Mono" fo:color="#C9D1D9" fo:font-size="10.5pt" style:font-size-asian="10.5pt" fo:background-color="#121314"/>
    </style:style>
    <style:style style:name="T118" style:parent-style-name="DefaultParagraphFont" style:family="text">
      <style:text-properties style:font-name="Droid Sans Mono" fo:color="#BBBEBF" fo:font-size="10.5pt" style:font-size-asian="10.5pt" fo:background-color="#121314"/>
    </style:style>
    <style:style style:name="T119" style:parent-style-name="DefaultParagraphFont" style:family="text">
      <style:text-properties style:font-name="Droid Sans Mono" fo:color="#D4D4D4" fo:font-size="10.5pt" style:font-size-asian="10.5pt" fo:background-color="#121314"/>
    </style:style>
    <style:style style:name="T120" style:parent-style-name="DefaultParagraphFont" style:family="text">
      <style:text-properties style:font-name="Droid Sans Mono" fo:color="#BBBEBF" fo:font-size="10.5pt" style:font-size-asian="10.5pt" fo:background-color="#121314"/>
    </style:style>
    <style:style style:name="T121" style:parent-style-name="DefaultParagraphFont" style:family="text">
      <style:text-properties style:font-name="Droid Sans Mono" fo:color="#B5CEA8" fo:font-size="10.5pt" style:font-size-asian="10.5pt" fo:background-color="#121314"/>
    </style:style>
    <style:style style:name="T122" style:parent-style-name="DefaultParagraphFont" style:family="text">
      <style:text-properties style:font-name="Droid Sans Mono" fo:color="#BBBEBF" fo:font-size="10.5pt" style:font-size-asian="10.5pt" fo:background-color="#121314"/>
    </style:style>
    <style:style style:name="T123" style:parent-style-name="DefaultParagraphFont" style:family="text">
      <style:text-properties style:font-name="Droid Sans Mono" fo:color="#D4D4D4" fo:font-size="10.5pt" style:font-size-asian="10.5pt" fo:background-color="#121314"/>
    </style:style>
    <style:style style:name="T124" style:parent-style-name="DefaultParagraphFont" style:family="text">
      <style:text-properties style:font-name="Droid Sans Mono" fo:color="#BBBEBF" fo:font-size="10.5pt" style:font-size-asian="10.5pt" fo:background-color="#121314"/>
    </style:style>
    <style:style style:name="T125" style:parent-style-name="DefaultParagraphFont" style:family="text">
      <style:text-properties style:font-name="Droid Sans Mono" fo:color="#4EC9B0" fo:font-size="10.5pt" style:font-size-asian="10.5pt" fo:background-color="#121314"/>
    </style:style>
    <style:style style:name="T126" style:parent-style-name="DefaultParagraphFont" style:family="text">
      <style:text-properties style:font-name="Droid Sans Mono" fo:color="#BBBEBF" fo:font-size="10.5pt" style:font-size-asian="10.5pt" fo:background-color="#121314"/>
    </style:style>
    <style:style style:name="T127" style:parent-style-name="DefaultParagraphFont" style:family="text">
      <style:text-properties style:font-name="Droid Sans Mono" fo:color="#C9D1D9" fo:font-size="10.5pt" style:font-size-asian="10.5pt" fo:background-color="#121314"/>
    </style:style>
    <style:style style:name="T128" style:parent-style-name="DefaultParagraphFont" style:family="text">
      <style:text-properties style:font-name="Droid Sans Mono" fo:color="#BBBEBF" fo:font-size="10.5pt" style:font-size-asian="10.5pt" fo:background-color="#121314"/>
    </style:style>
    <style:style style:name="T129" style:parent-style-name="DefaultParagraphFont" style:family="text">
      <style:text-properties style:font-name="Droid Sans Mono" fo:color="#D4D4D4" fo:font-size="10.5pt" style:font-size-asian="10.5pt" fo:background-color="#121314"/>
    </style:style>
    <style:style style:name="T130" style:parent-style-name="DefaultParagraphFont" style:family="text">
      <style:text-properties style:font-name="Droid Sans Mono" fo:color="#BBBEBF" fo:font-size="10.5pt" style:font-size-asian="10.5pt" fo:background-color="#121314"/>
    </style:style>
    <style:style style:name="T131" style:parent-style-name="DefaultParagraphFont" style:family="text">
      <style:text-properties style:font-name="Droid Sans Mono" fo:color="#C9D1D9" fo:font-size="10.5pt" style:font-size-asian="10.5pt" fo:background-color="#121314"/>
    </style:style>
    <style:style style:name="T132" style:parent-style-name="DefaultParagraphFont" style:family="text">
      <style:text-properties style:font-name="Droid Sans Mono" fo:color="#BBBEBF" fo:font-size="10.5pt" style:font-size-asian="10.5pt" fo:background-color="#121314"/>
    </style:style>
    <style:style style:name="T133" style:parent-style-name="DefaultParagraphFont" style:family="text">
      <style:text-properties style:font-name="Droid Sans Mono" fo:color="#C9D1D9" fo:font-size="10.5pt" style:font-size-asian="10.5pt" fo:background-color="#121314"/>
    </style:style>
    <style:style style:name="P134" style:parent-style-name="Standard" style:family="paragraph">
      <style:paragraph-properties style:line-height-at-least="0.1979in"/>
    </style:style>
    <style:style style:name="T135" style:parent-style-name="DefaultParagraphFont" style:family="text">
      <style:text-properties style:font-name="Droid Sans Mono" fo:color="#C9D1D9" fo:font-size="10.5pt" style:font-size-asian="10.5pt" fo:background-color="#121314"/>
    </style:style>
    <style:style style:name="T136" style:parent-style-name="DefaultParagraphFont" style:family="text">
      <style:text-properties style:font-name="Droid Sans Mono" fo:color="#BBBEBF" fo:font-size="10.5pt" style:font-size-asian="10.5pt" fo:background-color="#121314"/>
    </style:style>
    <style:style style:name="T137" style:parent-style-name="DefaultParagraphFont" style:family="text">
      <style:text-properties style:font-name="Droid Sans Mono" fo:color="#D4D4D4" fo:font-size="10.5pt" style:font-size-asian="10.5pt" fo:background-color="#121314"/>
    </style:style>
    <style:style style:name="T138" style:parent-style-name="DefaultParagraphFont" style:family="text">
      <style:text-properties style:font-name="Droid Sans Mono" fo:color="#BBBEBF" fo:font-size="10.5pt" style:font-size-asian="10.5pt" fo:background-color="#121314"/>
    </style:style>
    <style:style style:name="T139" style:parent-style-name="DefaultParagraphFont" style:family="text">
      <style:text-properties style:font-name="Droid Sans Mono" fo:color="#B5CEA8" fo:font-size="10.5pt" style:font-size-asian="10.5pt" fo:background-color="#121314"/>
    </style:style>
    <style:style style:name="T140" style:parent-style-name="DefaultParagraphFont" style:family="text">
      <style:text-properties style:font-name="Droid Sans Mono" fo:color="#BBBEBF" fo:font-size="10.5pt" style:font-size-asian="10.5pt" fo:background-color="#121314"/>
    </style:style>
    <style:style style:name="T141" style:parent-style-name="DefaultParagraphFont" style:family="text">
      <style:text-properties style:font-name="Droid Sans Mono" fo:color="#D4D4D4" fo:font-size="10.5pt" style:font-size-asian="10.5pt" fo:background-color="#121314"/>
    </style:style>
    <style:style style:name="T142" style:parent-style-name="DefaultParagraphFont" style:family="text">
      <style:text-properties style:font-name="Droid Sans Mono" fo:color="#BBBEBF" fo:font-size="10.5pt" style:font-size-asian="10.5pt" fo:background-color="#121314"/>
    </style:style>
    <style:style style:name="T143" style:parent-style-name="DefaultParagraphFont" style:family="text">
      <style:text-properties style:font-name="Droid Sans Mono" fo:color="#4EC9B0" fo:font-size="10.5pt" style:font-size-asian="10.5pt" fo:background-color="#121314"/>
    </style:style>
    <style:style style:name="T144" style:parent-style-name="DefaultParagraphFont" style:family="text">
      <style:text-properties style:font-name="Droid Sans Mono" fo:color="#BBBEBF" fo:font-size="10.5pt" style:font-size-asian="10.5pt" fo:background-color="#121314"/>
    </style:style>
    <style:style style:name="T145" style:parent-style-name="DefaultParagraphFont" style:family="text">
      <style:text-properties style:font-name="Droid Sans Mono" fo:color="#C9D1D9" fo:font-size="10.5pt" style:font-size-asian="10.5pt" fo:background-color="#121314"/>
    </style:style>
    <style:style style:name="T146" style:parent-style-name="DefaultParagraphFont" style:family="text">
      <style:text-properties style:font-name="Droid Sans Mono" fo:color="#BBBEBF" fo:font-size="10.5pt" style:font-size-asian="10.5pt" fo:background-color="#121314"/>
    </style:style>
    <style:style style:name="T147" style:parent-style-name="DefaultParagraphFont" style:family="text">
      <style:text-properties style:font-name="Droid Sans Mono" fo:color="#D4D4D4" fo:font-size="10.5pt" style:font-size-asian="10.5pt" fo:background-color="#121314"/>
    </style:style>
    <style:style style:name="T148" style:parent-style-name="DefaultParagraphFont" style:family="text">
      <style:text-properties style:font-name="Droid Sans Mono" fo:color="#BBBEBF" fo:font-size="10.5pt" style:font-size-asian="10.5pt" fo:background-color="#121314"/>
    </style:style>
    <style:style style:name="T149" style:parent-style-name="DefaultParagraphFont" style:family="text">
      <style:text-properties style:font-name="Droid Sans Mono" fo:color="#C9D1D9" fo:font-size="10.5pt" style:font-size-asian="10.5pt" fo:background-color="#121314"/>
    </style:style>
    <style:style style:name="T150" style:parent-style-name="DefaultParagraphFont" style:family="text">
      <style:text-properties style:font-name="Droid Sans Mono" fo:color="#BBBEBF" fo:font-size="10.5pt" style:font-size-asian="10.5pt" fo:background-color="#121314"/>
    </style:style>
    <style:style style:name="T151" style:parent-style-name="DefaultParagraphFont" style:family="text">
      <style:text-properties style:font-name="Droid Sans Mono" fo:color="#C9D1D9" fo:font-size="10.5pt" style:font-size-asian="10.5pt" fo:background-color="#121314"/>
    </style:style>
    <style:style style:name="P152" style:parent-style-name="Standard" style:family="paragraph">
      <style:paragraph-properties style:line-height-at-least="0.1979in"/>
    </style:style>
    <style:style style:name="T153" style:parent-style-name="DefaultParagraphFont" style:family="text">
      <style:text-properties style:font-name="Droid Sans Mono" fo:color="#C9D1D9" fo:font-size="10.5pt" style:font-size-asian="10.5pt" fo:background-color="#121314"/>
    </style:style>
    <style:style style:name="T154" style:parent-style-name="DefaultParagraphFont" style:family="text">
      <style:text-properties style:font-name="Droid Sans Mono" fo:color="#BBBEBF" fo:font-size="10.5pt" style:font-size-asian="10.5pt" fo:background-color="#121314"/>
    </style:style>
    <style:style style:name="T155" style:parent-style-name="DefaultParagraphFont" style:family="text">
      <style:text-properties style:font-name="Droid Sans Mono" fo:color="#D4D4D4" fo:font-size="10.5pt" style:font-size-asian="10.5pt" fo:background-color="#121314"/>
    </style:style>
    <style:style style:name="T156" style:parent-style-name="DefaultParagraphFont" style:family="text">
      <style:text-properties style:font-name="Droid Sans Mono" fo:color="#BBBEBF" fo:font-size="10.5pt" style:font-size-asian="10.5pt" fo:background-color="#121314"/>
    </style:style>
    <style:style style:name="T157" style:parent-style-name="DefaultParagraphFont" style:family="text">
      <style:text-properties style:font-name="Droid Sans Mono" fo:color="#D4D4D4" fo:font-size="10.5pt" style:font-size-asian="10.5pt" fo:background-color="#121314"/>
    </style:style>
    <style:style style:name="T158" style:parent-style-name="DefaultParagraphFont" style:family="text">
      <style:text-properties style:font-name="Droid Sans Mono" fo:color="#B5CEA8" fo:font-size="10.5pt" style:font-size-asian="10.5pt" fo:background-color="#121314"/>
    </style:style>
    <style:style style:name="P159" style:parent-style-name="Standard" style:family="paragraph">
      <style:paragraph-properties style:line-height-at-least="0.1979in"/>
    </style:style>
    <style:style style:name="T160" style:parent-style-name="DefaultParagraphFont" style:family="text">
      <style:text-properties style:font-name="Droid Sans Mono" fo:color="#C9D1D9" fo:font-size="10.5pt" style:font-size-asian="10.5pt" fo:background-color="#121314"/>
    </style:style>
    <style:style style:name="T161" style:parent-style-name="DefaultParagraphFont" style:family="text">
      <style:text-properties style:font-name="Droid Sans Mono" fo:color="#BBBEBF" fo:font-size="10.5pt" style:font-size-asian="10.5pt" fo:background-color="#121314"/>
    </style:style>
    <style:style style:name="T162" style:parent-style-name="DefaultParagraphFont" style:family="text">
      <style:text-properties style:font-name="Droid Sans Mono" fo:color="#D4D4D4" fo:font-size="10.5pt" style:font-size-asian="10.5pt" fo:background-color="#121314"/>
    </style:style>
    <style:style style:name="T163" style:parent-style-name="DefaultParagraphFont" style:family="text">
      <style:text-properties style:font-name="Droid Sans Mono" fo:color="#BBBEBF" fo:font-size="10.5pt" style:font-size-asian="10.5pt" fo:background-color="#121314"/>
    </style:style>
    <style:style style:name="T164" style:parent-style-name="DefaultParagraphFont" style:family="text">
      <style:text-properties style:font-name="Droid Sans Mono" fo:color="#B5CEA8" fo:font-size="10.5pt" style:font-size-asian="10.5pt" fo:background-color="#121314"/>
    </style:style>
    <style:style style:name="T165" style:parent-style-name="DefaultParagraphFont" style:family="text">
      <style:text-properties style:font-name="Droid Sans Mono" fo:color="#BBBEBF" fo:font-size="10.5pt" style:font-size-asian="10.5pt" fo:background-color="#121314"/>
    </style:style>
    <style:style style:name="T166" style:parent-style-name="DefaultParagraphFont" style:family="text">
      <style:text-properties style:font-name="Droid Sans Mono" fo:color="#D4D4D4" fo:font-size="10.5pt" style:font-size-asian="10.5pt" fo:background-color="#121314"/>
    </style:style>
    <style:style style:name="T167" style:parent-style-name="DefaultParagraphFont" style:family="text">
      <style:text-properties style:font-name="Droid Sans Mono" fo:color="#BBBEBF" fo:font-size="10.5pt" style:font-size-asian="10.5pt" fo:background-color="#121314"/>
    </style:style>
    <style:style style:name="T168" style:parent-style-name="DefaultParagraphFont" style:family="text">
      <style:text-properties style:font-name="Droid Sans Mono" fo:color="#4EC9B0" fo:font-size="10.5pt" style:font-size-asian="10.5pt" fo:background-color="#121314"/>
    </style:style>
    <style:style style:name="T169" style:parent-style-name="DefaultParagraphFont" style:family="text">
      <style:text-properties style:font-name="Droid Sans Mono" fo:color="#BBBEBF" fo:font-size="10.5pt" style:font-size-asian="10.5pt" fo:background-color="#121314"/>
    </style:style>
    <style:style style:name="T170" style:parent-style-name="DefaultParagraphFont" style:family="text">
      <style:text-properties style:font-name="Droid Sans Mono" fo:color="#D2A8FF" fo:font-size="10.5pt" style:font-size-asian="10.5pt" fo:background-color="#121314"/>
    </style:style>
    <style:style style:name="T171" style:parent-style-name="DefaultParagraphFont" style:family="text">
      <style:text-properties style:font-name="Droid Sans Mono" fo:color="#BBBEBF" fo:font-size="10.5pt" style:font-size-asian="10.5pt" fo:background-color="#121314"/>
    </style:style>
    <style:style style:name="T172" style:parent-style-name="DefaultParagraphFont" style:family="text">
      <style:text-properties style:font-name="Droid Sans Mono" fo:color="#C9D1D9" fo:font-size="10.5pt" style:font-size-asian="10.5pt" fo:background-color="#121314"/>
    </style:style>
    <style:style style:name="T173" style:parent-style-name="DefaultParagraphFont" style:family="text">
      <style:text-properties style:font-name="Droid Sans Mono" fo:color="#BBBEBF" fo:font-size="10.5pt" style:font-size-asian="10.5pt" fo:background-color="#121314"/>
    </style:style>
    <style:style style:name="T174" style:parent-style-name="DefaultParagraphFont" style:family="text">
      <style:text-properties style:font-name="Droid Sans Mono" fo:color="#D4D4D4" fo:font-size="10.5pt" style:font-size-asian="10.5pt" fo:background-color="#121314"/>
    </style:style>
    <style:style style:name="T175" style:parent-style-name="DefaultParagraphFont" style:family="text">
      <style:text-properties style:font-name="Droid Sans Mono" fo:color="#BBBEBF" fo:font-size="10.5pt" style:font-size-asian="10.5pt" fo:background-color="#121314"/>
    </style:style>
    <style:style style:name="T176" style:parent-style-name="DefaultParagraphFont" style:family="text">
      <style:text-properties style:font-name="Droid Sans Mono" fo:color="#FFA657" fo:font-size="10.5pt" style:font-size-asian="10.5pt" fo:background-color="#121314"/>
    </style:style>
    <style:style style:name="T177" style:parent-style-name="DefaultParagraphFont" style:family="text">
      <style:text-properties style:font-name="Droid Sans Mono" fo:color="#BBBEBF" fo:font-size="10.5pt" style:font-size-asian="10.5pt" fo:background-color="#121314"/>
    </style:style>
    <style:style style:name="P178" style:parent-style-name="Standard" style:family="paragraph">
      <style:paragraph-properties style:line-height-at-least="0.1979in"/>
    </style:style>
    <style:style style:name="T179" style:parent-style-name="DefaultParagraphFont" style:family="text">
      <style:text-properties style:font-name="Droid Sans Mono" fo:color="#C9D1D9" fo:font-size="10.5pt" style:font-size-asian="10.5pt" fo:background-color="#121314"/>
    </style:style>
    <style:style style:name="T180" style:parent-style-name="DefaultParagraphFont" style:family="text">
      <style:text-properties style:font-name="Droid Sans Mono" fo:color="#BBBEBF" fo:font-size="10.5pt" style:font-size-asian="10.5pt" fo:background-color="#121314"/>
    </style:style>
    <style:style style:name="T181" style:parent-style-name="DefaultParagraphFont" style:family="text">
      <style:text-properties style:font-name="Droid Sans Mono" fo:color="#D4D4D4" fo:font-size="10.5pt" style:font-size-asian="10.5pt" fo:background-color="#121314"/>
    </style:style>
    <style:style style:name="T182" style:parent-style-name="DefaultParagraphFont" style:family="text">
      <style:text-properties style:font-name="Droid Sans Mono" fo:color="#BBBEBF" fo:font-size="10.5pt" style:font-size-asian="10.5pt" fo:background-color="#121314"/>
    </style:style>
    <style:style style:name="T183" style:parent-style-name="DefaultParagraphFont" style:family="text">
      <style:text-properties style:font-name="Droid Sans Mono" fo:color="#B5CEA8" fo:font-size="10.5pt" style:font-size-asian="10.5pt" fo:background-color="#121314"/>
    </style:style>
    <style:style style:name="T184" style:parent-style-name="DefaultParagraphFont" style:family="text">
      <style:text-properties style:font-name="Droid Sans Mono" fo:color="#BBBEBF" fo:font-size="10.5pt" style:font-size-asian="10.5pt" fo:background-color="#121314"/>
    </style:style>
    <style:style style:name="T185" style:parent-style-name="DefaultParagraphFont" style:family="text">
      <style:text-properties style:font-name="Droid Sans Mono" fo:color="#D4D4D4" fo:font-size="10.5pt" style:font-size-asian="10.5pt" fo:background-color="#121314"/>
    </style:style>
    <style:style style:name="T186" style:parent-style-name="DefaultParagraphFont" style:family="text">
      <style:text-properties style:font-name="Droid Sans Mono" fo:color="#BBBEBF" fo:font-size="10.5pt" style:font-size-asian="10.5pt" fo:background-color="#121314"/>
    </style:style>
    <style:style style:name="T187" style:parent-style-name="DefaultParagraphFont" style:family="text">
      <style:text-properties style:font-name="Droid Sans Mono" fo:color="#4EC9B0" fo:font-size="10.5pt" style:font-size-asian="10.5pt" fo:background-color="#121314"/>
    </style:style>
    <style:style style:name="T188" style:parent-style-name="DefaultParagraphFont" style:family="text">
      <style:text-properties style:font-name="Droid Sans Mono" fo:color="#BBBEBF" fo:font-size="10.5pt" style:font-size-asian="10.5pt" fo:background-color="#121314"/>
    </style:style>
    <style:style style:name="T189" style:parent-style-name="DefaultParagraphFont" style:family="text">
      <style:text-properties style:font-name="Droid Sans Mono" fo:color="#D2A8FF" fo:font-size="10.5pt" style:font-size-asian="10.5pt" fo:background-color="#121314"/>
    </style:style>
    <style:style style:name="T190" style:parent-style-name="DefaultParagraphFont" style:family="text">
      <style:text-properties style:font-name="Droid Sans Mono" fo:color="#BBBEBF" fo:font-size="10.5pt" style:font-size-asian="10.5pt" fo:background-color="#121314"/>
    </style:style>
    <style:style style:name="T191" style:parent-style-name="DefaultParagraphFont" style:family="text">
      <style:text-properties style:font-name="Droid Sans Mono" fo:color="#C9D1D9" fo:font-size="10.5pt" style:font-size-asian="10.5pt" fo:background-color="#121314"/>
    </style:style>
    <style:style style:name="T192" style:parent-style-name="DefaultParagraphFont" style:family="text">
      <style:text-properties style:font-name="Droid Sans Mono" fo:color="#BBBEBF" fo:font-size="10.5pt" style:font-size-asian="10.5pt" fo:background-color="#121314"/>
    </style:style>
    <style:style style:name="T193" style:parent-style-name="DefaultParagraphFont" style:family="text">
      <style:text-properties style:font-name="Droid Sans Mono" fo:color="#D4D4D4" fo:font-size="10.5pt" style:font-size-asian="10.5pt" fo:background-color="#121314"/>
    </style:style>
    <style:style style:name="T194" style:parent-style-name="DefaultParagraphFont" style:family="text">
      <style:text-properties style:font-name="Droid Sans Mono" fo:color="#BBBEBF" fo:font-size="10.5pt" style:font-size-asian="10.5pt" fo:background-color="#121314"/>
    </style:style>
    <style:style style:name="T195" style:parent-style-name="DefaultParagraphFont" style:family="text">
      <style:text-properties style:font-name="Droid Sans Mono" fo:color="#FFA657" fo:font-size="10.5pt" style:font-size-asian="10.5pt" fo:background-color="#121314"/>
    </style:style>
    <style:style style:name="T196" style:parent-style-name="DefaultParagraphFont" style:family="text">
      <style:text-properties style:font-name="Droid Sans Mono" fo:color="#BBBEBF" fo:font-size="10.5pt" style:font-size-asian="10.5pt" fo:background-color="#121314"/>
    </style:style>
    <style:style style:name="P197" style:parent-style-name="Standard" style:family="paragraph">
      <style:paragraph-properties style:line-height-at-least="0.1979in"/>
    </style:style>
    <style:style style:name="T198" style:parent-style-name="DefaultParagraphFont" style:family="text">
      <style:text-properties style:font-name="Droid Sans Mono" fo:color="#C9D1D9" fo:font-size="10.5pt" style:font-size-asian="10.5pt" fo:background-color="#121314"/>
    </style:style>
    <style:style style:name="T199" style:parent-style-name="DefaultParagraphFont" style:family="text">
      <style:text-properties style:font-name="Droid Sans Mono" fo:color="#BBBEBF" fo:font-size="10.5pt" style:font-size-asian="10.5pt" fo:background-color="#121314"/>
    </style:style>
    <style:style style:name="T200" style:parent-style-name="DefaultParagraphFont" style:family="text">
      <style:text-properties style:font-name="Droid Sans Mono" fo:color="#D4D4D4" fo:font-size="10.5pt" style:font-size-asian="10.5pt" fo:background-color="#121314"/>
    </style:style>
    <style:style style:name="T201" style:parent-style-name="DefaultParagraphFont" style:family="text">
      <style:text-properties style:font-name="Droid Sans Mono" fo:color="#BBBEBF" fo:font-size="10.5pt" style:font-size-asian="10.5pt" fo:background-color="#121314"/>
    </style:style>
    <style:style style:name="T202" style:parent-style-name="DefaultParagraphFont" style:family="text">
      <style:text-properties style:font-name="Droid Sans Mono" fo:color="#B5CEA8" fo:font-size="10.5pt" style:font-size-asian="10.5pt" fo:background-color="#121314"/>
    </style:style>
    <style:style style:name="T203" style:parent-style-name="DefaultParagraphFont" style:family="text">
      <style:text-properties style:font-name="Droid Sans Mono" fo:color="#BBBEBF" fo:font-size="10.5pt" style:font-size-asian="10.5pt" fo:background-color="#121314"/>
    </style:style>
    <style:style style:name="T204" style:parent-style-name="DefaultParagraphFont" style:family="text">
      <style:text-properties style:font-name="Droid Sans Mono" fo:color="#D4D4D4" fo:font-size="10.5pt" style:font-size-asian="10.5pt" fo:background-color="#121314"/>
    </style:style>
    <style:style style:name="T205" style:parent-style-name="DefaultParagraphFont" style:family="text">
      <style:text-properties style:font-name="Droid Sans Mono" fo:color="#BBBEBF" fo:font-size="10.5pt" style:font-size-asian="10.5pt" fo:background-color="#121314"/>
    </style:style>
    <style:style style:name="T206" style:parent-style-name="DefaultParagraphFont" style:family="text">
      <style:text-properties style:font-name="Droid Sans Mono" fo:color="#4EC9B0" fo:font-size="10.5pt" style:font-size-asian="10.5pt" fo:background-color="#121314"/>
    </style:style>
    <style:style style:name="T207" style:parent-style-name="DefaultParagraphFont" style:family="text">
      <style:text-properties style:font-name="Droid Sans Mono" fo:color="#BBBEBF" fo:font-size="10.5pt" style:font-size-asian="10.5pt" fo:background-color="#121314"/>
    </style:style>
    <style:style style:name="T208" style:parent-style-name="DefaultParagraphFont" style:family="text">
      <style:text-properties style:font-name="Droid Sans Mono" fo:color="#D2A8FF" fo:font-size="10.5pt" style:font-size-asian="10.5pt" fo:background-color="#121314"/>
    </style:style>
    <style:style style:name="T209" style:parent-style-name="DefaultParagraphFont" style:family="text">
      <style:text-properties style:font-name="Droid Sans Mono" fo:color="#BBBEBF" fo:font-size="10.5pt" style:font-size-asian="10.5pt" fo:background-color="#121314"/>
    </style:style>
    <style:style style:name="T210" style:parent-style-name="DefaultParagraphFont" style:family="text">
      <style:text-properties style:font-name="Droid Sans Mono" fo:color="#C9D1D9" fo:font-size="10.5pt" style:font-size-asian="10.5pt" fo:background-color="#121314"/>
    </style:style>
    <style:style style:name="T211" style:parent-style-name="DefaultParagraphFont" style:family="text">
      <style:text-properties style:font-name="Droid Sans Mono" fo:color="#BBBEBF" fo:font-size="10.5pt" style:font-size-asian="10.5pt" fo:background-color="#121314"/>
    </style:style>
    <style:style style:name="T212" style:parent-style-name="DefaultParagraphFont" style:family="text">
      <style:text-properties style:font-name="Droid Sans Mono" fo:color="#D4D4D4" fo:font-size="10.5pt" style:font-size-asian="10.5pt" fo:background-color="#121314"/>
    </style:style>
    <style:style style:name="T213" style:parent-style-name="DefaultParagraphFont" style:family="text">
      <style:text-properties style:font-name="Droid Sans Mono" fo:color="#BBBEBF" fo:font-size="10.5pt" style:font-size-asian="10.5pt" fo:background-color="#121314"/>
    </style:style>
    <style:style style:name="T214" style:parent-style-name="DefaultParagraphFont" style:family="text">
      <style:text-properties style:font-name="Droid Sans Mono" fo:color="#FFA657" fo:font-size="10.5pt" style:font-size-asian="10.5pt" fo:background-color="#121314"/>
    </style:style>
    <style:style style:name="T215" style:parent-style-name="DefaultParagraphFont" style:family="text">
      <style:text-properties style:font-name="Droid Sans Mono" fo:color="#BBBEBF" fo:font-size="10.5pt" style:font-size-asian="10.5pt" fo:background-color="#121314"/>
    </style:style>
    <style:style style:name="T216" style:parent-style-name="DefaultParagraphFont" style:family="text">
      <style:text-properties style:font-name="Droid Sans Mono" fo:color="#D4D4D4" fo:font-size="10.5pt" style:font-size-asian="10.5pt" fo:background-color="#121314"/>
    </style:style>
    <style:style style:name="T217" style:parent-style-name="DefaultParagraphFont" style:family="text">
      <style:text-properties style:font-name="Droid Sans Mono" fo:color="#BBBEBF" fo:font-size="10.5pt" style:font-size-asian="10.5pt" fo:background-color="#121314"/>
    </style:style>
    <style:style style:name="T218" style:parent-style-name="DefaultParagraphFont" style:family="text">
      <style:text-properties style:font-name="Droid Sans Mono" fo:color="#C9D1D9" fo:font-size="10.5pt" style:font-size-asian="10.5pt" fo:background-color="#121314"/>
    </style:style>
    <style:style style:name="P219" style:parent-style-name="Standard" style:family="paragraph">
      <style:paragraph-properties style:line-height-at-least="0.1979in"/>
    </style:style>
    <style:style style:name="T220" style:parent-style-name="DefaultParagraphFont" style:family="text">
      <style:text-properties style:font-name="Droid Sans Mono" fo:color="#C9D1D9" fo:font-size="10.5pt" style:font-size-asian="10.5pt" fo:background-color="#121314"/>
    </style:style>
    <style:style style:name="T221" style:parent-style-name="DefaultParagraphFont" style:family="text">
      <style:text-properties style:font-name="Droid Sans Mono" fo:color="#BBBEBF" fo:font-size="10.5pt" style:font-size-asian="10.5pt" fo:background-color="#121314"/>
    </style:style>
    <style:style style:name="T222" style:parent-style-name="DefaultParagraphFont" style:family="text">
      <style:text-properties style:font-name="Droid Sans Mono" fo:color="#D4D4D4" fo:font-size="10.5pt" style:font-size-asian="10.5pt" fo:background-color="#121314"/>
    </style:style>
    <style:style style:name="T223" style:parent-style-name="DefaultParagraphFont" style:family="text">
      <style:text-properties style:font-name="Droid Sans Mono" fo:color="#BBBEBF" fo:font-size="10.5pt" style:font-size-asian="10.5pt" fo:background-color="#121314"/>
    </style:style>
    <style:style style:name="T224" style:parent-style-name="DefaultParagraphFont" style:family="text">
      <style:text-properties style:font-name="Droid Sans Mono" fo:color="#B5CEA8" fo:font-size="10.5pt" style:font-size-asian="10.5pt" fo:background-color="#121314"/>
    </style:style>
    <style:style style:name="T225" style:parent-style-name="DefaultParagraphFont" style:family="text">
      <style:text-properties style:font-name="Droid Sans Mono" fo:color="#BBBEBF" fo:font-size="10.5pt" style:font-size-asian="10.5pt" fo:background-color="#121314"/>
    </style:style>
    <style:style style:name="T226" style:parent-style-name="DefaultParagraphFont" style:family="text">
      <style:text-properties style:font-name="Droid Sans Mono" fo:color="#D4D4D4" fo:font-size="10.5pt" style:font-size-asian="10.5pt" fo:background-color="#121314"/>
    </style:style>
    <style:style style:name="T227" style:parent-style-name="DefaultParagraphFont" style:family="text">
      <style:text-properties style:font-name="Droid Sans Mono" fo:color="#BBBEBF" fo:font-size="10.5pt" style:font-size-asian="10.5pt" fo:background-color="#121314"/>
    </style:style>
    <style:style style:name="T228" style:parent-style-name="DefaultParagraphFont" style:family="text">
      <style:text-properties style:font-name="Droid Sans Mono" fo:color="#C9D1D9" fo:font-size="10.5pt" style:font-size-asian="10.5pt" fo:background-color="#121314"/>
    </style:style>
    <style:style style:name="T229" style:parent-style-name="DefaultParagraphFont" style:family="text">
      <style:text-properties style:font-name="Droid Sans Mono" fo:color="#BBBEBF" fo:font-size="10.5pt" style:font-size-asian="10.5pt" fo:background-color="#121314"/>
    </style:style>
    <style:style style:name="T230" style:parent-style-name="DefaultParagraphFont" style:family="text">
      <style:text-properties style:font-name="Droid Sans Mono" fo:color="#D4D4D4" fo:font-size="10.5pt" style:font-size-asian="10.5pt" fo:background-color="#121314"/>
    </style:style>
    <style:style style:name="T231" style:parent-style-name="DefaultParagraphFont" style:family="text">
      <style:text-properties style:font-name="Droid Sans Mono" fo:color="#BBBEBF" fo:font-size="10.5pt" style:font-size-asian="10.5pt" fo:background-color="#121314"/>
    </style:style>
    <style:style style:name="T232" style:parent-style-name="DefaultParagraphFont" style:family="text">
      <style:text-properties style:font-name="Droid Sans Mono" fo:color="#4EC9B0" fo:font-size="10.5pt" style:font-size-asian="10.5pt" fo:background-color="#121314"/>
    </style:style>
    <style:style style:name="T233" style:parent-style-name="DefaultParagraphFont" style:family="text">
      <style:text-properties style:font-name="Droid Sans Mono" fo:color="#BBBEBF" fo:font-size="10.5pt" style:font-size-asian="10.5pt" fo:background-color="#121314"/>
    </style:style>
    <style:style style:name="T234" style:parent-style-name="DefaultParagraphFont" style:family="text">
      <style:text-properties style:font-name="Droid Sans Mono" fo:color="#D2A8FF" fo:font-size="10.5pt" style:font-size-asian="10.5pt" fo:background-color="#121314"/>
    </style:style>
    <style:style style:name="T235" style:parent-style-name="DefaultParagraphFont" style:family="text">
      <style:text-properties style:font-name="Droid Sans Mono" fo:color="#BBBEBF" fo:font-size="10.5pt" style:font-size-asian="10.5pt" fo:background-color="#121314"/>
    </style:style>
    <style:style style:name="T236" style:parent-style-name="DefaultParagraphFont" style:family="text">
      <style:text-properties style:font-name="Droid Sans Mono" fo:color="#C9D1D9" fo:font-size="10.5pt" style:font-size-asian="10.5pt" fo:background-color="#121314"/>
    </style:style>
    <style:style style:name="T237" style:parent-style-name="DefaultParagraphFont" style:family="text">
      <style:text-properties style:font-name="Droid Sans Mono" fo:color="#BBBEBF" fo:font-size="10.5pt" style:font-size-asian="10.5pt" fo:background-color="#121314"/>
    </style:style>
    <style:style style:name="T238" style:parent-style-name="DefaultParagraphFont" style:family="text">
      <style:text-properties style:font-name="Droid Sans Mono" fo:color="#D4D4D4" fo:font-size="10.5pt" style:font-size-asian="10.5pt" fo:background-color="#121314"/>
    </style:style>
    <style:style style:name="T239" style:parent-style-name="DefaultParagraphFont" style:family="text">
      <style:text-properties style:font-name="Droid Sans Mono" fo:color="#BBBEBF" fo:font-size="10.5pt" style:font-size-asian="10.5pt" fo:background-color="#121314"/>
    </style:style>
    <style:style style:name="T240" style:parent-style-name="DefaultParagraphFont" style:family="text">
      <style:text-properties style:font-name="Droid Sans Mono" fo:color="#FFA657" fo:font-size="10.5pt" style:font-size-asian="10.5pt" fo:background-color="#121314"/>
    </style:style>
    <style:style style:name="T241" style:parent-style-name="DefaultParagraphFont" style:family="text">
      <style:text-properties style:font-name="Droid Sans Mono" fo:color="#BBBEBF" fo:font-size="10.5pt" style:font-size-asian="10.5pt" fo:background-color="#121314"/>
    </style:style>
    <style:style style:name="P242" style:parent-style-name="Standard" style:family="paragraph">
      <style:paragraph-properties style:line-height-at-least="0.1979in"/>
    </style:style>
    <style:style style:name="T243" style:parent-style-name="DefaultParagraphFont" style:family="text">
      <style:text-properties style:font-name="Droid Sans Mono" fo:color="#C9D1D9" fo:font-size="10.5pt" style:font-size-asian="10.5pt" fo:background-color="#121314"/>
    </style:style>
    <style:style style:name="T244" style:parent-style-name="DefaultParagraphFont" style:family="text">
      <style:text-properties style:font-name="Droid Sans Mono" fo:color="#BBBEBF" fo:font-size="10.5pt" style:font-size-asian="10.5pt" fo:background-color="#121314"/>
    </style:style>
    <style:style style:name="T245" style:parent-style-name="DefaultParagraphFont" style:family="text">
      <style:text-properties style:font-name="Droid Sans Mono" fo:color="#D4D4D4" fo:font-size="10.5pt" style:font-size-asian="10.5pt" fo:background-color="#121314"/>
    </style:style>
    <style:style style:name="T246" style:parent-style-name="DefaultParagraphFont" style:family="text">
      <style:text-properties style:font-name="Droid Sans Mono" fo:color="#BBBEBF" fo:font-size="10.5pt" style:font-size-asian="10.5pt" fo:background-color="#121314"/>
    </style:style>
    <style:style style:name="T247" style:parent-style-name="DefaultParagraphFont" style:family="text">
      <style:text-properties style:font-name="Droid Sans Mono" fo:color="#B5CEA8" fo:font-size="10.5pt" style:font-size-asian="10.5pt" fo:background-color="#121314"/>
    </style:style>
    <style:style style:name="T248" style:parent-style-name="DefaultParagraphFont" style:family="text">
      <style:text-properties style:font-name="Droid Sans Mono" fo:color="#BBBEBF" fo:font-size="10.5pt" style:font-size-asian="10.5pt" fo:background-color="#121314"/>
    </style:style>
    <style:style style:name="T249" style:parent-style-name="DefaultParagraphFont" style:family="text">
      <style:text-properties style:font-name="Droid Sans Mono" fo:color="#D4D4D4" fo:font-size="10.5pt" style:font-size-asian="10.5pt" fo:background-color="#121314"/>
    </style:style>
    <style:style style:name="T250" style:parent-style-name="DefaultParagraphFont" style:family="text">
      <style:text-properties style:font-name="Droid Sans Mono" fo:color="#BBBEBF" fo:font-size="10.5pt" style:font-size-asian="10.5pt" fo:background-color="#121314"/>
    </style:style>
    <style:style style:name="T251" style:parent-style-name="DefaultParagraphFont" style:family="text">
      <style:text-properties style:font-name="Droid Sans Mono" fo:color="#C9D1D9" fo:font-size="10.5pt" style:font-size-asian="10.5pt" fo:background-color="#121314"/>
    </style:style>
    <style:style style:name="T252" style:parent-style-name="DefaultParagraphFont" style:family="text">
      <style:text-properties style:font-name="Droid Sans Mono" fo:color="#BBBEBF" fo:font-size="10.5pt" style:font-size-asian="10.5pt" fo:background-color="#121314"/>
    </style:style>
    <style:style style:name="T253" style:parent-style-name="DefaultParagraphFont" style:family="text">
      <style:text-properties style:font-name="Droid Sans Mono" fo:color="#D4D4D4" fo:font-size="10.5pt" style:font-size-asian="10.5pt" fo:background-color="#121314"/>
    </style:style>
    <style:style style:name="T254" style:parent-style-name="DefaultParagraphFont" style:family="text">
      <style:text-properties style:font-name="Droid Sans Mono" fo:color="#BBBEBF" fo:font-size="10.5pt" style:font-size-asian="10.5pt" fo:background-color="#121314"/>
    </style:style>
    <style:style style:name="T255" style:parent-style-name="DefaultParagraphFont" style:family="text">
      <style:text-properties style:font-name="Droid Sans Mono" fo:color="#4EC9B0" fo:font-size="10.5pt" style:font-size-asian="10.5pt" fo:background-color="#121314"/>
    </style:style>
    <style:style style:name="T256" style:parent-style-name="DefaultParagraphFont" style:family="text">
      <style:text-properties style:font-name="Droid Sans Mono" fo:color="#BBBEBF" fo:font-size="10.5pt" style:font-size-asian="10.5pt" fo:background-color="#121314"/>
    </style:style>
    <style:style style:name="T257" style:parent-style-name="DefaultParagraphFont" style:family="text">
      <style:text-properties style:font-name="Droid Sans Mono" fo:color="#D2A8FF" fo:font-size="10.5pt" style:font-size-asian="10.5pt" fo:background-color="#121314"/>
    </style:style>
    <style:style style:name="T258" style:parent-style-name="DefaultParagraphFont" style:family="text">
      <style:text-properties style:font-name="Droid Sans Mono" fo:color="#BBBEBF" fo:font-size="10.5pt" style:font-size-asian="10.5pt" fo:background-color="#121314"/>
    </style:style>
    <style:style style:name="T259" style:parent-style-name="DefaultParagraphFont" style:family="text">
      <style:text-properties style:font-name="Droid Sans Mono" fo:color="#C9D1D9" fo:font-size="10.5pt" style:font-size-asian="10.5pt" fo:background-color="#121314"/>
    </style:style>
    <style:style style:name="T260" style:parent-style-name="DefaultParagraphFont" style:family="text">
      <style:text-properties style:font-name="Droid Sans Mono" fo:color="#BBBEBF" fo:font-size="10.5pt" style:font-size-asian="10.5pt" fo:background-color="#121314"/>
    </style:style>
    <style:style style:name="T261" style:parent-style-name="DefaultParagraphFont" style:family="text">
      <style:text-properties style:font-name="Droid Sans Mono" fo:color="#D4D4D4" fo:font-size="10.5pt" style:font-size-asian="10.5pt" fo:background-color="#121314"/>
    </style:style>
    <style:style style:name="T262" style:parent-style-name="DefaultParagraphFont" style:family="text">
      <style:text-properties style:font-name="Droid Sans Mono" fo:color="#BBBEBF" fo:font-size="10.5pt" style:font-size-asian="10.5pt" fo:background-color="#121314"/>
    </style:style>
    <style:style style:name="T263" style:parent-style-name="DefaultParagraphFont" style:family="text">
      <style:text-properties style:font-name="Droid Sans Mono" fo:color="#FFA657" fo:font-size="10.5pt" style:font-size-asian="10.5pt" fo:background-color="#121314"/>
    </style:style>
    <style:style style:name="T264" style:parent-style-name="DefaultParagraphFont" style:family="text">
      <style:text-properties style:font-name="Droid Sans Mono" fo:color="#BBBEBF" fo:font-size="10.5pt" style:font-size-asian="10.5pt" fo:background-color="#121314"/>
    </style:style>
    <style:style style:name="P265" style:parent-style-name="Standard" style:family="paragraph">
      <style:paragraph-properties style:line-height-at-least="0.1979in"/>
    </style:style>
    <style:style style:name="T266" style:parent-style-name="DefaultParagraphFont" style:family="text">
      <style:text-properties style:font-name="Droid Sans Mono" fo:color="#C9D1D9" fo:font-size="10.5pt" style:font-size-asian="10.5pt" fo:background-color="#121314"/>
    </style:style>
    <style:style style:name="T267" style:parent-style-name="DefaultParagraphFont" style:family="text">
      <style:text-properties style:font-name="Droid Sans Mono" fo:color="#BBBEBF" fo:font-size="10.5pt" style:font-size-asian="10.5pt" fo:background-color="#121314"/>
    </style:style>
    <style:style style:name="T268" style:parent-style-name="DefaultParagraphFont" style:family="text">
      <style:text-properties style:font-name="Droid Sans Mono" fo:color="#D4D4D4" fo:font-size="10.5pt" style:font-size-asian="10.5pt" fo:background-color="#121314"/>
    </style:style>
    <style:style style:name="T269" style:parent-style-name="DefaultParagraphFont" style:family="text">
      <style:text-properties style:font-name="Droid Sans Mono" fo:color="#BBBEBF" fo:font-size="10.5pt" style:font-size-asian="10.5pt" fo:background-color="#121314"/>
    </style:style>
    <style:style style:name="T270" style:parent-style-name="DefaultParagraphFont" style:family="text">
      <style:text-properties style:font-name="Droid Sans Mono" fo:color="#B5CEA8" fo:font-size="10.5pt" style:font-size-asian="10.5pt" fo:background-color="#121314"/>
    </style:style>
    <style:style style:name="T271" style:parent-style-name="DefaultParagraphFont" style:family="text">
      <style:text-properties style:font-name="Droid Sans Mono" fo:color="#BBBEBF" fo:font-size="10.5pt" style:font-size-asian="10.5pt" fo:background-color="#121314"/>
    </style:style>
    <style:style style:name="T272" style:parent-style-name="DefaultParagraphFont" style:family="text">
      <style:text-properties style:font-name="Droid Sans Mono" fo:color="#D4D4D4" fo:font-size="10.5pt" style:font-size-asian="10.5pt" fo:background-color="#121314"/>
    </style:style>
    <style:style style:name="T273" style:parent-style-name="DefaultParagraphFont" style:family="text">
      <style:text-properties style:font-name="Droid Sans Mono" fo:color="#BBBEBF" fo:font-size="10.5pt" style:font-size-asian="10.5pt" fo:background-color="#121314"/>
    </style:style>
    <style:style style:name="T274" style:parent-style-name="DefaultParagraphFont" style:family="text">
      <style:text-properties style:font-name="Droid Sans Mono" fo:color="#C9D1D9" fo:font-size="10.5pt" style:font-size-asian="10.5pt" fo:background-color="#121314"/>
    </style:style>
    <style:style style:name="T275" style:parent-style-name="DefaultParagraphFont" style:family="text">
      <style:text-properties style:font-name="Droid Sans Mono" fo:color="#BBBEBF" fo:font-size="10.5pt" style:font-size-asian="10.5pt" fo:background-color="#121314"/>
    </style:style>
    <style:style style:name="T276" style:parent-style-name="DefaultParagraphFont" style:family="text">
      <style:text-properties style:font-name="Droid Sans Mono" fo:color="#D4D4D4" fo:font-size="10.5pt" style:font-size-asian="10.5pt" fo:background-color="#121314"/>
    </style:style>
    <style:style style:name="T277" style:parent-style-name="DefaultParagraphFont" style:family="text">
      <style:text-properties style:font-name="Droid Sans Mono" fo:color="#BBBEBF" fo:font-size="10.5pt" style:font-size-asian="10.5pt" fo:background-color="#121314"/>
    </style:style>
    <style:style style:name="T278" style:parent-style-name="DefaultParagraphFont" style:family="text">
      <style:text-properties style:font-name="Droid Sans Mono" fo:color="#4EC9B0" fo:font-size="10.5pt" style:font-size-asian="10.5pt" fo:background-color="#121314"/>
    </style:style>
    <style:style style:name="T279" style:parent-style-name="DefaultParagraphFont" style:family="text">
      <style:text-properties style:font-name="Droid Sans Mono" fo:color="#BBBEBF" fo:font-size="10.5pt" style:font-size-asian="10.5pt" fo:background-color="#121314"/>
    </style:style>
    <style:style style:name="T280" style:parent-style-name="DefaultParagraphFont" style:family="text">
      <style:text-properties style:font-name="Droid Sans Mono" fo:color="#D2A8FF" fo:font-size="10.5pt" style:font-size-asian="10.5pt" fo:background-color="#121314"/>
    </style:style>
    <style:style style:name="T281" style:parent-style-name="DefaultParagraphFont" style:family="text">
      <style:text-properties style:font-name="Droid Sans Mono" fo:color="#BBBEBF" fo:font-size="10.5pt" style:font-size-asian="10.5pt" fo:background-color="#121314"/>
    </style:style>
    <style:style style:name="T282" style:parent-style-name="DefaultParagraphFont" style:family="text">
      <style:text-properties style:font-name="Droid Sans Mono" fo:color="#C9D1D9" fo:font-size="10.5pt" style:font-size-asian="10.5pt" fo:background-color="#121314"/>
    </style:style>
    <style:style style:name="T283" style:parent-style-name="DefaultParagraphFont" style:family="text">
      <style:text-properties style:font-name="Droid Sans Mono" fo:color="#BBBEBF" fo:font-size="10.5pt" style:font-size-asian="10.5pt" fo:background-color="#121314"/>
    </style:style>
    <style:style style:name="T284" style:parent-style-name="DefaultParagraphFont" style:family="text">
      <style:text-properties style:font-name="Droid Sans Mono" fo:color="#D4D4D4" fo:font-size="10.5pt" style:font-size-asian="10.5pt" fo:background-color="#121314"/>
    </style:style>
    <style:style style:name="T285" style:parent-style-name="DefaultParagraphFont" style:family="text">
      <style:text-properties style:font-name="Droid Sans Mono" fo:color="#BBBEBF" fo:font-size="10.5pt" style:font-size-asian="10.5pt" fo:background-color="#121314"/>
    </style:style>
    <style:style style:name="T286" style:parent-style-name="DefaultParagraphFont" style:family="text">
      <style:text-properties style:font-name="Droid Sans Mono" fo:color="#FFA657" fo:font-size="10.5pt" style:font-size-asian="10.5pt" fo:background-color="#121314"/>
    </style:style>
    <style:style style:name="T287" style:parent-style-name="DefaultParagraphFont" style:family="text">
      <style:text-properties style:font-name="Droid Sans Mono" fo:color="#BBBEBF" fo:font-size="10.5pt" style:font-size-asian="10.5pt" fo:background-color="#121314"/>
    </style:style>
    <style:style style:name="P288" style:parent-style-name="Standard" style:family="paragraph">
      <style:paragraph-properties style:line-height-at-least="0.1979in"/>
    </style:style>
    <style:style style:name="T289" style:parent-style-name="DefaultParagraphFont" style:family="text">
      <style:text-properties style:font-name="Droid Sans Mono" fo:color="#C9D1D9" fo:font-size="10.5pt" style:font-size-asian="10.5pt" fo:background-color="#121314"/>
    </style:style>
    <style:style style:name="T290" style:parent-style-name="DefaultParagraphFont" style:family="text">
      <style:text-properties style:font-name="Droid Sans Mono" fo:color="#BBBEBF" fo:font-size="10.5pt" style:font-size-asian="10.5pt" fo:background-color="#121314"/>
    </style:style>
    <style:style style:name="T291" style:parent-style-name="DefaultParagraphFont" style:family="text">
      <style:text-properties style:font-name="Droid Sans Mono" fo:color="#D4D4D4" fo:font-size="10.5pt" style:font-size-asian="10.5pt" fo:background-color="#121314"/>
    </style:style>
    <style:style style:name="T292" style:parent-style-name="DefaultParagraphFont" style:family="text">
      <style:text-properties style:font-name="Droid Sans Mono" fo:color="#BBBEBF" fo:font-size="10.5pt" style:font-size-asian="10.5pt" fo:background-color="#121314"/>
    </style:style>
    <style:style style:name="T293" style:parent-style-name="DefaultParagraphFont" style:family="text">
      <style:text-properties style:font-name="Droid Sans Mono" fo:color="#D4D4D4" fo:font-size="10.5pt" style:font-size-asian="10.5pt" fo:background-color="#121314"/>
    </style:style>
    <style:style style:name="T294" style:parent-style-name="DefaultParagraphFont" style:family="text">
      <style:text-properties style:font-name="Droid Sans Mono" fo:color="#BBBEBF" fo:font-size="10.5pt" style:font-size-asian="10.5pt" fo:background-color="#121314"/>
    </style:style>
    <style:style style:name="T295" style:parent-style-name="DefaultParagraphFont" style:family="text">
      <style:text-properties style:font-name="Droid Sans Mono" fo:color="#C9D1D9" fo:font-size="10.5pt" style:font-size-asian="10.5pt" fo:background-color="#121314"/>
    </style:style>
    <style:style style:name="T296" style:parent-style-name="DefaultParagraphFont" style:family="text">
      <style:text-properties style:font-name="Droid Sans Mono" fo:color="#D4D4D4" fo:font-size="10.5pt" style:font-size-asian="10.5pt" fo:background-color="#121314"/>
    </style:style>
    <style:style style:name="T297" style:parent-style-name="DefaultParagraphFont" style:family="text">
      <style:text-properties style:font-name="Droid Sans Mono" fo:color="#B5CEA8" fo:font-size="10.5pt" style:font-size-asian="10.5pt" fo:background-color="#121314"/>
    </style:style>
    <style:style style:name="T298" style:parent-style-name="DefaultParagraphFont" style:family="text">
      <style:text-properties style:font-name="Droid Sans Mono" fo:color="#BBBEBF" fo:font-size="10.5pt" style:font-size-asian="10.5pt" fo:background-color="#121314"/>
    </style:style>
    <style:style style:name="T299" style:parent-style-name="DefaultParagraphFont" style:family="text">
      <style:text-properties style:font-name="Droid Sans Mono" fo:color="#D4D4D4" fo:font-size="10.5pt" style:font-size-asian="10.5pt" fo:background-color="#121314"/>
    </style:style>
    <style:style style:name="T300" style:parent-style-name="DefaultParagraphFont" style:family="text">
      <style:text-properties style:font-name="Droid Sans Mono" fo:color="#BBBEBF" fo:font-size="10.5pt" style:font-size-asian="10.5pt" fo:background-color="#121314"/>
    </style:style>
    <style:style style:name="T301" style:parent-style-name="DefaultParagraphFont" style:family="text">
      <style:text-properties style:font-name="Droid Sans Mono" fo:color="#C9D1D9" fo:font-size="10.5pt" style:font-size-asian="10.5pt" fo:background-color="#121314"/>
    </style:style>
    <style:style style:name="P302" style:parent-style-name="Standard" style:family="paragraph">
      <style:paragraph-properties style:line-height-at-least="0.1979in"/>
    </style:style>
    <style:style style:name="T303" style:parent-style-name="DefaultParagraphFont" style:family="text">
      <style:text-properties style:font-name="Droid Sans Mono" fo:color="#C9D1D9" fo:font-size="10.5pt" style:font-size-asian="10.5pt" fo:background-color="#121314"/>
    </style:style>
    <style:style style:name="T304" style:parent-style-name="DefaultParagraphFont" style:family="text">
      <style:text-properties style:font-name="Droid Sans Mono" fo:color="#BBBEBF" fo:font-size="10.5pt" style:font-size-asian="10.5pt" fo:background-color="#121314"/>
    </style:style>
    <style:style style:name="T305" style:parent-style-name="DefaultParagraphFont" style:family="text">
      <style:text-properties style:font-name="Droid Sans Mono" fo:color="#D4D4D4" fo:font-size="10.5pt" style:font-size-asian="10.5pt" fo:background-color="#121314"/>
    </style:style>
    <style:style style:name="T306" style:parent-style-name="DefaultParagraphFont" style:family="text">
      <style:text-properties style:font-name="Droid Sans Mono" fo:color="#BBBEBF" fo:font-size="10.5pt" style:font-size-asian="10.5pt" fo:background-color="#121314"/>
    </style:style>
    <style:style style:name="T307" style:parent-style-name="DefaultParagraphFont" style:family="text">
      <style:text-properties style:font-name="Droid Sans Mono" fo:color="#D4D4D4" fo:font-size="10.5pt" style:font-size-asian="10.5pt" fo:background-color="#121314"/>
    </style:style>
    <style:style style:name="T308" style:parent-style-name="DefaultParagraphFont" style:family="text">
      <style:text-properties style:font-name="Droid Sans Mono" fo:color="#BBBEBF" fo:font-size="10.5pt" style:font-size-asian="10.5pt" fo:background-color="#121314"/>
    </style:style>
    <style:style style:name="T309" style:parent-style-name="DefaultParagraphFont" style:family="text">
      <style:text-properties style:font-name="Droid Sans Mono" fo:color="#C9D1D9" fo:font-size="10.5pt" style:font-size-asian="10.5pt" fo:background-color="#121314"/>
    </style:style>
    <style:style style:name="T310" style:parent-style-name="DefaultParagraphFont" style:family="text">
      <style:text-properties style:font-name="Droid Sans Mono" fo:color="#D4D4D4" fo:font-size="10.5pt" style:font-size-asian="10.5pt" fo:background-color="#121314"/>
    </style:style>
    <style:style style:name="T311" style:parent-style-name="DefaultParagraphFont" style:family="text">
      <style:text-properties style:font-name="Droid Sans Mono" fo:color="#B5CEA8" fo:font-size="10.5pt" style:font-size-asian="10.5pt" fo:background-color="#121314"/>
    </style:style>
    <style:style style:name="T312" style:parent-style-name="DefaultParagraphFont" style:family="text">
      <style:text-properties style:font-name="Droid Sans Mono" fo:color="#BBBEBF" fo:font-size="10.5pt" style:font-size-asian="10.5pt" fo:background-color="#121314"/>
    </style:style>
    <style:style style:name="T313" style:parent-style-name="DefaultParagraphFont" style:family="text">
      <style:text-properties style:font-name="Droid Sans Mono" fo:color="#D4D4D4" fo:font-size="10.5pt" style:font-size-asian="10.5pt" fo:background-color="#121314"/>
    </style:style>
    <style:style style:name="T314" style:parent-style-name="DefaultParagraphFont" style:family="text">
      <style:text-properties style:font-name="Droid Sans Mono" fo:color="#BBBEBF" fo:font-size="10.5pt" style:font-size-asian="10.5pt" fo:background-color="#121314"/>
    </style:style>
    <style:style style:name="T315" style:parent-style-name="DefaultParagraphFont" style:family="text">
      <style:text-properties style:font-name="Droid Sans Mono" fo:color="#C9D1D9" fo:font-size="10.5pt" style:font-size-asian="10.5pt" fo:background-color="#121314"/>
    </style:style>
    <style:style style:name="P316" style:parent-style-name="Standard" style:family="paragraph">
      <style:paragraph-properties style:line-height-at-least="0.1979in"/>
    </style:style>
    <style:style style:name="T317" style:parent-style-name="DefaultParagraphFont" style:family="text">
      <style:text-properties style:font-name="Droid Sans Mono" fo:color="#C9D1D9" fo:font-size="10.5pt" style:font-size-asian="10.5pt" fo:background-color="#121314"/>
    </style:style>
    <style:style style:name="T318" style:parent-style-name="DefaultParagraphFont" style:family="text">
      <style:text-properties style:font-name="Droid Sans Mono" fo:color="#BBBEBF" fo:font-size="10.5pt" style:font-size-asian="10.5pt" fo:background-color="#121314"/>
    </style:style>
    <style:style style:name="T319" style:parent-style-name="DefaultParagraphFont" style:family="text">
      <style:text-properties style:font-name="Droid Sans Mono" fo:color="#D4D4D4" fo:font-size="10.5pt" style:font-size-asian="10.5pt" fo:background-color="#121314"/>
    </style:style>
    <style:style style:name="T320" style:parent-style-name="DefaultParagraphFont" style:family="text">
      <style:text-properties style:font-name="Droid Sans Mono" fo:color="#BBBEBF" fo:font-size="10.5pt" style:font-size-asian="10.5pt" fo:background-color="#121314"/>
    </style:style>
    <style:style style:name="T321" style:parent-style-name="DefaultParagraphFont" style:family="text">
      <style:text-properties style:font-name="Droid Sans Mono" fo:color="#D4D4D4" fo:font-size="10.5pt" style:font-size-asian="10.5pt" fo:background-color="#121314"/>
    </style:style>
    <style:style style:name="T322" style:parent-style-name="DefaultParagraphFont" style:family="text">
      <style:text-properties style:font-name="Droid Sans Mono" fo:color="#BBBEBF" fo:font-size="10.5pt" style:font-size-asian="10.5pt" fo:background-color="#121314"/>
    </style:style>
    <style:style style:name="T323" style:parent-style-name="DefaultParagraphFont" style:family="text">
      <style:text-properties style:font-name="Droid Sans Mono" fo:color="#C9D1D9" fo:font-size="10.5pt" style:font-size-asian="10.5pt" fo:background-color="#121314"/>
    </style:style>
    <style:style style:name="T324" style:parent-style-name="DefaultParagraphFont" style:family="text">
      <style:text-properties style:font-name="Droid Sans Mono" fo:color="#D4D4D4" fo:font-size="10.5pt" style:font-size-asian="10.5pt" fo:background-color="#121314"/>
    </style:style>
    <style:style style:name="T325" style:parent-style-name="DefaultParagraphFont" style:family="text">
      <style:text-properties style:font-name="Droid Sans Mono" fo:color="#B5CEA8" fo:font-size="10.5pt" style:font-size-asian="10.5pt" fo:background-color="#121314"/>
    </style:style>
    <style:style style:name="T326" style:parent-style-name="DefaultParagraphFont" style:family="text">
      <style:text-properties style:font-name="Droid Sans Mono" fo:color="#BBBEBF" fo:font-size="10.5pt" style:font-size-asian="10.5pt" fo:background-color="#121314"/>
    </style:style>
    <style:style style:name="T327" style:parent-style-name="DefaultParagraphFont" style:family="text">
      <style:text-properties style:font-name="Droid Sans Mono" fo:color="#D4D4D4" fo:font-size="10.5pt" style:font-size-asian="10.5pt" fo:background-color="#121314"/>
    </style:style>
    <style:style style:name="T328" style:parent-style-name="DefaultParagraphFont" style:family="text">
      <style:text-properties style:font-name="Droid Sans Mono" fo:color="#BBBEBF" fo:font-size="10.5pt" style:font-size-asian="10.5pt" fo:background-color="#121314"/>
    </style:style>
    <style:style style:name="T329" style:parent-style-name="DefaultParagraphFont" style:family="text">
      <style:text-properties style:font-name="Droid Sans Mono" fo:color="#C9D1D9" fo:font-size="10.5pt" style:font-size-asian="10.5pt" fo:background-color="#121314"/>
    </style:style>
    <style:style style:name="T330" style:parent-style-name="DefaultParagraphFont" style:family="text">
      <style:text-properties style:font-name="Droid Sans Mono" fo:color="#BBBEBF" fo:font-size="10.5pt" style:font-size-asian="10.5pt" fo:background-color="#121314"/>
    </style:style>
    <style:style style:name="T331" style:parent-style-name="DefaultParagraphFont" style:family="text">
      <style:text-properties style:font-name="Droid Sans Mono" fo:color="#D4D4D4" fo:font-size="10.5pt" style:font-size-asian="10.5pt" fo:background-color="#121314"/>
    </style:style>
    <style:style style:name="T332" style:parent-style-name="DefaultParagraphFont" style:family="text">
      <style:text-properties style:font-name="Droid Sans Mono" fo:color="#BBBEBF" fo:font-size="10.5pt" style:font-size-asian="10.5pt" fo:background-color="#121314"/>
    </style:style>
    <style:style style:name="T333" style:parent-style-name="DefaultParagraphFont" style:family="text">
      <style:text-properties style:font-name="Droid Sans Mono" fo:color="#C9D1D9" fo:font-size="10.5pt" style:font-size-asian="10.5pt" fo:background-color="#121314"/>
    </style:style>
    <style:style style:name="T334" style:parent-style-name="DefaultParagraphFont" style:family="text">
      <style:text-properties style:font-name="Droid Sans Mono" fo:color="#BBBEBF" fo:font-size="10.5pt" style:font-size-asian="10.5pt" fo:background-color="#121314"/>
    </style:style>
    <style:style style:name="P335" style:parent-style-name="Standard" style:family="paragraph">
      <style:paragraph-properties style:line-height-at-least="0.1979in"/>
    </style:style>
    <style:style style:name="T336" style:parent-style-name="DefaultParagraphFont" style:family="text">
      <style:text-properties style:font-name="Droid Sans Mono" fo:color="#C586C0" fo:font-size="10.5pt" style:font-size-asian="10.5pt" fo:background-color="#121314"/>
    </style:style>
    <style:style style:name="T337" style:parent-style-name="DefaultParagraphFont" style:family="text">
      <style:text-properties style:font-name="Droid Sans Mono" fo:color="#BBBEBF" fo:font-size="10.5pt" style:font-size-asian="10.5pt" fo:background-color="#121314"/>
    </style:style>
    <style:style style:name="P338" style:parent-style-name="Standard" style:family="paragraph">
      <style:paragraph-properties style:line-height-at-least="0.1979in"/>
    </style:style>
    <style:style style:name="T339" style:parent-style-name="DefaultParagraphFont" style:family="text">
      <style:text-properties style:font-name="Droid Sans Mono" fo:color="#4EC9B0" fo:font-size="10.5pt" style:font-size-asian="10.5pt" fo:background-color="#121314"/>
    </style:style>
    <style:style style:name="T340" style:parent-style-name="DefaultParagraphFont" style:family="text">
      <style:text-properties style:font-name="Droid Sans Mono" fo:color="#BBBEBF" fo:font-size="10.5pt" style:font-size-asian="10.5pt" fo:background-color="#121314"/>
    </style:style>
    <style:style style:name="T341" style:parent-style-name="DefaultParagraphFont" style:family="text">
      <style:text-properties style:font-name="Droid Sans Mono" fo:color="#D2A8FF" fo:font-size="10.5pt" style:font-size-asian="10.5pt" fo:background-color="#121314"/>
    </style:style>
    <style:style style:name="T342" style:parent-style-name="DefaultParagraphFont" style:family="text">
      <style:text-properties style:font-name="Droid Sans Mono" fo:color="#BBBEBF" fo:font-size="10.5pt" style:font-size-asian="10.5pt" fo:background-color="#121314"/>
    </style:style>
    <style:style style:name="T343" style:parent-style-name="DefaultParagraphFont" style:family="text">
      <style:text-properties style:font-name="Droid Sans Mono" fo:color="#C9D1D9" fo:font-size="10.5pt" style:font-size-asian="10.5pt" fo:background-color="#121314"/>
    </style:style>
    <style:style style:name="T344" style:parent-style-name="DefaultParagraphFont" style:family="text">
      <style:text-properties style:font-name="Droid Sans Mono" fo:color="#BBBEBF" fo:font-size="10.5pt" style:font-size-asian="10.5pt" fo:background-color="#121314"/>
    </style:style>
    <style:style style:name="T345" style:parent-style-name="DefaultParagraphFont" style:family="text">
      <style:text-properties style:font-name="Droid Sans Mono" fo:color="#C9D1D9" fo:font-size="10.5pt" style:font-size-asian="10.5pt" fo:background-color="#121314"/>
    </style:style>
    <style:style style:name="T346" style:parent-style-name="DefaultParagraphFont" style:family="text">
      <style:text-properties style:font-name="Droid Sans Mono" fo:color="#BBBEBF" fo:font-size="10.5pt" style:font-size-asian="10.5pt" fo:background-color="#121314"/>
    </style:style>
    <style:style style:name="T347" style:parent-style-name="DefaultParagraphFont" style:family="text">
      <style:text-properties style:font-name="Droid Sans Mono" fo:color="#C9D1D9" fo:font-size="10.5pt" style:font-size-asian="10.5pt" fo:background-color="#121314"/>
    </style:style>
    <style:style style:name="T348" style:parent-style-name="DefaultParagraphFont" style:family="text">
      <style:text-properties style:font-name="Droid Sans Mono" fo:color="#BBBEBF" fo:font-size="10.5pt" style:font-size-asian="10.5pt" fo:background-color="#121314"/>
    </style:style>
    <style:style style:name="T349" style:parent-style-name="DefaultParagraphFont" style:family="text">
      <style:text-properties style:font-name="Droid Sans Mono" fo:color="#FFA657" fo:font-size="10.5pt" style:font-size-asian="10.5pt" fo:background-color="#121314"/>
    </style:style>
    <style:style style:name="T350" style:parent-style-name="DefaultParagraphFont" style:family="text">
      <style:text-properties style:font-name="Droid Sans Mono" fo:color="#D4D4D4" fo:font-size="10.5pt" style:font-size-asian="10.5pt" fo:background-color="#121314"/>
    </style:style>
    <style:style style:name="T351" style:parent-style-name="DefaultParagraphFont" style:family="text">
      <style:text-properties style:font-name="Droid Sans Mono" fo:color="#4EC9B0" fo:font-size="10.5pt" style:font-size-asian="10.5pt" fo:background-color="#121314"/>
    </style:style>
    <style:style style:name="T352" style:parent-style-name="DefaultParagraphFont" style:family="text">
      <style:text-properties style:font-name="Droid Sans Mono" fo:color="#BBBEBF" fo:font-size="10.5pt" style:font-size-asian="10.5pt" fo:background-color="#121314"/>
    </style:style>
    <style:style style:name="T353" style:parent-style-name="DefaultParagraphFont" style:family="text">
      <style:text-properties style:font-name="Droid Sans Mono" fo:color="#4EC9B0" fo:font-size="10.5pt" style:font-size-asian="10.5pt" fo:background-color="#121314"/>
    </style:style>
    <style:style style:name="T354" style:parent-style-name="DefaultParagraphFont" style:family="text">
      <style:text-properties style:font-name="Droid Sans Mono" fo:color="#BBBEBF" fo:font-size="10.5pt" style:font-size-asian="10.5pt" fo:background-color="#121314"/>
    </style:style>
    <style:style style:name="P355" style:parent-style-name="Standard" style:family="paragraph">
      <style:paragraph-properties style:line-height-at-least="0.1979in"/>
    </style:style>
    <style:style style:name="T356" style:parent-style-name="DefaultParagraphFont" style:family="text">
      <style:text-properties style:font-name="Droid Sans Mono" fo:color="#4EC9B0" fo:font-size="10.5pt" style:font-size-asian="10.5pt" fo:background-color="#121314"/>
    </style:style>
    <style:style style:name="T357" style:parent-style-name="DefaultParagraphFont" style:family="text">
      <style:text-properties style:font-name="Droid Sans Mono" fo:color="#BBBEBF" fo:font-size="10.5pt" style:font-size-asian="10.5pt" fo:background-color="#121314"/>
    </style:style>
    <style:style style:name="T358" style:parent-style-name="DefaultParagraphFont" style:family="text">
      <style:text-properties style:font-name="Droid Sans Mono" fo:color="#D2A8FF" fo:font-size="10.5pt" style:font-size-asian="10.5pt" fo:background-color="#121314"/>
    </style:style>
    <style:style style:name="T359" style:parent-style-name="DefaultParagraphFont" style:family="text">
      <style:text-properties style:font-name="Droid Sans Mono" fo:color="#BBBEBF" fo:font-size="10.5pt" style:font-size-asian="10.5pt" fo:background-color="#121314"/>
    </style:style>
    <style:style style:name="T360" style:parent-style-name="DefaultParagraphFont" style:family="text">
      <style:text-properties style:font-name="Droid Sans Mono" fo:color="#C9D1D9" fo:font-size="10.5pt" style:font-size-asian="10.5pt" fo:background-color="#121314"/>
    </style:style>
    <style:style style:name="T361" style:parent-style-name="DefaultParagraphFont" style:family="text">
      <style:text-properties style:font-name="Droid Sans Mono" fo:color="#BBBEBF" fo:font-size="10.5pt" style:font-size-asian="10.5pt" fo:background-color="#121314"/>
    </style:style>
    <style:style style:name="T362" style:parent-style-name="DefaultParagraphFont" style:family="text">
      <style:text-properties style:font-name="Droid Sans Mono" fo:color="#C9D1D9" fo:font-size="10.5pt" style:font-size-asian="10.5pt" fo:background-color="#121314"/>
    </style:style>
    <style:style style:name="T363" style:parent-style-name="DefaultParagraphFont" style:family="text">
      <style:text-properties style:font-name="Droid Sans Mono" fo:color="#BBBEBF" fo:font-size="10.5pt" style:font-size-asian="10.5pt" fo:background-color="#121314"/>
    </style:style>
    <style:style style:name="T364" style:parent-style-name="DefaultParagraphFont" style:family="text">
      <style:text-properties style:font-name="Droid Sans Mono" fo:color="#C9D1D9" fo:font-size="10.5pt" style:font-size-asian="10.5pt" fo:background-color="#121314"/>
    </style:style>
    <style:style style:name="T365" style:parent-style-name="DefaultParagraphFont" style:family="text">
      <style:text-properties style:font-name="Droid Sans Mono" fo:color="#BBBEBF" fo:font-size="10.5pt" style:font-size-asian="10.5pt" fo:background-color="#121314"/>
    </style:style>
    <style:style style:name="T366" style:parent-style-name="DefaultParagraphFont" style:family="text">
      <style:text-properties style:font-name="Droid Sans Mono" fo:color="#FFA657" fo:font-size="10.5pt" style:font-size-asian="10.5pt" fo:background-color="#121314"/>
    </style:style>
    <style:style style:name="T367" style:parent-style-name="DefaultParagraphFont" style:family="text">
      <style:text-properties style:font-name="Droid Sans Mono" fo:color="#D4D4D4" fo:font-size="10.5pt" style:font-size-asian="10.5pt" fo:background-color="#121314"/>
    </style:style>
    <style:style style:name="T368" style:parent-style-name="DefaultParagraphFont" style:family="text">
      <style:text-properties style:font-name="Droid Sans Mono" fo:color="#4EC9B0" fo:font-size="10.5pt" style:font-size-asian="10.5pt" fo:background-color="#121314"/>
    </style:style>
    <style:style style:name="T369" style:parent-style-name="DefaultParagraphFont" style:family="text">
      <style:text-properties style:font-name="Droid Sans Mono" fo:color="#BBBEBF" fo:font-size="10.5pt" style:font-size-asian="10.5pt" fo:background-color="#121314"/>
    </style:style>
    <style:style style:name="T370" style:parent-style-name="DefaultParagraphFont" style:family="text">
      <style:text-properties style:font-name="Droid Sans Mono" fo:color="#4EC9B0" fo:font-size="10.5pt" style:font-size-asian="10.5pt" fo:background-color="#121314"/>
    </style:style>
    <style:style style:name="T371" style:parent-style-name="DefaultParagraphFont" style:family="text">
      <style:text-properties style:font-name="Droid Sans Mono" fo:color="#BBBEBF" fo:font-size="10.5pt" style:font-size-asian="10.5pt" fo:background-color="#121314"/>
    </style:style>
    <style:style style:name="P372" style:parent-style-name="Standard" style:family="paragraph">
      <style:paragraph-properties style:line-height-at-least="0.1979in"/>
    </style:style>
    <style:style style:name="T373" style:parent-style-name="DefaultParagraphFont" style:family="text">
      <style:text-properties style:font-name="Droid Sans Mono" fo:color="#4EC9B0" fo:font-size="10.5pt" style:font-size-asian="10.5pt" fo:background-color="#121314"/>
    </style:style>
    <style:style style:name="T374" style:parent-style-name="DefaultParagraphFont" style:family="text">
      <style:text-properties style:font-name="Droid Sans Mono" fo:color="#BBBEBF" fo:font-size="10.5pt" style:font-size-asian="10.5pt" fo:background-color="#121314"/>
    </style:style>
    <style:style style:name="T375" style:parent-style-name="DefaultParagraphFont" style:family="text">
      <style:text-properties style:font-name="Droid Sans Mono" fo:color="#D2A8FF" fo:font-size="10.5pt" style:font-size-asian="10.5pt" fo:background-color="#121314"/>
    </style:style>
    <style:style style:name="T376" style:parent-style-name="DefaultParagraphFont" style:family="text">
      <style:text-properties style:font-name="Droid Sans Mono" fo:color="#BBBEBF" fo:font-size="10.5pt" style:font-size-asian="10.5pt" fo:background-color="#121314"/>
    </style:style>
    <style:style style:name="T377" style:parent-style-name="DefaultParagraphFont" style:family="text">
      <style:text-properties style:font-name="Droid Sans Mono" fo:color="#C9D1D9" fo:font-size="10.5pt" style:font-size-asian="10.5pt" fo:background-color="#121314"/>
    </style:style>
    <style:style style:name="T378" style:parent-style-name="DefaultParagraphFont" style:family="text">
      <style:text-properties style:font-name="Droid Sans Mono" fo:color="#BBBEBF" fo:font-size="10.5pt" style:font-size-asian="10.5pt" fo:background-color="#121314"/>
    </style:style>
    <style:style style:name="T379" style:parent-style-name="DefaultParagraphFont" style:family="text">
      <style:text-properties style:font-name="Droid Sans Mono" fo:color="#C9D1D9" fo:font-size="10.5pt" style:font-size-asian="10.5pt" fo:background-color="#121314"/>
    </style:style>
    <style:style style:name="T380" style:parent-style-name="DefaultParagraphFont" style:family="text">
      <style:text-properties style:font-name="Droid Sans Mono" fo:color="#BBBEBF" fo:font-size="10.5pt" style:font-size-asian="10.5pt" fo:background-color="#121314"/>
    </style:style>
    <style:style style:name="T381" style:parent-style-name="DefaultParagraphFont" style:family="text">
      <style:text-properties style:font-name="Droid Sans Mono" fo:color="#C9D1D9" fo:font-size="10.5pt" style:font-size-asian="10.5pt" fo:background-color="#121314"/>
    </style:style>
    <style:style style:name="T382" style:parent-style-name="DefaultParagraphFont" style:family="text">
      <style:text-properties style:font-name="Droid Sans Mono" fo:color="#BBBEBF" fo:font-size="10.5pt" style:font-size-asian="10.5pt" fo:background-color="#121314"/>
    </style:style>
    <style:style style:name="T383" style:parent-style-name="DefaultParagraphFont" style:family="text">
      <style:text-properties style:font-name="Droid Sans Mono" fo:color="#FFA657" fo:font-size="10.5pt" style:font-size-asian="10.5pt" fo:background-color="#121314"/>
    </style:style>
    <style:style style:name="T384" style:parent-style-name="DefaultParagraphFont" style:family="text">
      <style:text-properties style:font-name="Droid Sans Mono" fo:color="#D4D4D4" fo:font-size="10.5pt" style:font-size-asian="10.5pt" fo:background-color="#121314"/>
    </style:style>
    <style:style style:name="T385" style:parent-style-name="DefaultParagraphFont" style:family="text">
      <style:text-properties style:font-name="Droid Sans Mono" fo:color="#4EC9B0" fo:font-size="10.5pt" style:font-size-asian="10.5pt" fo:background-color="#121314"/>
    </style:style>
    <style:style style:name="T386" style:parent-style-name="DefaultParagraphFont" style:family="text">
      <style:text-properties style:font-name="Droid Sans Mono" fo:color="#BBBEBF" fo:font-size="10.5pt" style:font-size-asian="10.5pt" fo:background-color="#121314"/>
    </style:style>
    <style:style style:name="T387" style:parent-style-name="DefaultParagraphFont" style:family="text">
      <style:text-properties style:font-name="Droid Sans Mono" fo:color="#4EC9B0" fo:font-size="10.5pt" style:font-size-asian="10.5pt" fo:background-color="#121314"/>
    </style:style>
    <style:style style:name="T388" style:parent-style-name="DefaultParagraphFont" style:family="text">
      <style:text-properties style:font-name="Droid Sans Mono" fo:color="#BBBEBF" fo:font-size="10.5pt" style:font-size-asian="10.5pt" fo:background-color="#121314"/>
    </style:style>
    <style:style style:name="P389" style:parent-style-name="Standard" style:family="paragraph">
      <style:paragraph-properties style:line-height-at-least="0.1979in"/>
      <style:text-properties style:font-name="Droid Sans Mono" fo:color="#BBBEBF" fo:font-size="10.5pt" style:font-size-asian="10.5pt" fo:background-color="#121314"/>
    </style:style>
    <style:style style:name="T390" style:parent-style-name="DefaultParagraphFont" style:family="text">
      <style:text-properties style:font-name="Droid Sans Mono" fo:color="#79C0FF" fo:font-size="10.5pt" style:font-size-asian="10.5pt" fo:background-color="#121314"/>
    </style:style>
    <style:style style:name="T391" style:parent-style-name="DefaultParagraphFont" style:family="text">
      <style:text-properties style:font-name="Droid Sans Mono" fo:color="#BBBEBF" fo:font-size="10.5pt" style:font-size-asian="10.5pt" fo:background-color="#121314"/>
    </style:style>
    <style:style style:name="T392" style:parent-style-name="DefaultParagraphFont" style:family="text">
      <style:text-properties style:font-name="Droid Sans Mono" fo:color="#D4D4D4" fo:font-size="10.5pt" style:font-size-asian="10.5pt" fo:background-color="#121314"/>
    </style:style>
    <style:style style:name="T393" style:parent-style-name="DefaultParagraphFont" style:family="text">
      <style:text-properties style:font-name="Droid Sans Mono" fo:color="#BBBEBF" fo:font-size="10.5pt" style:font-size-asian="10.5pt" fo:background-color="#121314"/>
    </style:style>
    <style:style style:name="T394" style:parent-style-name="DefaultParagraphFont" style:family="text">
      <style:text-properties style:font-name="Droid Sans Mono" fo:color="#B5CEA8" fo:font-size="10.5pt" style:font-size-asian="10.5pt" fo:background-color="#121314"/>
    </style:style>
    <style:style style:name="P395" style:parent-style-name="Standard" style:family="paragraph">
      <style:paragraph-properties style:line-height-at-least="0.1979in"/>
    </style:style>
    <style:style style:name="T396" style:parent-style-name="DefaultParagraphFont" style:family="text">
      <style:text-properties style:font-name="Droid Sans Mono" fo:color="#79C0FF" fo:font-size="10.5pt" style:font-size-asian="10.5pt" fo:background-color="#121314"/>
    </style:style>
    <style:style style:name="T397" style:parent-style-name="DefaultParagraphFont" style:family="text">
      <style:text-properties style:font-name="Droid Sans Mono" fo:color="#BBBEBF" fo:font-size="10.5pt" style:font-size-asian="10.5pt" fo:background-color="#121314"/>
    </style:style>
    <style:style style:name="T398" style:parent-style-name="DefaultParagraphFont" style:family="text">
      <style:text-properties style:font-name="Droid Sans Mono" fo:color="#D4D4D4" fo:font-size="10.5pt" style:font-size-asian="10.5pt" fo:background-color="#121314"/>
    </style:style>
    <style:style style:name="T399" style:parent-style-name="DefaultParagraphFont" style:family="text">
      <style:text-properties style:font-name="Droid Sans Mono" fo:color="#BBBEBF" fo:font-size="10.5pt" style:font-size-asian="10.5pt" fo:background-color="#121314"/>
    </style:style>
    <style:style style:name="T400" style:parent-style-name="DefaultParagraphFont" style:family="text">
      <style:text-properties style:font-name="Droid Sans Mono" fo:color="#D4D4D4" fo:font-size="10.5pt" style:font-size-asian="10.5pt" fo:background-color="#121314"/>
    </style:style>
    <style:style style:name="T401" style:parent-style-name="DefaultParagraphFont" style:family="text">
      <style:text-properties style:font-name="Droid Sans Mono" fo:color="#B5CEA8" fo:font-size="10.5pt" style:font-size-asian="10.5pt" fo:background-color="#121314"/>
    </style:style>
    <style:style style:name="P402" style:parent-style-name="Standard" style:family="paragraph">
      <style:paragraph-properties style:line-height-at-least="0.1979in"/>
    </style:style>
    <style:style style:name="T403" style:parent-style-name="DefaultParagraphFont" style:family="text">
      <style:text-properties style:font-name="Droid Sans Mono" fo:color="#79C0FF" fo:font-size="10.5pt" style:font-size-asian="10.5pt" fo:background-color="#121314"/>
    </style:style>
    <style:style style:name="T404" style:parent-style-name="DefaultParagraphFont" style:family="text">
      <style:text-properties style:font-name="Droid Sans Mono" fo:color="#BBBEBF" fo:font-size="10.5pt" style:font-size-asian="10.5pt" fo:background-color="#121314"/>
    </style:style>
    <style:style style:name="T405" style:parent-style-name="DefaultParagraphFont" style:family="text">
      <style:text-properties style:font-name="Droid Sans Mono" fo:color="#D4D4D4" fo:font-size="10.5pt" style:font-size-asian="10.5pt" fo:background-color="#121314"/>
    </style:style>
    <style:style style:name="T406" style:parent-style-name="DefaultParagraphFont" style:family="text">
      <style:text-properties style:font-name="Droid Sans Mono" fo:color="#BBBEBF" fo:font-size="10.5pt" style:font-size-asian="10.5pt" fo:background-color="#121314"/>
    </style:style>
    <style:style style:name="T407" style:parent-style-name="DefaultParagraphFont" style:family="text">
      <style:text-properties style:font-name="Droid Sans Mono" fo:color="#D4D4D4" fo:font-size="10.5pt" style:font-size-asian="10.5pt" fo:background-color="#121314"/>
    </style:style>
    <style:style style:name="T408" style:parent-style-name="DefaultParagraphFont" style:family="text">
      <style:text-properties style:font-name="Droid Sans Mono" fo:color="#B5CEA8" fo:font-size="10.5pt" style:font-size-asian="10.5pt" fo:background-color="#121314"/>
    </style:style>
    <style:style style:name="P409" style:parent-style-name="Standard" style:family="paragraph">
      <style:paragraph-properties style:line-height-at-least="0.1979in"/>
      <style:text-properties style:font-name="Droid Sans Mono" fo:color="#BBBEBF" fo:font-size="10.5pt" style:font-size-asian="10.5pt" fo:background-color="#121314"/>
    </style:style>
    <style:style style:name="T410" style:parent-style-name="DefaultParagraphFont" style:family="text">
      <style:text-properties style:font-name="Droid Sans Mono" fo:color="#C9D1D9" fo:font-size="10.5pt" style:font-size-asian="10.5pt" fo:background-color="#121314"/>
    </style:style>
    <style:style style:name="T411" style:parent-style-name="DefaultParagraphFont" style:family="text">
      <style:text-properties style:font-name="Droid Sans Mono" fo:color="#BBBEBF" fo:font-size="10.5pt" style:font-size-asian="10.5pt" fo:background-color="#121314"/>
    </style:style>
    <style:style style:name="T412" style:parent-style-name="DefaultParagraphFont" style:family="text">
      <style:text-properties style:font-name="Droid Sans Mono" fo:color="#A5D6FF" fo:font-size="10.5pt" style:font-size-asian="10.5pt" fo:background-color="#121314"/>
    </style:style>
    <style:style style:name="T413" style:parent-style-name="DefaultParagraphFont" style:family="text">
      <style:text-properties style:font-name="Droid Sans Mono" fo:color="#BBBEBF" fo:font-size="10.5pt" style:font-size-asian="10.5pt" fo:background-color="#121314"/>
    </style:style>
    <style:style style:name="T414" style:parent-style-name="DefaultParagraphFont" style:family="text">
      <style:text-properties style:font-name="Droid Sans Mono" fo:color="#D4D4D4" fo:font-size="10.5pt" style:font-size-asian="10.5pt" fo:background-color="#121314"/>
    </style:style>
    <style:style style:name="T415" style:parent-style-name="DefaultParagraphFont" style:family="text">
      <style:text-properties style:font-name="Droid Sans Mono" fo:color="#BBBEBF" fo:font-size="10.5pt" style:font-size-asian="10.5pt" fo:background-color="#121314"/>
    </style:style>
    <style:style style:name="T416" style:parent-style-name="DefaultParagraphFont" style:family="text">
      <style:text-properties style:font-name="Droid Sans Mono" fo:color="#4EC9B0" fo:font-size="10.5pt" style:font-size-asian="10.5pt" fo:background-color="#121314"/>
    </style:style>
    <style:style style:name="T417" style:parent-style-name="DefaultParagraphFont" style:family="text">
      <style:text-properties style:font-name="Droid Sans Mono" fo:color="#BBBEBF" fo:font-size="10.5pt" style:font-size-asian="10.5pt" fo:background-color="#121314"/>
    </style:style>
    <style:style style:name="T418" style:parent-style-name="DefaultParagraphFont" style:family="text">
      <style:text-properties style:font-name="Droid Sans Mono" fo:color="#FFA657" fo:font-size="10.5pt" style:font-size-asian="10.5pt" fo:background-color="#121314"/>
    </style:style>
    <style:style style:name="T419" style:parent-style-name="DefaultParagraphFont" style:family="text">
      <style:text-properties style:font-name="Droid Sans Mono" fo:color="#BBBEBF" fo:font-size="10.5pt" style:font-size-asian="10.5pt" fo:background-color="#121314"/>
    </style:style>
    <style:style style:name="T420" style:parent-style-name="DefaultParagraphFont" style:family="text">
      <style:text-properties style:font-name="Droid Sans Mono" fo:color="#D2A8FF" fo:font-size="10.5pt" style:font-size-asian="10.5pt" fo:background-color="#121314"/>
    </style:style>
    <style:style style:name="T421" style:parent-style-name="DefaultParagraphFont" style:family="text">
      <style:text-properties style:font-name="Droid Sans Mono" fo:color="#BBBEBF" fo:font-size="10.5pt" style:font-size-asian="10.5pt" fo:background-color="#121314"/>
    </style:style>
    <style:style style:name="T422" style:parent-style-name="DefaultParagraphFont" style:family="text">
      <style:text-properties style:font-name="Droid Sans Mono" fo:color="#A5D6FF" fo:font-size="10.5pt" style:font-size-asian="10.5pt" fo:background-color="#121314"/>
    </style:style>
    <style:style style:name="T423" style:parent-style-name="DefaultParagraphFont" style:family="text">
      <style:text-properties style:font-name="Droid Sans Mono" fo:color="#BBBEBF" fo:font-size="10.5pt" style:font-size-asian="10.5pt" fo:background-color="#121314"/>
    </style:style>
    <style:style style:name="T424" style:parent-style-name="DefaultParagraphFont" style:family="text">
      <style:text-properties style:font-name="Droid Sans Mono" fo:color="#B5CEA8" fo:font-size="10.5pt" style:font-size-asian="10.5pt" fo:background-color="#121314"/>
    </style:style>
    <style:style style:name="T425" style:parent-style-name="DefaultParagraphFont" style:family="text">
      <style:text-properties style:font-name="Droid Sans Mono" fo:color="#BBBEBF" fo:font-size="10.5pt" style:font-size-asian="10.5pt" fo:background-color="#121314"/>
    </style:style>
    <style:style style:name="T426" style:parent-style-name="DefaultParagraphFont" style:family="text">
      <style:text-properties style:font-name="Droid Sans Mono" fo:color="#B5CEA8" fo:font-size="10.5pt" style:font-size-asian="10.5pt" fo:background-color="#121314"/>
    </style:style>
    <style:style style:name="T427" style:parent-style-name="DefaultParagraphFont" style:family="text">
      <style:text-properties style:font-name="Droid Sans Mono" fo:color="#BBBEBF" fo:font-size="10.5pt" style:font-size-asian="10.5pt" fo:background-color="#121314"/>
    </style:style>
    <style:style style:name="P428" style:parent-style-name="Standard" style:family="paragraph">
      <style:paragraph-properties style:line-height-at-least="0.1979in"/>
    </style:style>
    <style:style style:name="T429" style:parent-style-name="DefaultParagraphFont" style:family="text">
      <style:text-properties style:font-name="Droid Sans Mono" fo:color="#C9D1D9" fo:font-size="10.5pt" style:font-size-asian="10.5pt" fo:background-color="#121314"/>
    </style:style>
    <style:style style:name="T430" style:parent-style-name="DefaultParagraphFont" style:family="text">
      <style:text-properties style:font-name="Droid Sans Mono" fo:color="#BBBEBF" fo:font-size="10.5pt" style:font-size-asian="10.5pt" fo:background-color="#121314"/>
    </style:style>
    <style:style style:name="T431" style:parent-style-name="DefaultParagraphFont" style:family="text">
      <style:text-properties style:font-name="Droid Sans Mono" fo:color="#A5D6FF" fo:font-size="10.5pt" style:font-size-asian="10.5pt" fo:background-color="#121314"/>
    </style:style>
    <style:style style:name="T432" style:parent-style-name="DefaultParagraphFont" style:family="text">
      <style:text-properties style:font-name="Droid Sans Mono" fo:color="#BBBEBF" fo:font-size="10.5pt" style:font-size-asian="10.5pt" fo:background-color="#121314"/>
    </style:style>
    <style:style style:name="T433" style:parent-style-name="DefaultParagraphFont" style:family="text">
      <style:text-properties style:font-name="Droid Sans Mono" fo:color="#D4D4D4" fo:font-size="10.5pt" style:font-size-asian="10.5pt" fo:background-color="#121314"/>
    </style:style>
    <style:style style:name="T434" style:parent-style-name="DefaultParagraphFont" style:family="text">
      <style:text-properties style:font-name="Droid Sans Mono" fo:color="#BBBEBF" fo:font-size="10.5pt" style:font-size-asian="10.5pt" fo:background-color="#121314"/>
    </style:style>
    <style:style style:name="T435" style:parent-style-name="DefaultParagraphFont" style:family="text">
      <style:text-properties style:font-name="Droid Sans Mono" fo:color="#4EC9B0" fo:font-size="10.5pt" style:font-size-asian="10.5pt" fo:background-color="#121314"/>
    </style:style>
    <style:style style:name="T436" style:parent-style-name="DefaultParagraphFont" style:family="text">
      <style:text-properties style:font-name="Droid Sans Mono" fo:color="#BBBEBF" fo:font-size="10.5pt" style:font-size-asian="10.5pt" fo:background-color="#121314"/>
    </style:style>
    <style:style style:name="T437" style:parent-style-name="DefaultParagraphFont" style:family="text">
      <style:text-properties style:font-name="Droid Sans Mono" fo:color="#FFA657" fo:font-size="10.5pt" style:font-size-asian="10.5pt" fo:background-color="#121314"/>
    </style:style>
    <style:style style:name="T438" style:parent-style-name="DefaultParagraphFont" style:family="text">
      <style:text-properties style:font-name="Droid Sans Mono" fo:color="#BBBEBF" fo:font-size="10.5pt" style:font-size-asian="10.5pt" fo:background-color="#121314"/>
    </style:style>
    <style:style style:name="T439" style:parent-style-name="DefaultParagraphFont" style:family="text">
      <style:text-properties style:font-name="Droid Sans Mono" fo:color="#D2A8FF" fo:font-size="10.5pt" style:font-size-asian="10.5pt" fo:background-color="#121314"/>
    </style:style>
    <style:style style:name="T440" style:parent-style-name="DefaultParagraphFont" style:family="text">
      <style:text-properties style:font-name="Droid Sans Mono" fo:color="#BBBEBF" fo:font-size="10.5pt" style:font-size-asian="10.5pt" fo:background-color="#121314"/>
    </style:style>
    <style:style style:name="T441" style:parent-style-name="DefaultParagraphFont" style:family="text">
      <style:text-properties style:font-name="Droid Sans Mono" fo:color="#A5D6FF" fo:font-size="10.5pt" style:font-size-asian="10.5pt" fo:background-color="#121314"/>
    </style:style>
    <style:style style:name="T442" style:parent-style-name="DefaultParagraphFont" style:family="text">
      <style:text-properties style:font-name="Droid Sans Mono" fo:color="#BBBEBF" fo:font-size="10.5pt" style:font-size-asian="10.5pt" fo:background-color="#121314"/>
    </style:style>
    <style:style style:name="T443" style:parent-style-name="DefaultParagraphFont" style:family="text">
      <style:text-properties style:font-name="Droid Sans Mono" fo:color="#B5CEA8" fo:font-size="10.5pt" style:font-size-asian="10.5pt" fo:background-color="#121314"/>
    </style:style>
    <style:style style:name="T444" style:parent-style-name="DefaultParagraphFont" style:family="text">
      <style:text-properties style:font-name="Droid Sans Mono" fo:color="#BBBEBF" fo:font-size="10.5pt" style:font-size-asian="10.5pt" fo:background-color="#121314"/>
    </style:style>
    <style:style style:name="T445" style:parent-style-name="DefaultParagraphFont" style:family="text">
      <style:text-properties style:font-name="Droid Sans Mono" fo:color="#B5CEA8" fo:font-size="10.5pt" style:font-size-asian="10.5pt" fo:background-color="#121314"/>
    </style:style>
    <style:style style:name="T446" style:parent-style-name="DefaultParagraphFont" style:family="text">
      <style:text-properties style:font-name="Droid Sans Mono" fo:color="#BBBEBF" fo:font-size="10.5pt" style:font-size-asian="10.5pt" fo:background-color="#121314"/>
    </style:style>
    <style:style style:name="T447" style:parent-style-name="DefaultParagraphFont" style:family="text">
      <style:text-properties style:font-name="Droid Sans Mono" fo:color="#FFA657" fo:font-size="10.5pt" style:font-size-asian="10.5pt" fo:background-color="#121314"/>
    </style:style>
    <style:style style:name="T448" style:parent-style-name="DefaultParagraphFont" style:family="text">
      <style:text-properties style:font-name="Droid Sans Mono" fo:color="#D4D4D4" fo:font-size="10.5pt" style:font-size-asian="10.5pt" fo:background-color="#121314"/>
    </style:style>
    <style:style style:name="T449" style:parent-style-name="DefaultParagraphFont" style:family="text">
      <style:text-properties style:font-name="Droid Sans Mono" fo:color="#569CD6" fo:font-size="10.5pt" style:font-size-asian="10.5pt" fo:background-color="#121314"/>
    </style:style>
    <style:style style:name="T450" style:parent-style-name="DefaultParagraphFont" style:family="text">
      <style:text-properties style:font-name="Droid Sans Mono" fo:color="#BBBEBF" fo:font-size="10.5pt" style:font-size-asian="10.5pt" fo:background-color="#121314"/>
    </style:style>
    <style:style style:name="P451" style:parent-style-name="Standard" style:family="paragraph">
      <style:paragraph-properties style:line-height-at-least="0.1979in"/>
    </style:style>
    <style:style style:name="T452" style:parent-style-name="DefaultParagraphFont" style:family="text">
      <style:text-properties style:font-name="Droid Sans Mono" fo:color="#C9D1D9" fo:font-size="10.5pt" style:font-size-asian="10.5pt" fo:background-color="#121314"/>
    </style:style>
    <style:style style:name="T453" style:parent-style-name="DefaultParagraphFont" style:family="text">
      <style:text-properties style:font-name="Droid Sans Mono" fo:color="#BBBEBF" fo:font-size="10.5pt" style:font-size-asian="10.5pt" fo:background-color="#121314"/>
    </style:style>
    <style:style style:name="T454" style:parent-style-name="DefaultParagraphFont" style:family="text">
      <style:text-properties style:font-name="Droid Sans Mono" fo:color="#D4D4D4" fo:font-size="10.5pt" style:font-size-asian="10.5pt" fo:background-color="#121314"/>
    </style:style>
    <style:style style:name="T455" style:parent-style-name="DefaultParagraphFont" style:family="text">
      <style:text-properties style:font-name="Droid Sans Mono" fo:color="#BBBEBF" fo:font-size="10.5pt" style:font-size-asian="10.5pt" fo:background-color="#121314"/>
    </style:style>
    <style:style style:name="T456" style:parent-style-name="DefaultParagraphFont" style:family="text">
      <style:text-properties style:font-name="Droid Sans Mono" fo:color="#FFA657" fo:font-size="10.5pt" style:font-size-asian="10.5pt" fo:background-color="#121314"/>
    </style:style>
    <style:style style:name="T457" style:parent-style-name="DefaultParagraphFont" style:family="text">
      <style:text-properties style:font-name="Droid Sans Mono" fo:color="#BBBEBF" fo:font-size="10.5pt" style:font-size-asian="10.5pt" fo:background-color="#121314"/>
    </style:style>
    <style:style style:name="T458" style:parent-style-name="DefaultParagraphFont" style:family="text">
      <style:text-properties style:font-name="Droid Sans Mono" fo:color="#D2A8FF" fo:font-size="10.5pt" style:font-size-asian="10.5pt" fo:background-color="#121314"/>
    </style:style>
    <style:style style:name="T459" style:parent-style-name="DefaultParagraphFont" style:family="text">
      <style:text-properties style:font-name="Droid Sans Mono" fo:color="#BBBEBF" fo:font-size="10.5pt" style:font-size-asian="10.5pt" fo:background-color="#121314"/>
    </style:style>
    <style:style style:name="T460" style:parent-style-name="DefaultParagraphFont" style:family="text">
      <style:text-properties style:font-name="Droid Sans Mono" fo:color="#A5D6FF" fo:font-size="10.5pt" style:font-size-asian="10.5pt" fo:background-color="#121314"/>
    </style:style>
    <style:style style:name="T461" style:parent-style-name="DefaultParagraphFont" style:family="text">
      <style:text-properties style:font-name="Droid Sans Mono" fo:color="#BBBEBF" fo:font-size="10.5pt" style:font-size-asian="10.5pt" fo:background-color="#121314"/>
    </style:style>
    <style:style style:name="T462" style:parent-style-name="DefaultParagraphFont" style:family="text">
      <style:text-properties style:font-name="Droid Sans Mono" fo:color="#B5CEA8" fo:font-size="10.5pt" style:font-size-asian="10.5pt" fo:background-color="#121314"/>
    </style:style>
    <style:style style:name="T463" style:parent-style-name="DefaultParagraphFont" style:family="text">
      <style:text-properties style:font-name="Droid Sans Mono" fo:color="#BBBEBF" fo:font-size="10.5pt" style:font-size-asian="10.5pt" fo:background-color="#121314"/>
    </style:style>
    <style:style style:name="T464" style:parent-style-name="DefaultParagraphFont" style:family="text">
      <style:text-properties style:font-name="Droid Sans Mono" fo:color="#B5CEA8" fo:font-size="10.5pt" style:font-size-asian="10.5pt" fo:background-color="#121314"/>
    </style:style>
    <style:style style:name="T465" style:parent-style-name="DefaultParagraphFont" style:family="text">
      <style:text-properties style:font-name="Droid Sans Mono" fo:color="#BBBEBF" fo:font-size="10.5pt" style:font-size-asian="10.5pt" fo:background-color="#121314"/>
    </style:style>
    <style:style style:name="T466" style:parent-style-name="DefaultParagraphFont" style:family="text">
      <style:text-properties style:font-name="Droid Sans Mono" fo:color="#B5CEA8" fo:font-size="10.5pt" style:font-size-asian="10.5pt" fo:background-color="#121314"/>
    </style:style>
    <style:style style:name="T467" style:parent-style-name="DefaultParagraphFont" style:family="text">
      <style:text-properties style:font-name="Droid Sans Mono" fo:color="#BBBEBF" fo:font-size="10.5pt" style:font-size-asian="10.5pt" fo:background-color="#121314"/>
    </style:style>
    <style:style style:name="T468" style:parent-style-name="DefaultParagraphFont" style:family="text">
      <style:text-properties style:font-name="Droid Sans Mono" fo:color="#B5CEA8" fo:font-size="10.5pt" style:font-size-asian="10.5pt" fo:background-color="#121314"/>
    </style:style>
    <style:style style:name="T469" style:parent-style-name="DefaultParagraphFont" style:family="text">
      <style:text-properties style:font-name="Droid Sans Mono" fo:color="#BBBEBF" fo:font-size="10.5pt" style:font-size-asian="10.5pt" fo:background-color="#121314"/>
    </style:style>
    <style:style style:name="P470" style:parent-style-name="Standard" style:family="paragraph">
      <style:paragraph-properties style:line-height-at-least="0.1979in"/>
    </style:style>
    <style:style style:name="T471" style:parent-style-name="DefaultParagraphFont" style:family="text">
      <style:text-properties style:font-name="Droid Sans Mono" fo:color="#C9D1D9" fo:font-size="10.5pt" style:font-size-asian="10.5pt" fo:background-color="#121314"/>
    </style:style>
    <style:style style:name="T472" style:parent-style-name="DefaultParagraphFont" style:family="text">
      <style:text-properties style:font-name="Droid Sans Mono" fo:color="#BBBEBF" fo:font-size="10.5pt" style:font-size-asian="10.5pt" fo:background-color="#121314"/>
    </style:style>
    <style:style style:name="T473" style:parent-style-name="DefaultParagraphFont" style:family="text">
      <style:text-properties style:font-name="Droid Sans Mono" fo:color="#D4D4D4" fo:font-size="10.5pt" style:font-size-asian="10.5pt" fo:background-color="#121314"/>
    </style:style>
    <style:style style:name="T474" style:parent-style-name="DefaultParagraphFont" style:family="text">
      <style:text-properties style:font-name="Droid Sans Mono" fo:color="#BBBEBF" fo:font-size="10.5pt" style:font-size-asian="10.5pt" fo:background-color="#121314"/>
    </style:style>
    <style:style style:name="T475" style:parent-style-name="DefaultParagraphFont" style:family="text">
      <style:text-properties style:font-name="Droid Sans Mono" fo:color="#FFA657" fo:font-size="10.5pt" style:font-size-asian="10.5pt" fo:background-color="#121314"/>
    </style:style>
    <style:style style:name="T476" style:parent-style-name="DefaultParagraphFont" style:family="text">
      <style:text-properties style:font-name="Droid Sans Mono" fo:color="#BBBEBF" fo:font-size="10.5pt" style:font-size-asian="10.5pt" fo:background-color="#121314"/>
    </style:style>
    <style:style style:name="T477" style:parent-style-name="DefaultParagraphFont" style:family="text">
      <style:text-properties style:font-name="Droid Sans Mono" fo:color="#D2A8FF" fo:font-size="10.5pt" style:font-size-asian="10.5pt" fo:background-color="#121314"/>
    </style:style>
    <style:style style:name="T478" style:parent-style-name="DefaultParagraphFont" style:family="text">
      <style:text-properties style:font-name="Droid Sans Mono" fo:color="#BBBEBF" fo:font-size="10.5pt" style:font-size-asian="10.5pt" fo:background-color="#121314"/>
    </style:style>
    <style:style style:name="T479" style:parent-style-name="DefaultParagraphFont" style:family="text">
      <style:text-properties style:font-name="Droid Sans Mono" fo:color="#A5D6FF" fo:font-size="10.5pt" style:font-size-asian="10.5pt" fo:background-color="#121314"/>
    </style:style>
    <style:style style:name="T480" style:parent-style-name="DefaultParagraphFont" style:family="text">
      <style:text-properties style:font-name="Droid Sans Mono" fo:color="#BBBEBF" fo:font-size="10.5pt" style:font-size-asian="10.5pt" fo:background-color="#121314"/>
    </style:style>
    <style:style style:name="T481" style:parent-style-name="DefaultParagraphFont" style:family="text">
      <style:text-properties style:font-name="Droid Sans Mono" fo:color="#B5CEA8" fo:font-size="10.5pt" style:font-size-asian="10.5pt" fo:background-color="#121314"/>
    </style:style>
    <style:style style:name="T482" style:parent-style-name="DefaultParagraphFont" style:family="text">
      <style:text-properties style:font-name="Droid Sans Mono" fo:color="#BBBEBF" fo:font-size="10.5pt" style:font-size-asian="10.5pt" fo:background-color="#121314"/>
    </style:style>
    <style:style style:name="T483" style:parent-style-name="DefaultParagraphFont" style:family="text">
      <style:text-properties style:font-name="Droid Sans Mono" fo:color="#B5CEA8" fo:font-size="10.5pt" style:font-size-asian="10.5pt" fo:background-color="#121314"/>
    </style:style>
    <style:style style:name="T484" style:parent-style-name="DefaultParagraphFont" style:family="text">
      <style:text-properties style:font-name="Droid Sans Mono" fo:color="#BBBEBF" fo:font-size="10.5pt" style:font-size-asian="10.5pt" fo:background-color="#121314"/>
    </style:style>
    <style:style style:name="T485" style:parent-style-name="DefaultParagraphFont" style:family="text">
      <style:text-properties style:font-name="Droid Sans Mono" fo:color="#B5CEA8" fo:font-size="10.5pt" style:font-size-asian="10.5pt" fo:background-color="#121314"/>
    </style:style>
    <style:style style:name="T486" style:parent-style-name="DefaultParagraphFont" style:family="text">
      <style:text-properties style:font-name="Droid Sans Mono" fo:color="#BBBEBF" fo:font-size="10.5pt" style:font-size-asian="10.5pt" fo:background-color="#121314"/>
    </style:style>
    <style:style style:name="T487" style:parent-style-name="DefaultParagraphFont" style:family="text">
      <style:text-properties style:font-name="Droid Sans Mono" fo:color="#B5CEA8" fo:font-size="10.5pt" style:font-size-asian="10.5pt" fo:background-color="#121314"/>
    </style:style>
    <style:style style:name="T488" style:parent-style-name="DefaultParagraphFont" style:family="text">
      <style:text-properties style:font-name="Droid Sans Mono" fo:color="#BBBEBF" fo:font-size="10.5pt" style:font-size-asian="10.5pt" fo:background-color="#121314"/>
    </style:style>
    <style:style style:name="P489" style:parent-style-name="Standard" style:family="paragraph">
      <style:paragraph-properties style:line-height-at-least="0.1979in"/>
    </style:style>
    <style:style style:name="T490" style:parent-style-name="DefaultParagraphFont" style:family="text">
      <style:text-properties style:font-name="Droid Sans Mono" fo:color="#C9D1D9" fo:font-size="10.5pt" style:font-size-asian="10.5pt" fo:background-color="#121314"/>
    </style:style>
    <style:style style:name="T491" style:parent-style-name="DefaultParagraphFont" style:family="text">
      <style:text-properties style:font-name="Droid Sans Mono" fo:color="#BBBEBF" fo:font-size="10.5pt" style:font-size-asian="10.5pt" fo:background-color="#121314"/>
    </style:style>
    <style:style style:name="T492" style:parent-style-name="DefaultParagraphFont" style:family="text">
      <style:text-properties style:font-name="Droid Sans Mono" fo:color="#D4D4D4" fo:font-size="10.5pt" style:font-size-asian="10.5pt" fo:background-color="#121314"/>
    </style:style>
    <style:style style:name="T493" style:parent-style-name="DefaultParagraphFont" style:family="text">
      <style:text-properties style:font-name="Droid Sans Mono" fo:color="#BBBEBF" fo:font-size="10.5pt" style:font-size-asian="10.5pt" fo:background-color="#121314"/>
    </style:style>
    <style:style style:name="T494" style:parent-style-name="DefaultParagraphFont" style:family="text">
      <style:text-properties style:font-name="Droid Sans Mono" fo:color="#FFA657" fo:font-size="10.5pt" style:font-size-asian="10.5pt" fo:background-color="#121314"/>
    </style:style>
    <style:style style:name="T495" style:parent-style-name="DefaultParagraphFont" style:family="text">
      <style:text-properties style:font-name="Droid Sans Mono" fo:color="#BBBEBF" fo:font-size="10.5pt" style:font-size-asian="10.5pt" fo:background-color="#121314"/>
    </style:style>
    <style:style style:name="T496" style:parent-style-name="DefaultParagraphFont" style:family="text">
      <style:text-properties style:font-name="Droid Sans Mono" fo:color="#D2A8FF" fo:font-size="10.5pt" style:font-size-asian="10.5pt" fo:background-color="#121314"/>
    </style:style>
    <style:style style:name="T497" style:parent-style-name="DefaultParagraphFont" style:family="text">
      <style:text-properties style:font-name="Droid Sans Mono" fo:color="#BBBEBF" fo:font-size="10.5pt" style:font-size-asian="10.5pt" fo:background-color="#121314"/>
    </style:style>
    <style:style style:name="T498" style:parent-style-name="DefaultParagraphFont" style:family="text">
      <style:text-properties style:font-name="Droid Sans Mono" fo:color="#A5D6FF" fo:font-size="10.5pt" style:font-size-asian="10.5pt" fo:background-color="#121314"/>
    </style:style>
    <style:style style:name="T499" style:parent-style-name="DefaultParagraphFont" style:family="text">
      <style:text-properties style:font-name="Droid Sans Mono" fo:color="#BBBEBF" fo:font-size="10.5pt" style:font-size-asian="10.5pt" fo:background-color="#121314"/>
    </style:style>
    <style:style style:name="T500" style:parent-style-name="DefaultParagraphFont" style:family="text">
      <style:text-properties style:font-name="Droid Sans Mono" fo:color="#B5CEA8" fo:font-size="10.5pt" style:font-size-asian="10.5pt" fo:background-color="#121314"/>
    </style:style>
    <style:style style:name="T501" style:parent-style-name="DefaultParagraphFont" style:family="text">
      <style:text-properties style:font-name="Droid Sans Mono" fo:color="#BBBEBF" fo:font-size="10.5pt" style:font-size-asian="10.5pt" fo:background-color="#121314"/>
    </style:style>
    <style:style style:name="T502" style:parent-style-name="DefaultParagraphFont" style:family="text">
      <style:text-properties style:font-name="Droid Sans Mono" fo:color="#B5CEA8" fo:font-size="10.5pt" style:font-size-asian="10.5pt" fo:background-color="#121314"/>
    </style:style>
    <style:style style:name="T503" style:parent-style-name="DefaultParagraphFont" style:family="text">
      <style:text-properties style:font-name="Droid Sans Mono" fo:color="#BBBEBF" fo:font-size="10.5pt" style:font-size-asian="10.5pt" fo:background-color="#121314"/>
    </style:style>
    <style:style style:name="T504" style:parent-style-name="DefaultParagraphFont" style:family="text">
      <style:text-properties style:font-name="Droid Sans Mono" fo:color="#FFA657" fo:font-size="10.5pt" style:font-size-asian="10.5pt" fo:background-color="#121314"/>
    </style:style>
    <style:style style:name="T505" style:parent-style-name="DefaultParagraphFont" style:family="text">
      <style:text-properties style:font-name="Droid Sans Mono" fo:color="#D4D4D4" fo:font-size="10.5pt" style:font-size-asian="10.5pt" fo:background-color="#121314"/>
    </style:style>
    <style:style style:name="T506" style:parent-style-name="DefaultParagraphFont" style:family="text">
      <style:text-properties style:font-name="Droid Sans Mono" fo:color="#569CD6" fo:font-size="10.5pt" style:font-size-asian="10.5pt" fo:background-color="#121314"/>
    </style:style>
    <style:style style:name="T507" style:parent-style-name="DefaultParagraphFont" style:family="text">
      <style:text-properties style:font-name="Droid Sans Mono" fo:color="#BBBEBF" fo:font-size="10.5pt" style:font-size-asian="10.5pt" fo:background-color="#121314"/>
    </style:style>
    <style:style style:name="P508" style:parent-style-name="Standard" style:family="paragraph">
      <style:paragraph-properties style:line-height-at-least="0.1979in"/>
    </style:style>
    <style:style style:name="T509" style:parent-style-name="DefaultParagraphFont" style:family="text">
      <style:text-properties style:font-name="Droid Sans Mono" fo:color="#C9D1D9" fo:font-size="10.5pt" style:font-size-asian="10.5pt" fo:background-color="#121314"/>
    </style:style>
    <style:style style:name="T510" style:parent-style-name="DefaultParagraphFont" style:family="text">
      <style:text-properties style:font-name="Droid Sans Mono" fo:color="#BBBEBF" fo:font-size="10.5pt" style:font-size-asian="10.5pt" fo:background-color="#121314"/>
    </style:style>
    <style:style style:name="T511" style:parent-style-name="DefaultParagraphFont" style:family="text">
      <style:text-properties style:font-name="Droid Sans Mono" fo:color="#D4D4D4" fo:font-size="10.5pt" style:font-size-asian="10.5pt" fo:background-color="#121314"/>
    </style:style>
    <style:style style:name="T512" style:parent-style-name="DefaultParagraphFont" style:family="text">
      <style:text-properties style:font-name="Droid Sans Mono" fo:color="#BBBEBF" fo:font-size="10.5pt" style:font-size-asian="10.5pt" fo:background-color="#121314"/>
    </style:style>
    <style:style style:name="T513" style:parent-style-name="DefaultParagraphFont" style:family="text">
      <style:text-properties style:font-name="Droid Sans Mono" fo:color="#B5CEA8" fo:font-size="10.5pt" style:font-size-asian="10.5pt" fo:background-color="#121314"/>
    </style:style>
    <style:style style:name="P514" style:parent-style-name="Standard" style:family="paragraph">
      <style:paragraph-properties style:line-height-at-least="0.1979in"/>
    </style:style>
    <style:style style:name="T515" style:parent-style-name="DefaultParagraphFont" style:family="text">
      <style:text-properties style:font-name="Droid Sans Mono" fo:color="#C9D1D9" fo:font-size="10.5pt" style:font-size-asian="10.5pt" fo:background-color="#121314"/>
    </style:style>
    <style:style style:name="T516" style:parent-style-name="DefaultParagraphFont" style:family="text">
      <style:text-properties style:font-name="Droid Sans Mono" fo:color="#BBBEBF" fo:font-size="10.5pt" style:font-size-asian="10.5pt" fo:background-color="#121314"/>
    </style:style>
    <style:style style:name="T517" style:parent-style-name="DefaultParagraphFont" style:family="text">
      <style:text-properties style:font-name="Droid Sans Mono" fo:color="#D4D4D4" fo:font-size="10.5pt" style:font-size-asian="10.5pt" fo:background-color="#121314"/>
    </style:style>
    <style:style style:name="T518" style:parent-style-name="DefaultParagraphFont" style:family="text">
      <style:text-properties style:font-name="Droid Sans Mono" fo:color="#BBBEBF" fo:font-size="10.5pt" style:font-size-asian="10.5pt" fo:background-color="#121314"/>
    </style:style>
    <style:style style:name="T519" style:parent-style-name="DefaultParagraphFont" style:family="text">
      <style:text-properties style:font-name="Droid Sans Mono" fo:color="#B5CEA8" fo:font-size="10.5pt" style:font-size-asian="10.5pt" fo:background-color="#121314"/>
    </style:style>
    <style:style style:name="P520" style:parent-style-name="Standard" style:family="paragraph">
      <style:paragraph-properties style:line-height-at-least="0.1979in"/>
      <style:text-properties style:font-name="Droid Sans Mono" fo:color="#BBBEBF" fo:font-size="10.5pt" style:font-size-asian="10.5pt" fo:background-color="#121314"/>
    </style:style>
    <style:style style:name="T521"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522" style:parent-style-name="DefaultParagraphFont" style:family="text">
      <style:text-properties style:font-name="Droid Sans Mono" fo:color="#C9D1D9" fo:font-size="10.5pt" style:font-size-asian="10.5pt" fo:background-color="#121314"/>
    </style:style>
    <style:style style:name="T523" style:parent-style-name="DefaultParagraphFont" style:family="text">
      <style:text-properties style:font-name="Droid Sans Mono" fo:color="#BBBEBF" fo:font-size="10.5pt" style:font-size-asian="10.5pt" fo:background-color="#121314"/>
    </style:style>
    <style:style style:name="T524" style:parent-style-name="DefaultParagraphFont" style:family="text">
      <style:text-properties style:font-name="Droid Sans Mono" fo:color="#A5D6FF" fo:font-size="10.5pt" style:font-size-asian="10.5pt" fo:background-color="#121314"/>
    </style:style>
    <style:style style:name="T525" style:parent-style-name="DefaultParagraphFont" style:family="text">
      <style:text-properties style:font-name="Droid Sans Mono" fo:color="#BBBEBF" fo:font-size="10.5pt" style:font-size-asian="10.5pt" fo:background-color="#121314"/>
    </style:style>
    <style:style style:name="T526" style:parent-style-name="DefaultParagraphFont" style:family="text">
      <style:text-properties style:font-name="Droid Sans Mono" fo:color="#D4D4D4" fo:font-size="10.5pt" style:font-size-asian="10.5pt" fo:background-color="#121314"/>
    </style:style>
    <style:style style:name="T527" style:parent-style-name="DefaultParagraphFont" style:family="text">
      <style:text-properties style:font-name="Droid Sans Mono" fo:color="#BBBEBF" fo:font-size="10.5pt" style:font-size-asian="10.5pt" fo:background-color="#121314"/>
    </style:style>
    <style:style style:name="T528" style:parent-style-name="DefaultParagraphFont" style:family="text">
      <style:text-properties style:font-name="Droid Sans Mono" fo:color="#FFA657" fo:font-size="10.5pt" style:font-size-asian="10.5pt" fo:background-color="#121314"/>
    </style:style>
    <style:style style:name="T529" style:parent-style-name="DefaultParagraphFont" style:family="text">
      <style:text-properties style:font-name="Droid Sans Mono" fo:color="#BBBEBF" fo:font-size="10.5pt" style:font-size-asian="10.5pt" fo:background-color="#121314"/>
    </style:style>
    <style:style style:name="T530" style:parent-style-name="DefaultParagraphFont" style:family="text">
      <style:text-properties style:font-name="Droid Sans Mono" fo:color="#D2A8FF" fo:font-size="10.5pt" style:font-size-asian="10.5pt" fo:background-color="#121314"/>
    </style:style>
    <style:style style:name="T531" style:parent-style-name="DefaultParagraphFont" style:family="text">
      <style:text-properties style:font-name="Droid Sans Mono" fo:color="#BBBEBF" fo:font-size="10.5pt" style:font-size-asian="10.5pt" fo:background-color="#121314"/>
    </style:style>
    <style:style style:name="T532" style:parent-style-name="DefaultParagraphFont" style:family="text">
      <style:text-properties style:font-name="Droid Sans Mono" fo:color="#A5D6FF" fo:font-size="10.5pt" style:font-size-asian="10.5pt" fo:background-color="#121314"/>
    </style:style>
    <style:style style:name="T533" style:parent-style-name="DefaultParagraphFont" style:family="text">
      <style:text-properties style:font-name="Droid Sans Mono" fo:color="#BBBEBF" fo:font-size="10.5pt" style:font-size-asian="10.5pt" fo:background-color="#121314"/>
    </style:style>
    <style:style style:name="T534" style:parent-style-name="DefaultParagraphFont" style:family="text">
      <style:text-properties style:font-name="Droid Sans Mono" fo:color="#B5CEA8" fo:font-size="10.5pt" style:font-size-asian="10.5pt" fo:background-color="#121314"/>
    </style:style>
    <style:style style:name="T535" style:parent-style-name="DefaultParagraphFont" style:family="text">
      <style:text-properties style:font-name="Droid Sans Mono" fo:color="#BBBEBF" fo:font-size="10.5pt" style:font-size-asian="10.5pt" fo:background-color="#121314"/>
    </style:style>
    <style:style style:name="T536" style:parent-style-name="DefaultParagraphFont" style:family="text">
      <style:text-properties style:font-name="Droid Sans Mono" fo:color="#B5CEA8" fo:font-size="10.5pt" style:font-size-asian="10.5pt" fo:background-color="#121314"/>
    </style:style>
    <style:style style:name="T537" style:parent-style-name="DefaultParagraphFont" style:family="text">
      <style:text-properties style:font-name="Droid Sans Mono" fo:color="#BBBEBF" fo:font-size="10.5pt" style:font-size-asian="10.5pt" fo:background-color="#121314"/>
    </style:style>
    <style:style style:name="P538" style:parent-style-name="Standard" style:family="paragraph">
      <style:paragraph-properties style:line-height-at-least="0.1979in"/>
    </style:style>
    <style:style style:name="T539" style:parent-style-name="DefaultParagraphFont" style:family="text">
      <style:text-properties style:font-name="Droid Sans Mono" fo:color="#C9D1D9" fo:font-size="10.5pt" style:font-size-asian="10.5pt" fo:background-color="#121314"/>
    </style:style>
    <style:style style:name="T540" style:parent-style-name="DefaultParagraphFont" style:family="text">
      <style:text-properties style:font-name="Droid Sans Mono" fo:color="#BBBEBF" fo:font-size="10.5pt" style:font-size-asian="10.5pt" fo:background-color="#121314"/>
    </style:style>
    <style:style style:name="T541" style:parent-style-name="DefaultParagraphFont" style:family="text">
      <style:text-properties style:font-name="Droid Sans Mono" fo:color="#A5D6FF" fo:font-size="10.5pt" style:font-size-asian="10.5pt" fo:background-color="#121314"/>
    </style:style>
    <style:style style:name="T542" style:parent-style-name="DefaultParagraphFont" style:family="text">
      <style:text-properties style:font-name="Droid Sans Mono" fo:color="#BBBEBF" fo:font-size="10.5pt" style:font-size-asian="10.5pt" fo:background-color="#121314"/>
    </style:style>
    <style:style style:name="T543" style:parent-style-name="DefaultParagraphFont" style:family="text">
      <style:text-properties style:font-name="Droid Sans Mono" fo:color="#D4D4D4" fo:font-size="10.5pt" style:font-size-asian="10.5pt" fo:background-color="#121314"/>
    </style:style>
    <style:style style:name="T544" style:parent-style-name="DefaultParagraphFont" style:family="text">
      <style:text-properties style:font-name="Droid Sans Mono" fo:color="#BBBEBF" fo:font-size="10.5pt" style:font-size-asian="10.5pt" fo:background-color="#121314"/>
    </style:style>
    <style:style style:name="T545" style:parent-style-name="DefaultParagraphFont" style:family="text">
      <style:text-properties style:font-name="Droid Sans Mono" fo:color="#FFA657" fo:font-size="10.5pt" style:font-size-asian="10.5pt" fo:background-color="#121314"/>
    </style:style>
    <style:style style:name="T546" style:parent-style-name="DefaultParagraphFont" style:family="text">
      <style:text-properties style:font-name="Droid Sans Mono" fo:color="#BBBEBF" fo:font-size="10.5pt" style:font-size-asian="10.5pt" fo:background-color="#121314"/>
    </style:style>
    <style:style style:name="T547" style:parent-style-name="DefaultParagraphFont" style:family="text">
      <style:text-properties style:font-name="Droid Sans Mono" fo:color="#D2A8FF" fo:font-size="10.5pt" style:font-size-asian="10.5pt" fo:background-color="#121314"/>
    </style:style>
    <style:style style:name="T548" style:parent-style-name="DefaultParagraphFont" style:family="text">
      <style:text-properties style:font-name="Droid Sans Mono" fo:color="#BBBEBF" fo:font-size="10.5pt" style:font-size-asian="10.5pt" fo:background-color="#121314"/>
    </style:style>
    <style:style style:name="T549" style:parent-style-name="DefaultParagraphFont" style:family="text">
      <style:text-properties style:font-name="Droid Sans Mono" fo:color="#A5D6FF" fo:font-size="10.5pt" style:font-size-asian="10.5pt" fo:background-color="#121314"/>
    </style:style>
    <style:style style:name="T550" style:parent-style-name="DefaultParagraphFont" style:family="text">
      <style:text-properties style:font-name="Droid Sans Mono" fo:color="#BBBEBF" fo:font-size="10.5pt" style:font-size-asian="10.5pt" fo:background-color="#121314"/>
    </style:style>
    <style:style style:name="T551" style:parent-style-name="DefaultParagraphFont" style:family="text">
      <style:text-properties style:font-name="Droid Sans Mono" fo:color="#B5CEA8" fo:font-size="10.5pt" style:font-size-asian="10.5pt" fo:background-color="#121314"/>
    </style:style>
    <style:style style:name="T552" style:parent-style-name="DefaultParagraphFont" style:family="text">
      <style:text-properties style:font-name="Droid Sans Mono" fo:color="#BBBEBF" fo:font-size="10.5pt" style:font-size-asian="10.5pt" fo:background-color="#121314"/>
    </style:style>
    <style:style style:name="T553" style:parent-style-name="DefaultParagraphFont" style:family="text">
      <style:text-properties style:font-name="Droid Sans Mono" fo:color="#B5CEA8" fo:font-size="10.5pt" style:font-size-asian="10.5pt" fo:background-color="#121314"/>
    </style:style>
    <style:style style:name="T554" style:parent-style-name="DefaultParagraphFont" style:family="text">
      <style:text-properties style:font-name="Droid Sans Mono" fo:color="#BBBEBF" fo:font-size="10.5pt" style:font-size-asian="10.5pt" fo:background-color="#121314"/>
    </style:style>
    <style:style style:name="P555" style:parent-style-name="Standard" style:family="paragraph">
      <style:paragraph-properties style:line-height-at-least="0.1979in"/>
    </style:style>
    <style:style style:name="T556" style:parent-style-name="DefaultParagraphFont" style:family="text">
      <style:text-properties style:font-name="Droid Sans Mono" fo:color="#C9D1D9" fo:font-size="10.5pt" style:font-size-asian="10.5pt" fo:background-color="#121314"/>
    </style:style>
    <style:style style:name="T557" style:parent-style-name="DefaultParagraphFont" style:family="text">
      <style:text-properties style:font-name="Droid Sans Mono" fo:color="#BBBEBF" fo:font-size="10.5pt" style:font-size-asian="10.5pt" fo:background-color="#121314"/>
    </style:style>
    <style:style style:name="T558" style:parent-style-name="DefaultParagraphFont" style:family="text">
      <style:text-properties style:font-name="Droid Sans Mono" fo:color="#A5D6FF" fo:font-size="10.5pt" style:font-size-asian="10.5pt" fo:background-color="#121314"/>
    </style:style>
    <style:style style:name="T559" style:parent-style-name="DefaultParagraphFont" style:family="text">
      <style:text-properties style:font-name="Droid Sans Mono" fo:color="#BBBEBF" fo:font-size="10.5pt" style:font-size-asian="10.5pt" fo:background-color="#121314"/>
    </style:style>
    <style:style style:name="T560" style:parent-style-name="DefaultParagraphFont" style:family="text">
      <style:text-properties style:font-name="Droid Sans Mono" fo:color="#D4D4D4" fo:font-size="10.5pt" style:font-size-asian="10.5pt" fo:background-color="#121314"/>
    </style:style>
    <style:style style:name="T561" style:parent-style-name="DefaultParagraphFont" style:family="text">
      <style:text-properties style:font-name="Droid Sans Mono" fo:color="#BBBEBF" fo:font-size="10.5pt" style:font-size-asian="10.5pt" fo:background-color="#121314"/>
    </style:style>
    <style:style style:name="T562" style:parent-style-name="DefaultParagraphFont" style:family="text">
      <style:text-properties style:font-name="Droid Sans Mono" fo:color="#FFA657" fo:font-size="10.5pt" style:font-size-asian="10.5pt" fo:background-color="#121314"/>
    </style:style>
    <style:style style:name="T563" style:parent-style-name="DefaultParagraphFont" style:family="text">
      <style:text-properties style:font-name="Droid Sans Mono" fo:color="#BBBEBF" fo:font-size="10.5pt" style:font-size-asian="10.5pt" fo:background-color="#121314"/>
    </style:style>
    <style:style style:name="T564" style:parent-style-name="DefaultParagraphFont" style:family="text">
      <style:text-properties style:font-name="Droid Sans Mono" fo:color="#D2A8FF" fo:font-size="10.5pt" style:font-size-asian="10.5pt" fo:background-color="#121314"/>
    </style:style>
    <style:style style:name="T565" style:parent-style-name="DefaultParagraphFont" style:family="text">
      <style:text-properties style:font-name="Droid Sans Mono" fo:color="#BBBEBF" fo:font-size="10.5pt" style:font-size-asian="10.5pt" fo:background-color="#121314"/>
    </style:style>
    <style:style style:name="T566" style:parent-style-name="DefaultParagraphFont" style:family="text">
      <style:text-properties style:font-name="Droid Sans Mono" fo:color="#A5D6FF" fo:font-size="10.5pt" style:font-size-asian="10.5pt" fo:background-color="#121314"/>
    </style:style>
    <style:style style:name="T567" style:parent-style-name="DefaultParagraphFont" style:family="text">
      <style:text-properties style:font-name="Droid Sans Mono" fo:color="#BBBEBF" fo:font-size="10.5pt" style:font-size-asian="10.5pt" fo:background-color="#121314"/>
    </style:style>
    <style:style style:name="T568" style:parent-style-name="DefaultParagraphFont" style:family="text">
      <style:text-properties style:font-name="Droid Sans Mono" fo:color="#C9D1D9" fo:font-size="10.5pt" style:font-size-asian="10.5pt" fo:background-color="#121314"/>
    </style:style>
    <style:style style:name="T569" style:parent-style-name="DefaultParagraphFont" style:family="text">
      <style:text-properties style:font-name="Droid Sans Mono" fo:color="#BBBEBF" fo:font-size="10.5pt" style:font-size-asian="10.5pt" fo:background-color="#121314"/>
    </style:style>
    <style:style style:name="T570" style:parent-style-name="DefaultParagraphFont" style:family="text">
      <style:text-properties style:font-name="Droid Sans Mono" fo:color="#A5D6FF" fo:font-size="10.5pt" style:font-size-asian="10.5pt" fo:background-color="#121314"/>
    </style:style>
    <style:style style:name="T571" style:parent-style-name="DefaultParagraphFont" style:family="text">
      <style:text-properties style:font-name="Droid Sans Mono" fo:color="#BBBEBF" fo:font-size="10.5pt" style:font-size-asian="10.5pt" fo:background-color="#121314"/>
    </style:style>
    <style:style style:name="T572" style:parent-style-name="DefaultParagraphFont" style:family="text">
      <style:text-properties style:font-name="Droid Sans Mono" fo:color="#B5CEA8" fo:font-size="10.5pt" style:font-size-asian="10.5pt" fo:background-color="#121314"/>
    </style:style>
    <style:style style:name="T573" style:parent-style-name="DefaultParagraphFont" style:family="text">
      <style:text-properties style:font-name="Droid Sans Mono" fo:color="#BBBEBF" fo:font-size="10.5pt" style:font-size-asian="10.5pt" fo:background-color="#121314"/>
    </style:style>
    <style:style style:name="T574" style:parent-style-name="DefaultParagraphFont" style:family="text">
      <style:text-properties style:font-name="Droid Sans Mono" fo:color="#8B949E" fo:font-size="10.5pt" style:font-size-asian="10.5pt" fo:background-color="#121314"/>
    </style:style>
    <style:style style:name="P575" style:parent-style-name="Standard" style:family="paragraph">
      <style:paragraph-properties style:line-height-at-least="0.1979in"/>
    </style:style>
    <style:style style:name="T576" style:parent-style-name="DefaultParagraphFont" style:family="text">
      <style:text-properties style:font-name="Droid Sans Mono" fo:color="#C9D1D9" fo:font-size="10.5pt" style:font-size-asian="10.5pt" fo:background-color="#121314"/>
    </style:style>
    <style:style style:name="T577" style:parent-style-name="DefaultParagraphFont" style:family="text">
      <style:text-properties style:font-name="Droid Sans Mono" fo:color="#BBBEBF" fo:font-size="10.5pt" style:font-size-asian="10.5pt" fo:background-color="#121314"/>
    </style:style>
    <style:style style:name="T578" style:parent-style-name="DefaultParagraphFont" style:family="text">
      <style:text-properties style:font-name="Droid Sans Mono" fo:color="#A5D6FF" fo:font-size="10.5pt" style:font-size-asian="10.5pt" fo:background-color="#121314"/>
    </style:style>
    <style:style style:name="T579" style:parent-style-name="DefaultParagraphFont" style:family="text">
      <style:text-properties style:font-name="Droid Sans Mono" fo:color="#BBBEBF" fo:font-size="10.5pt" style:font-size-asian="10.5pt" fo:background-color="#121314"/>
    </style:style>
    <style:style style:name="T580" style:parent-style-name="DefaultParagraphFont" style:family="text">
      <style:text-properties style:font-name="Droid Sans Mono" fo:color="#D4D4D4" fo:font-size="10.5pt" style:font-size-asian="10.5pt" fo:background-color="#121314"/>
    </style:style>
    <style:style style:name="T581" style:parent-style-name="DefaultParagraphFont" style:family="text">
      <style:text-properties style:font-name="Droid Sans Mono" fo:color="#BBBEBF" fo:font-size="10.5pt" style:font-size-asian="10.5pt" fo:background-color="#121314"/>
    </style:style>
    <style:style style:name="T582" style:parent-style-name="DefaultParagraphFont" style:family="text">
      <style:text-properties style:font-name="Droid Sans Mono" fo:color="#FFA657" fo:font-size="10.5pt" style:font-size-asian="10.5pt" fo:background-color="#121314"/>
    </style:style>
    <style:style style:name="T583" style:parent-style-name="DefaultParagraphFont" style:family="text">
      <style:text-properties style:font-name="Droid Sans Mono" fo:color="#BBBEBF" fo:font-size="10.5pt" style:font-size-asian="10.5pt" fo:background-color="#121314"/>
    </style:style>
    <style:style style:name="T584" style:parent-style-name="DefaultParagraphFont" style:family="text">
      <style:text-properties style:font-name="Droid Sans Mono" fo:color="#D2A8FF" fo:font-size="10.5pt" style:font-size-asian="10.5pt" fo:background-color="#121314"/>
    </style:style>
    <style:style style:name="T585" style:parent-style-name="DefaultParagraphFont" style:family="text">
      <style:text-properties style:font-name="Droid Sans Mono" fo:color="#BBBEBF" fo:font-size="10.5pt" style:font-size-asian="10.5pt" fo:background-color="#121314"/>
    </style:style>
    <style:style style:name="T586" style:parent-style-name="DefaultParagraphFont" style:family="text">
      <style:text-properties style:font-name="Droid Sans Mono" fo:color="#A5D6FF" fo:font-size="10.5pt" style:font-size-asian="10.5pt" fo:background-color="#121314"/>
    </style:style>
    <style:style style:name="T587" style:parent-style-name="DefaultParagraphFont" style:family="text">
      <style:text-properties style:font-name="Droid Sans Mono" fo:color="#BBBEBF" fo:font-size="10.5pt" style:font-size-asian="10.5pt" fo:background-color="#121314"/>
    </style:style>
    <style:style style:name="T588" style:parent-style-name="DefaultParagraphFont" style:family="text">
      <style:text-properties style:font-name="Droid Sans Mono" fo:color="#B5CEA8" fo:font-size="10.5pt" style:font-size-asian="10.5pt" fo:background-color="#121314"/>
    </style:style>
    <style:style style:name="T589" style:parent-style-name="DefaultParagraphFont" style:family="text">
      <style:text-properties style:font-name="Droid Sans Mono" fo:color="#BBBEBF" fo:font-size="10.5pt" style:font-size-asian="10.5pt" fo:background-color="#121314"/>
    </style:style>
    <style:style style:name="T590" style:parent-style-name="DefaultParagraphFont" style:family="text">
      <style:text-properties style:font-name="Droid Sans Mono" fo:color="#B5CEA8" fo:font-size="10.5pt" style:font-size-asian="10.5pt" fo:background-color="#121314"/>
    </style:style>
    <style:style style:name="T591" style:parent-style-name="DefaultParagraphFont" style:family="text">
      <style:text-properties style:font-name="Droid Sans Mono" fo:color="#BBBEBF" fo:font-size="10.5pt" style:font-size-asian="10.5pt" fo:background-color="#121314"/>
    </style:style>
    <style:style style:name="T592" style:parent-style-name="DefaultParagraphFont" style:family="text">
      <style:text-properties style:font-name="Droid Sans Mono" fo:color="#FFA657" fo:font-size="10.5pt" style:font-size-asian="10.5pt" fo:background-color="#121314"/>
    </style:style>
    <style:style style:name="T593" style:parent-style-name="DefaultParagraphFont" style:family="text">
      <style:text-properties style:font-name="Droid Sans Mono" fo:color="#D4D4D4" fo:font-size="10.5pt" style:font-size-asian="10.5pt" fo:background-color="#121314"/>
    </style:style>
    <style:style style:name="T594" style:parent-style-name="DefaultParagraphFont" style:family="text">
      <style:text-properties style:font-name="Droid Sans Mono" fo:color="#569CD6" fo:font-size="10.5pt" style:font-size-asian="10.5pt" fo:background-color="#121314"/>
    </style:style>
    <style:style style:name="T595" style:parent-style-name="DefaultParagraphFont" style:family="text">
      <style:text-properties style:font-name="Droid Sans Mono" fo:color="#BBBEBF" fo:font-size="10.5pt" style:font-size-asian="10.5pt" fo:background-color="#121314"/>
    </style:style>
    <style:style style:name="T596" style:parent-style-name="DefaultParagraphFont" style:family="text">
      <style:text-properties style:font-name="Droid Sans Mono" fo:color="#C9D1D9" fo:font-size="10.5pt" style:font-size-asian="10.5pt" fo:background-color="#121314"/>
    </style:style>
    <style:style style:name="T597" style:parent-style-name="DefaultParagraphFont" style:family="text">
      <style:text-properties style:font-name="Droid Sans Mono" fo:color="#BBBEBF" fo:font-size="10.5pt" style:font-size-asian="10.5pt" fo:background-color="#121314"/>
    </style:style>
    <style:style style:name="T598" style:parent-style-name="DefaultParagraphFont" style:family="text">
      <style:text-properties style:font-name="Droid Sans Mono" fo:color="#A5D6FF" fo:font-size="10.5pt" style:font-size-asian="10.5pt" fo:background-color="#121314"/>
    </style:style>
    <style:style style:name="T599" style:parent-style-name="DefaultParagraphFont" style:family="text">
      <style:text-properties style:font-name="Droid Sans Mono" fo:color="#BBBEBF" fo:font-size="10.5pt" style:font-size-asian="10.5pt" fo:background-color="#121314"/>
    </style:style>
    <style:style style:name="T600" style:parent-style-name="DefaultParagraphFont" style:family="text">
      <style:text-properties style:font-name="Droid Sans Mono" fo:color="#D4D4D4" fo:font-size="10.5pt" style:font-size-asian="10.5pt" fo:background-color="#121314"/>
    </style:style>
    <style:style style:name="T601" style:parent-style-name="DefaultParagraphFont" style:family="text">
      <style:text-properties style:font-name="Droid Sans Mono" fo:color="#BBBEBF" fo:font-size="10.5pt" style:font-size-asian="10.5pt" fo:background-color="#121314"/>
    </style:style>
    <style:style style:name="T602" style:parent-style-name="DefaultParagraphFont" style:family="text">
      <style:text-properties style:font-name="Droid Sans Mono" fo:color="#FFA657" fo:font-size="10.5pt" style:font-size-asian="10.5pt" fo:background-color="#121314"/>
    </style:style>
    <style:style style:name="T603" style:parent-style-name="DefaultParagraphFont" style:family="text">
      <style:text-properties style:font-name="Droid Sans Mono" fo:color="#BBBEBF" fo:font-size="10.5pt" style:font-size-asian="10.5pt" fo:background-color="#121314"/>
    </style:style>
    <style:style style:name="T604" style:parent-style-name="DefaultParagraphFont" style:family="text">
      <style:text-properties style:font-name="Droid Sans Mono" fo:color="#D2A8FF" fo:font-size="10.5pt" style:font-size-asian="10.5pt" fo:background-color="#121314"/>
    </style:style>
    <style:style style:name="T605" style:parent-style-name="DefaultParagraphFont" style:family="text">
      <style:text-properties style:font-name="Droid Sans Mono" fo:color="#BBBEBF" fo:font-size="10.5pt" style:font-size-asian="10.5pt" fo:background-color="#121314"/>
    </style:style>
    <style:style style:name="T606" style:parent-style-name="DefaultParagraphFont" style:family="text">
      <style:text-properties style:font-name="Droid Sans Mono" fo:color="#A5D6FF" fo:font-size="10.5pt" style:font-size-asian="10.5pt" fo:background-color="#121314"/>
    </style:style>
    <style:style style:name="T607" style:parent-style-name="DefaultParagraphFont" style:family="text">
      <style:text-properties style:font-name="Droid Sans Mono" fo:color="#BBBEBF" fo:font-size="10.5pt" style:font-size-asian="10.5pt" fo:background-color="#121314"/>
    </style:style>
    <style:style style:name="T608" style:parent-style-name="DefaultParagraphFont" style:family="text">
      <style:text-properties style:font-name="Droid Sans Mono" fo:color="#B5CEA8" fo:font-size="10.5pt" style:font-size-asian="10.5pt" fo:background-color="#121314"/>
    </style:style>
    <style:style style:name="T609" style:parent-style-name="DefaultParagraphFont" style:family="text">
      <style:text-properties style:font-name="Droid Sans Mono" fo:color="#BBBEBF" fo:font-size="10.5pt" style:font-size-asian="10.5pt" fo:background-color="#121314"/>
    </style:style>
    <style:style style:name="T610" style:parent-style-name="DefaultParagraphFont" style:family="text">
      <style:text-properties style:font-name="Droid Sans Mono" fo:color="#B5CEA8" fo:font-size="10.5pt" style:font-size-asian="10.5pt" fo:background-color="#121314"/>
    </style:style>
    <style:style style:name="T611" style:parent-style-name="DefaultParagraphFont" style:family="text">
      <style:text-properties style:font-name="Droid Sans Mono" fo:color="#BBBEBF" fo:font-size="10.5pt" style:font-size-asian="10.5pt" fo:background-color="#121314"/>
    </style:style>
    <style:style style:name="P612" style:parent-style-name="Standard" style:family="paragraph">
      <style:paragraph-properties style:line-height-at-least="0.1979in"/>
    </style:style>
    <style:style style:name="T613" style:parent-style-name="DefaultParagraphFont" style:family="text">
      <style:text-properties style:font-name="Droid Sans Mono" fo:color="#C9D1D9" fo:font-size="10.5pt" style:font-size-asian="10.5pt" fo:background-color="#121314"/>
    </style:style>
    <style:style style:name="T614" style:parent-style-name="DefaultParagraphFont" style:family="text">
      <style:text-properties style:font-name="Droid Sans Mono" fo:color="#BBBEBF" fo:font-size="10.5pt" style:font-size-asian="10.5pt" fo:background-color="#121314"/>
    </style:style>
    <style:style style:name="T615" style:parent-style-name="DefaultParagraphFont" style:family="text">
      <style:text-properties style:font-name="Droid Sans Mono" fo:color="#A5D6FF" fo:font-size="10.5pt" style:font-size-asian="10.5pt" fo:background-color="#121314"/>
    </style:style>
    <style:style style:name="T616" style:parent-style-name="DefaultParagraphFont" style:family="text">
      <style:text-properties style:font-name="Droid Sans Mono" fo:color="#BBBEBF" fo:font-size="10.5pt" style:font-size-asian="10.5pt" fo:background-color="#121314"/>
    </style:style>
    <style:style style:name="T617" style:parent-style-name="DefaultParagraphFont" style:family="text">
      <style:text-properties style:font-name="Droid Sans Mono" fo:color="#D4D4D4" fo:font-size="10.5pt" style:font-size-asian="10.5pt" fo:background-color="#121314"/>
    </style:style>
    <style:style style:name="T618" style:parent-style-name="DefaultParagraphFont" style:family="text">
      <style:text-properties style:font-name="Droid Sans Mono" fo:color="#BBBEBF" fo:font-size="10.5pt" style:font-size-asian="10.5pt" fo:background-color="#121314"/>
    </style:style>
    <style:style style:name="T619" style:parent-style-name="DefaultParagraphFont" style:family="text">
      <style:text-properties style:font-name="Droid Sans Mono" fo:color="#FFA657" fo:font-size="10.5pt" style:font-size-asian="10.5pt" fo:background-color="#121314"/>
    </style:style>
    <style:style style:name="T620" style:parent-style-name="DefaultParagraphFont" style:family="text">
      <style:text-properties style:font-name="Droid Sans Mono" fo:color="#BBBEBF" fo:font-size="10.5pt" style:font-size-asian="10.5pt" fo:background-color="#121314"/>
    </style:style>
    <style:style style:name="T621" style:parent-style-name="DefaultParagraphFont" style:family="text">
      <style:text-properties style:font-name="Droid Sans Mono" fo:color="#D2A8FF" fo:font-size="10.5pt" style:font-size-asian="10.5pt" fo:background-color="#121314"/>
    </style:style>
    <style:style style:name="T622" style:parent-style-name="DefaultParagraphFont" style:family="text">
      <style:text-properties style:font-name="Droid Sans Mono" fo:color="#BBBEBF" fo:font-size="10.5pt" style:font-size-asian="10.5pt" fo:background-color="#121314"/>
    </style:style>
    <style:style style:name="T623" style:parent-style-name="DefaultParagraphFont" style:family="text">
      <style:text-properties style:font-name="Droid Sans Mono" fo:color="#A5D6FF" fo:font-size="10.5pt" style:font-size-asian="10.5pt" fo:background-color="#121314"/>
    </style:style>
    <style:style style:name="T624" style:parent-style-name="DefaultParagraphFont" style:family="text">
      <style:text-properties style:font-name="Droid Sans Mono" fo:color="#BBBEBF" fo:font-size="10.5pt" style:font-size-asian="10.5pt" fo:background-color="#121314"/>
    </style:style>
    <style:style style:name="T625" style:parent-style-name="DefaultParagraphFont" style:family="text">
      <style:text-properties style:font-name="Droid Sans Mono" fo:color="#B5CEA8" fo:font-size="10.5pt" style:font-size-asian="10.5pt" fo:background-color="#121314"/>
    </style:style>
    <style:style style:name="T626" style:parent-style-name="DefaultParagraphFont" style:family="text">
      <style:text-properties style:font-name="Droid Sans Mono" fo:color="#BBBEBF" fo:font-size="10.5pt" style:font-size-asian="10.5pt" fo:background-color="#121314"/>
    </style:style>
    <style:style style:name="T627" style:parent-style-name="DefaultParagraphFont" style:family="text">
      <style:text-properties style:font-name="Droid Sans Mono" fo:color="#B5CEA8" fo:font-size="10.5pt" style:font-size-asian="10.5pt" fo:background-color="#121314"/>
    </style:style>
    <style:style style:name="T628" style:parent-style-name="DefaultParagraphFont" style:family="text">
      <style:text-properties style:font-name="Droid Sans Mono" fo:color="#BBBEBF" fo:font-size="10.5pt" style:font-size-asian="10.5pt" fo:background-color="#121314"/>
    </style:style>
    <style:style style:name="P629" style:parent-style-name="Standard" style:family="paragraph">
      <style:paragraph-properties style:line-height-at-least="0.1979in"/>
    </style:style>
    <style:style style:name="T630" style:parent-style-name="DefaultParagraphFont" style:family="text">
      <style:text-properties style:font-name="Droid Sans Mono" fo:color="#C9D1D9" fo:font-size="10.5pt" style:font-size-asian="10.5pt" fo:background-color="#121314"/>
    </style:style>
    <style:style style:name="T631" style:parent-style-name="DefaultParagraphFont" style:family="text">
      <style:text-properties style:font-name="Droid Sans Mono" fo:color="#BBBEBF" fo:font-size="10.5pt" style:font-size-asian="10.5pt" fo:background-color="#121314"/>
    </style:style>
    <style:style style:name="T632" style:parent-style-name="DefaultParagraphFont" style:family="text">
      <style:text-properties style:font-name="Droid Sans Mono" fo:color="#A5D6FF" fo:font-size="10.5pt" style:font-size-asian="10.5pt" fo:background-color="#121314"/>
    </style:style>
    <style:style style:name="T633" style:parent-style-name="DefaultParagraphFont" style:family="text">
      <style:text-properties style:font-name="Droid Sans Mono" fo:color="#BBBEBF" fo:font-size="10.5pt" style:font-size-asian="10.5pt" fo:background-color="#121314"/>
    </style:style>
    <style:style style:name="T634" style:parent-style-name="DefaultParagraphFont" style:family="text">
      <style:text-properties style:font-name="Droid Sans Mono" fo:color="#D4D4D4" fo:font-size="10.5pt" style:font-size-asian="10.5pt" fo:background-color="#121314"/>
    </style:style>
    <style:style style:name="T635" style:parent-style-name="DefaultParagraphFont" style:family="text">
      <style:text-properties style:font-name="Droid Sans Mono" fo:color="#BBBEBF" fo:font-size="10.5pt" style:font-size-asian="10.5pt" fo:background-color="#121314"/>
    </style:style>
    <style:style style:name="T636" style:parent-style-name="DefaultParagraphFont" style:family="text">
      <style:text-properties style:font-name="Droid Sans Mono" fo:color="#FFA657" fo:font-size="10.5pt" style:font-size-asian="10.5pt" fo:background-color="#121314"/>
    </style:style>
    <style:style style:name="T637" style:parent-style-name="DefaultParagraphFont" style:family="text">
      <style:text-properties style:font-name="Droid Sans Mono" fo:color="#BBBEBF" fo:font-size="10.5pt" style:font-size-asian="10.5pt" fo:background-color="#121314"/>
    </style:style>
    <style:style style:name="T638" style:parent-style-name="DefaultParagraphFont" style:family="text">
      <style:text-properties style:font-name="Droid Sans Mono" fo:color="#D2A8FF" fo:font-size="10.5pt" style:font-size-asian="10.5pt" fo:background-color="#121314"/>
    </style:style>
    <style:style style:name="T639" style:parent-style-name="DefaultParagraphFont" style:family="text">
      <style:text-properties style:font-name="Droid Sans Mono" fo:color="#BBBEBF" fo:font-size="10.5pt" style:font-size-asian="10.5pt" fo:background-color="#121314"/>
    </style:style>
    <style:style style:name="T640" style:parent-style-name="DefaultParagraphFont" style:family="text">
      <style:text-properties style:font-name="Droid Sans Mono" fo:color="#A5D6FF" fo:font-size="10.5pt" style:font-size-asian="10.5pt" fo:background-color="#121314"/>
    </style:style>
    <style:style style:name="T641" style:parent-style-name="DefaultParagraphFont" style:family="text">
      <style:text-properties style:font-name="Droid Sans Mono" fo:color="#BBBEBF" fo:font-size="10.5pt" style:font-size-asian="10.5pt" fo:background-color="#121314"/>
    </style:style>
    <style:style style:name="T642" style:parent-style-name="DefaultParagraphFont" style:family="text">
      <style:text-properties style:font-name="Droid Sans Mono" fo:color="#C9D1D9" fo:font-size="10.5pt" style:font-size-asian="10.5pt" fo:background-color="#121314"/>
    </style:style>
    <style:style style:name="T643" style:parent-style-name="DefaultParagraphFont" style:family="text">
      <style:text-properties style:font-name="Droid Sans Mono" fo:color="#BBBEBF" fo:font-size="10.5pt" style:font-size-asian="10.5pt" fo:background-color="#121314"/>
    </style:style>
    <style:style style:name="T644" style:parent-style-name="DefaultParagraphFont" style:family="text">
      <style:text-properties style:font-name="Droid Sans Mono" fo:color="#A5D6FF" fo:font-size="10.5pt" style:font-size-asian="10.5pt" fo:background-color="#121314"/>
    </style:style>
    <style:style style:name="T645" style:parent-style-name="DefaultParagraphFont" style:family="text">
      <style:text-properties style:font-name="Droid Sans Mono" fo:color="#BBBEBF" fo:font-size="10.5pt" style:font-size-asian="10.5pt" fo:background-color="#121314"/>
    </style:style>
    <style:style style:name="T646" style:parent-style-name="DefaultParagraphFont" style:family="text">
      <style:text-properties style:font-name="Droid Sans Mono" fo:color="#B5CEA8" fo:font-size="10.5pt" style:font-size-asian="10.5pt" fo:background-color="#121314"/>
    </style:style>
    <style:style style:name="T647" style:parent-style-name="DefaultParagraphFont" style:family="text">
      <style:text-properties style:font-name="Droid Sans Mono" fo:color="#BBBEBF" fo:font-size="10.5pt" style:font-size-asian="10.5pt" fo:background-color="#121314"/>
    </style:style>
    <style:style style:name="T648" style:parent-style-name="DefaultParagraphFont" style:family="text">
      <style:text-properties style:font-name="Droid Sans Mono" fo:color="#8B949E" fo:font-size="10.5pt" style:font-size-asian="10.5pt" fo:background-color="#121314"/>
    </style:style>
    <style:style style:name="P649" style:parent-style-name="Standard" style:family="paragraph">
      <style:paragraph-properties style:line-height-at-least="0.1979in"/>
    </style:style>
    <style:style style:name="T650" style:parent-style-name="DefaultParagraphFont" style:family="text">
      <style:text-properties style:font-name="Droid Sans Mono" fo:color="#C9D1D9" fo:font-size="10.5pt" style:font-size-asian="10.5pt" fo:background-color="#121314"/>
    </style:style>
    <style:style style:name="T651" style:parent-style-name="DefaultParagraphFont" style:family="text">
      <style:text-properties style:font-name="Droid Sans Mono" fo:color="#BBBEBF" fo:font-size="10.5pt" style:font-size-asian="10.5pt" fo:background-color="#121314"/>
    </style:style>
    <style:style style:name="T652" style:parent-style-name="DefaultParagraphFont" style:family="text">
      <style:text-properties style:font-name="Droid Sans Mono" fo:color="#A5D6FF" fo:font-size="10.5pt" style:font-size-asian="10.5pt" fo:background-color="#121314"/>
    </style:style>
    <style:style style:name="T653" style:parent-style-name="DefaultParagraphFont" style:family="text">
      <style:text-properties style:font-name="Droid Sans Mono" fo:color="#BBBEBF" fo:font-size="10.5pt" style:font-size-asian="10.5pt" fo:background-color="#121314"/>
    </style:style>
    <style:style style:name="T654" style:parent-style-name="DefaultParagraphFont" style:family="text">
      <style:text-properties style:font-name="Droid Sans Mono" fo:color="#D4D4D4" fo:font-size="10.5pt" style:font-size-asian="10.5pt" fo:background-color="#121314"/>
    </style:style>
    <style:style style:name="T655" style:parent-style-name="DefaultParagraphFont" style:family="text">
      <style:text-properties style:font-name="Droid Sans Mono" fo:color="#BBBEBF" fo:font-size="10.5pt" style:font-size-asian="10.5pt" fo:background-color="#121314"/>
    </style:style>
    <style:style style:name="T656" style:parent-style-name="DefaultParagraphFont" style:family="text">
      <style:text-properties style:font-name="Droid Sans Mono" fo:color="#FFA657" fo:font-size="10.5pt" style:font-size-asian="10.5pt" fo:background-color="#121314"/>
    </style:style>
    <style:style style:name="T657" style:parent-style-name="DefaultParagraphFont" style:family="text">
      <style:text-properties style:font-name="Droid Sans Mono" fo:color="#BBBEBF" fo:font-size="10.5pt" style:font-size-asian="10.5pt" fo:background-color="#121314"/>
    </style:style>
    <style:style style:name="T658" style:parent-style-name="DefaultParagraphFont" style:family="text">
      <style:text-properties style:font-name="Droid Sans Mono" fo:color="#D2A8FF" fo:font-size="10.5pt" style:font-size-asian="10.5pt" fo:background-color="#121314"/>
    </style:style>
    <style:style style:name="T659" style:parent-style-name="DefaultParagraphFont" style:family="text">
      <style:text-properties style:font-name="Droid Sans Mono" fo:color="#BBBEBF" fo:font-size="10.5pt" style:font-size-asian="10.5pt" fo:background-color="#121314"/>
    </style:style>
    <style:style style:name="T660" style:parent-style-name="DefaultParagraphFont" style:family="text">
      <style:text-properties style:font-name="Droid Sans Mono" fo:color="#A5D6FF" fo:font-size="10.5pt" style:font-size-asian="10.5pt" fo:background-color="#121314"/>
    </style:style>
    <style:style style:name="T661" style:parent-style-name="DefaultParagraphFont" style:family="text">
      <style:text-properties style:font-name="Droid Sans Mono" fo:color="#BBBEBF" fo:font-size="10.5pt" style:font-size-asian="10.5pt" fo:background-color="#121314"/>
    </style:style>
    <style:style style:name="T662" style:parent-style-name="DefaultParagraphFont" style:family="text">
      <style:text-properties style:font-name="Droid Sans Mono" fo:color="#B5CEA8" fo:font-size="10.5pt" style:font-size-asian="10.5pt" fo:background-color="#121314"/>
    </style:style>
    <style:style style:name="T663" style:parent-style-name="DefaultParagraphFont" style:family="text">
      <style:text-properties style:font-name="Droid Sans Mono" fo:color="#BBBEBF" fo:font-size="10.5pt" style:font-size-asian="10.5pt" fo:background-color="#121314"/>
    </style:style>
    <style:style style:name="T664" style:parent-style-name="DefaultParagraphFont" style:family="text">
      <style:text-properties style:font-name="Droid Sans Mono" fo:color="#B5CEA8" fo:font-size="10.5pt" style:font-size-asian="10.5pt" fo:background-color="#121314"/>
    </style:style>
    <style:style style:name="T665" style:parent-style-name="DefaultParagraphFont" style:family="text">
      <style:text-properties style:font-name="Droid Sans Mono" fo:color="#BBBEBF" fo:font-size="10.5pt" style:font-size-asian="10.5pt" fo:background-color="#121314"/>
    </style:style>
    <style:style style:name="T666" style:parent-style-name="DefaultParagraphFont" style:family="text">
      <style:text-properties style:font-name="Droid Sans Mono" fo:color="#FFA657" fo:font-size="10.5pt" style:font-size-asian="10.5pt" fo:background-color="#121314"/>
    </style:style>
    <style:style style:name="T667" style:parent-style-name="DefaultParagraphFont" style:family="text">
      <style:text-properties style:font-name="Droid Sans Mono" fo:color="#D4D4D4" fo:font-size="10.5pt" style:font-size-asian="10.5pt" fo:background-color="#121314"/>
    </style:style>
    <style:style style:name="T668" style:parent-style-name="DefaultParagraphFont" style:family="text">
      <style:text-properties style:font-name="Droid Sans Mono" fo:color="#569CD6" fo:font-size="10.5pt" style:font-size-asian="10.5pt" fo:background-color="#121314"/>
    </style:style>
    <style:style style:name="T669" style:parent-style-name="DefaultParagraphFont" style:family="text">
      <style:text-properties style:font-name="Droid Sans Mono" fo:color="#BBBEBF" fo:font-size="10.5pt" style:font-size-asian="10.5pt" fo:background-color="#121314"/>
    </style:style>
    <style:style style:name="P670" style:parent-style-name="Standard" style:family="paragraph">
      <style:paragraph-properties style:line-height-at-least="0.1979in"/>
      <style:text-properties style:font-name="Droid Sans Mono" fo:color="#BBBEBF" fo:font-size="10.5pt" style:font-size-asian="10.5pt" fo:background-color="#121314"/>
    </style:style>
    <style:style style:name="P671" style:parent-style-name="Standard" style:family="paragraph">
      <style:paragraph-properties style:line-height-at-least="0.1979in"/>
    </style:style>
    <style:style style:name="P672" style:parent-style-name="Standard" style:family="paragraph">
      <style:paragraph-properties style:line-height-at-least="0.1979in"/>
    </style:style>
    <style:style style:name="P673" style:parent-style-name="Standard" style:family="paragraph">
      <style:paragraph-properties style:line-height-at-least="0.1979in"/>
    </style:style>
    <style:style style:name="P674" style:parent-style-name="Standard" style:family="paragraph">
      <style:paragraph-properties style:line-height-at-least="0.1979in"/>
    </style:style>
    <style:style style:name="P675" style:parent-style-name="Standard" style:family="paragraph">
      <style:paragraph-properties style:line-height-at-least="0.1979in"/>
    </style:style>
    <style:style style:name="P676" style:parent-style-name="Standard" style:family="paragraph">
      <style:paragraph-properties style:line-height-at-least="0.1979in"/>
    </style:style>
    <style:style style:name="P677" style:parent-style-name="Standard" style:family="paragraph">
      <style:paragraph-properties style:line-height-at-least="0.1979in"/>
    </style:style>
    <style:style style:name="P678" style:parent-style-name="Standard" style:family="paragraph">
      <style:paragraph-properties style:line-height-at-least="0.1979in"/>
    </style:style>
    <style:style style:name="P679" style:parent-style-name="Standard" style:family="paragraph">
      <style:paragraph-properties style:line-height-at-least="0.1979in"/>
    </style:style>
    <style:style style:name="P680" style:parent-style-name="Standard" style:family="paragraph">
      <style:paragraph-properties style:line-height-at-least="0.1979in"/>
    </style:style>
    <style:style style:name="P681" style:parent-style-name="Standard" style:family="paragraph">
      <style:paragraph-properties style:line-height-at-least="0.1979in"/>
    </style:style>
    <style:style style:name="P682" style:parent-style-name="Standard" style:family="paragraph">
      <style:paragraph-properties style:line-height-at-least="0.1979in"/>
    </style:style>
    <style:style style:name="P683" style:parent-style-name="Standard" style:family="paragraph">
      <style:paragraph-properties style:line-height-at-least="0.1979in"/>
    </style:style>
    <style:style style:name="P684" style:parent-style-name="Standard" style:family="paragraph">
      <style:paragraph-properties style:line-height-at-least="0.1979in"/>
    </style:style>
    <style:style style:name="P685" style:parent-style-name="Standard" style:family="paragraph">
      <style:paragraph-properties style:line-height-at-least="0.1979in"/>
    </style:style>
    <style:style style:name="P686" style:parent-style-name="Standard" style:family="paragraph">
      <style:paragraph-properties style:line-height-at-least="0.1979in"/>
    </style:style>
    <style:style style:name="P687" style:parent-style-name="Standard" style:family="paragraph">
      <style:paragraph-properties style:line-height-at-least="0.1979in"/>
    </style:style>
    <style:style style:name="P688" style:parent-style-name="Standard" style:family="paragraph">
      <style:paragraph-properties style:line-height-at-least="0.1979in"/>
    </style:style>
    <style:style style:name="P689" style:parent-style-name="Standard" style:family="paragraph">
      <style:paragraph-properties style:line-height-at-least="0.1979in"/>
    </style:style>
    <style:style style:name="P690" style:parent-style-name="Standard" style:family="paragraph">
      <style:paragraph-properties style:line-height-at-least="0.1979in"/>
    </style:style>
    <style:style style:name="P691" style:parent-style-name="Standard" style:family="paragraph">
      <style:paragraph-properties style:line-height-at-least="0.1979in"/>
    </style:style>
    <style:style style:name="P692" style:parent-style-name="Standard" style:family="paragraph">
      <style:paragraph-properties style:line-height-at-least="0.1979in"/>
    </style:style>
    <style:style style:name="P693" style:parent-style-name="Standard" style:family="paragraph">
      <style:paragraph-properties style:line-height-at-least="0.1979in"/>
    </style:style>
    <style:style style:name="P694" style:parent-style-name="Standard" style:family="paragraph">
      <style:paragraph-properties style:line-height-at-least="0.1979in"/>
    </style:style>
    <style:style style:name="P695" style:parent-style-name="Standard" style:family="paragraph">
      <style:paragraph-properties style:line-height-at-least="0.1979in"/>
    </style:style>
    <style:style style:name="P696" style:parent-style-name="Standard" style:family="paragraph">
      <style:paragraph-properties style:line-height-at-least="0.1979in"/>
    </style:style>
    <style:style style:name="P697" style:parent-style-name="Standard" style:family="paragraph">
      <style:paragraph-properties style:line-height-at-least="0.1979in"/>
    </style:style>
    <style:style style:name="P698" style:parent-style-name="Standard" style:family="paragraph">
      <style:paragraph-properties style:line-height-at-least="0.1979in"/>
    </style:style>
    <style:style style:name="P699" style:parent-style-name="Standard" style:family="paragraph">
      <style:paragraph-properties style:line-height-at-least="0.1979in"/>
    </style:style>
    <style:style style:name="P700" style:parent-style-name="Standard" style:family="paragraph">
      <style:paragraph-properties style:line-height-at-least="0.1979in"/>
    </style:style>
    <style:style style:name="P701" style:parent-style-name="Standard" style:family="paragraph">
      <style:paragraph-properties style:line-height-at-least="0.1979in"/>
    </style:style>
    <style:style style:name="P702" style:parent-style-name="Standard" style:family="paragraph">
      <style:paragraph-properties style:line-height-at-least="0.1979in"/>
    </style:style>
    <style:style style:name="P703" style:parent-style-name="Standard" style:family="paragraph">
      <style:paragraph-properties style:line-height-at-least="0.1979in"/>
    </style:style>
    <style:style style:name="P704" style:parent-style-name="Standard" style:family="paragraph">
      <style:paragraph-properties style:line-height-at-least="0.1979in"/>
    </style:style>
    <style:style style:name="P705" style:parent-style-name="Standard" style:family="paragraph">
      <style:paragraph-properties style:line-height-at-least="0.1979in"/>
    </style:style>
    <style:style style:name="T706" style:parent-style-name="DefaultParagraphFont" style:family="text">
      <style:text-properties style:font-name="Droid Sans Mono" fo:color="#C9D1D9" fo:font-size="10.5pt" style:font-size-asian="10.5pt" fo:background-color="#121314"/>
    </style:style>
    <style:style style:name="T707" style:parent-style-name="DefaultParagraphFont" style:family="text">
      <style:text-properties style:font-name="Droid Sans Mono" fo:color="#BBBEBF" fo:font-size="10.5pt" style:font-size-asian="10.5pt" fo:background-color="#121314"/>
    </style:style>
    <style:style style:name="T708" style:parent-style-name="DefaultParagraphFont" style:family="text">
      <style:text-properties style:font-name="Droid Sans Mono" fo:color="#A5D6FF" fo:font-size="10.5pt" style:font-size-asian="10.5pt" fo:background-color="#121314"/>
    </style:style>
    <style:style style:name="T709" style:parent-style-name="DefaultParagraphFont" style:family="text">
      <style:text-properties style:font-name="Droid Sans Mono" fo:color="#BBBEBF" fo:font-size="10.5pt" style:font-size-asian="10.5pt" fo:background-color="#121314"/>
    </style:style>
    <style:style style:name="T710" style:parent-style-name="DefaultParagraphFont" style:family="text">
      <style:text-properties style:font-name="Droid Sans Mono" fo:color="#D4D4D4" fo:font-size="10.5pt" style:font-size-asian="10.5pt" fo:background-color="#121314"/>
    </style:style>
    <style:style style:name="T711" style:parent-style-name="DefaultParagraphFont" style:family="text">
      <style:text-properties style:font-name="Droid Sans Mono" fo:color="#BBBEBF" fo:font-size="10.5pt" style:font-size-asian="10.5pt" fo:background-color="#121314"/>
    </style:style>
    <style:style style:name="T712" style:parent-style-name="DefaultParagraphFont" style:family="text">
      <style:text-properties style:font-name="Droid Sans Mono" fo:color="#FFA657" fo:font-size="10.5pt" style:font-size-asian="10.5pt" fo:background-color="#121314"/>
    </style:style>
    <style:style style:name="T713" style:parent-style-name="DefaultParagraphFont" style:family="text">
      <style:text-properties style:font-name="Droid Sans Mono" fo:color="#BBBEBF" fo:font-size="10.5pt" style:font-size-asian="10.5pt" fo:background-color="#121314"/>
    </style:style>
    <style:style style:name="T714" style:parent-style-name="DefaultParagraphFont" style:family="text">
      <style:text-properties style:font-name="Droid Sans Mono" fo:color="#D2A8FF" fo:font-size="10.5pt" style:font-size-asian="10.5pt" fo:background-color="#121314"/>
    </style:style>
    <style:style style:name="T715" style:parent-style-name="DefaultParagraphFont" style:family="text">
      <style:text-properties style:font-name="Droid Sans Mono" fo:color="#BBBEBF" fo:font-size="10.5pt" style:font-size-asian="10.5pt" fo:background-color="#121314"/>
    </style:style>
    <style:style style:name="T716" style:parent-style-name="DefaultParagraphFont" style:family="text">
      <style:text-properties style:font-name="Droid Sans Mono" fo:color="#A5D6FF" fo:font-size="10.5pt" style:font-size-asian="10.5pt" fo:background-color="#121314"/>
    </style:style>
    <style:style style:name="T717" style:parent-style-name="DefaultParagraphFont" style:family="text">
      <style:text-properties style:font-name="Droid Sans Mono" fo:color="#BBBEBF" fo:font-size="10.5pt" style:font-size-asian="10.5pt" fo:background-color="#121314"/>
    </style:style>
    <style:style style:name="T718" style:parent-style-name="DefaultParagraphFont" style:family="text">
      <style:text-properties style:font-name="Droid Sans Mono" fo:color="#B5CEA8" fo:font-size="10.5pt" style:font-size-asian="10.5pt" fo:background-color="#121314"/>
    </style:style>
    <style:style style:name="T719" style:parent-style-name="DefaultParagraphFont" style:family="text">
      <style:text-properties style:font-name="Droid Sans Mono" fo:color="#BBBEBF" fo:font-size="10.5pt" style:font-size-asian="10.5pt" fo:background-color="#121314"/>
    </style:style>
    <style:style style:name="T720" style:parent-style-name="DefaultParagraphFont" style:family="text">
      <style:text-properties style:font-name="Droid Sans Mono" fo:color="#B5CEA8" fo:font-size="10.5pt" style:font-size-asian="10.5pt" fo:background-color="#121314"/>
    </style:style>
    <style:style style:name="T721" style:parent-style-name="DefaultParagraphFont" style:family="text">
      <style:text-properties style:font-name="Droid Sans Mono" fo:color="#BBBEBF" fo:font-size="10.5pt" style:font-size-asian="10.5pt" fo:background-color="#121314"/>
    </style:style>
    <style:style style:name="P722" style:parent-style-name="Standard" style:family="paragraph">
      <style:paragraph-properties style:line-height-at-least="0.1979in"/>
    </style:style>
    <style:style style:name="T723" style:parent-style-name="DefaultParagraphFont" style:family="text">
      <style:text-properties style:font-name="Droid Sans Mono" fo:color="#C9D1D9" fo:font-size="10.5pt" style:font-size-asian="10.5pt" fo:background-color="#121314"/>
    </style:style>
    <style:style style:name="T724" style:parent-style-name="DefaultParagraphFont" style:family="text">
      <style:text-properties style:font-name="Droid Sans Mono" fo:color="#BBBEBF" fo:font-size="10.5pt" style:font-size-asian="10.5pt" fo:background-color="#121314"/>
    </style:style>
    <style:style style:name="T725" style:parent-style-name="DefaultParagraphFont" style:family="text">
      <style:text-properties style:font-name="Droid Sans Mono" fo:color="#A5D6FF" fo:font-size="10.5pt" style:font-size-asian="10.5pt" fo:background-color="#121314"/>
    </style:style>
    <style:style style:name="T726" style:parent-style-name="DefaultParagraphFont" style:family="text">
      <style:text-properties style:font-name="Droid Sans Mono" fo:color="#BBBEBF" fo:font-size="10.5pt" style:font-size-asian="10.5pt" fo:background-color="#121314"/>
    </style:style>
    <style:style style:name="T727" style:parent-style-name="DefaultParagraphFont" style:family="text">
      <style:text-properties style:font-name="Droid Sans Mono" fo:color="#D4D4D4" fo:font-size="10.5pt" style:font-size-asian="10.5pt" fo:background-color="#121314"/>
    </style:style>
    <style:style style:name="T728" style:parent-style-name="DefaultParagraphFont" style:family="text">
      <style:text-properties style:font-name="Droid Sans Mono" fo:color="#BBBEBF" fo:font-size="10.5pt" style:font-size-asian="10.5pt" fo:background-color="#121314"/>
    </style:style>
    <style:style style:name="T729" style:parent-style-name="DefaultParagraphFont" style:family="text">
      <style:text-properties style:font-name="Droid Sans Mono" fo:color="#FFA657" fo:font-size="10.5pt" style:font-size-asian="10.5pt" fo:background-color="#121314"/>
    </style:style>
    <style:style style:name="T730" style:parent-style-name="DefaultParagraphFont" style:family="text">
      <style:text-properties style:font-name="Droid Sans Mono" fo:color="#BBBEBF" fo:font-size="10.5pt" style:font-size-asian="10.5pt" fo:background-color="#121314"/>
    </style:style>
    <style:style style:name="T731" style:parent-style-name="DefaultParagraphFont" style:family="text">
      <style:text-properties style:font-name="Droid Sans Mono" fo:color="#D2A8FF" fo:font-size="10.5pt" style:font-size-asian="10.5pt" fo:background-color="#121314"/>
    </style:style>
    <style:style style:name="T732" style:parent-style-name="DefaultParagraphFont" style:family="text">
      <style:text-properties style:font-name="Droid Sans Mono" fo:color="#BBBEBF" fo:font-size="10.5pt" style:font-size-asian="10.5pt" fo:background-color="#121314"/>
    </style:style>
    <style:style style:name="T733" style:parent-style-name="DefaultParagraphFont" style:family="text">
      <style:text-properties style:font-name="Droid Sans Mono" fo:color="#A5D6FF" fo:font-size="10.5pt" style:font-size-asian="10.5pt" fo:background-color="#121314"/>
    </style:style>
    <style:style style:name="T734" style:parent-style-name="DefaultParagraphFont" style:family="text">
      <style:text-properties style:font-name="Droid Sans Mono" fo:color="#BBBEBF" fo:font-size="10.5pt" style:font-size-asian="10.5pt" fo:background-color="#121314"/>
    </style:style>
    <style:style style:name="T735" style:parent-style-name="DefaultParagraphFont" style:family="text">
      <style:text-properties style:font-name="Droid Sans Mono" fo:color="#B5CEA8" fo:font-size="10.5pt" style:font-size-asian="10.5pt" fo:background-color="#121314"/>
    </style:style>
    <style:style style:name="T736" style:parent-style-name="DefaultParagraphFont" style:family="text">
      <style:text-properties style:font-name="Droid Sans Mono" fo:color="#BBBEBF" fo:font-size="10.5pt" style:font-size-asian="10.5pt" fo:background-color="#121314"/>
    </style:style>
    <style:style style:name="T737" style:parent-style-name="DefaultParagraphFont" style:family="text">
      <style:text-properties style:font-name="Droid Sans Mono" fo:color="#B5CEA8" fo:font-size="10.5pt" style:font-size-asian="10.5pt" fo:background-color="#121314"/>
    </style:style>
    <style:style style:name="T738" style:parent-style-name="DefaultParagraphFont" style:family="text">
      <style:text-properties style:font-name="Droid Sans Mono" fo:color="#BBBEBF" fo:font-size="10.5pt" style:font-size-asian="10.5pt" fo:background-color="#121314"/>
    </style:style>
    <style:style style:name="P739" style:parent-style-name="Standard" style:family="paragraph">
      <style:paragraph-properties style:line-height-at-least="0.1979in"/>
    </style:style>
    <style:style style:name="T740" style:parent-style-name="DefaultParagraphFont" style:family="text">
      <style:text-properties style:font-name="Droid Sans Mono" fo:color="#C9D1D9" fo:font-size="10.5pt" style:font-size-asian="10.5pt" fo:background-color="#121314"/>
    </style:style>
    <style:style style:name="T741" style:parent-style-name="DefaultParagraphFont" style:family="text">
      <style:text-properties style:font-name="Droid Sans Mono" fo:color="#BBBEBF" fo:font-size="10.5pt" style:font-size-asian="10.5pt" fo:background-color="#121314"/>
    </style:style>
    <style:style style:name="T742" style:parent-style-name="DefaultParagraphFont" style:family="text">
      <style:text-properties style:font-name="Droid Sans Mono" fo:color="#A5D6FF" fo:font-size="10.5pt" style:font-size-asian="10.5pt" fo:background-color="#121314"/>
    </style:style>
    <style:style style:name="T743" style:parent-style-name="DefaultParagraphFont" style:family="text">
      <style:text-properties style:font-name="Droid Sans Mono" fo:color="#BBBEBF" fo:font-size="10.5pt" style:font-size-asian="10.5pt" fo:background-color="#121314"/>
    </style:style>
    <style:style style:name="T744" style:parent-style-name="DefaultParagraphFont" style:family="text">
      <style:text-properties style:font-name="Droid Sans Mono" fo:color="#D4D4D4" fo:font-size="10.5pt" style:font-size-asian="10.5pt" fo:background-color="#121314"/>
    </style:style>
    <style:style style:name="T745" style:parent-style-name="DefaultParagraphFont" style:family="text">
      <style:text-properties style:font-name="Droid Sans Mono" fo:color="#BBBEBF" fo:font-size="10.5pt" style:font-size-asian="10.5pt" fo:background-color="#121314"/>
    </style:style>
    <style:style style:name="T746" style:parent-style-name="DefaultParagraphFont" style:family="text">
      <style:text-properties style:font-name="Droid Sans Mono" fo:color="#FFA657" fo:font-size="10.5pt" style:font-size-asian="10.5pt" fo:background-color="#121314"/>
    </style:style>
    <style:style style:name="T747" style:parent-style-name="DefaultParagraphFont" style:family="text">
      <style:text-properties style:font-name="Droid Sans Mono" fo:color="#BBBEBF" fo:font-size="10.5pt" style:font-size-asian="10.5pt" fo:background-color="#121314"/>
    </style:style>
    <style:style style:name="T748" style:parent-style-name="DefaultParagraphFont" style:family="text">
      <style:text-properties style:font-name="Droid Sans Mono" fo:color="#D2A8FF" fo:font-size="10.5pt" style:font-size-asian="10.5pt" fo:background-color="#121314"/>
    </style:style>
    <style:style style:name="T749" style:parent-style-name="DefaultParagraphFont" style:family="text">
      <style:text-properties style:font-name="Droid Sans Mono" fo:color="#BBBEBF" fo:font-size="10.5pt" style:font-size-asian="10.5pt" fo:background-color="#121314"/>
    </style:style>
    <style:style style:name="T750" style:parent-style-name="DefaultParagraphFont" style:family="text">
      <style:text-properties style:font-name="Droid Sans Mono" fo:color="#A5D6FF" fo:font-size="10.5pt" style:font-size-asian="10.5pt" fo:background-color="#121314"/>
    </style:style>
    <style:style style:name="T751" style:parent-style-name="DefaultParagraphFont" style:family="text">
      <style:text-properties style:font-name="Droid Sans Mono" fo:color="#BBBEBF" fo:font-size="10.5pt" style:font-size-asian="10.5pt" fo:background-color="#121314"/>
    </style:style>
    <style:style style:name="T752" style:parent-style-name="DefaultParagraphFont" style:family="text">
      <style:text-properties style:font-name="Droid Sans Mono" fo:color="#C9D1D9" fo:font-size="10.5pt" style:font-size-asian="10.5pt" fo:background-color="#121314"/>
    </style:style>
    <style:style style:name="T753" style:parent-style-name="DefaultParagraphFont" style:family="text">
      <style:text-properties style:font-name="Droid Sans Mono" fo:color="#BBBEBF" fo:font-size="10.5pt" style:font-size-asian="10.5pt" fo:background-color="#121314"/>
    </style:style>
    <style:style style:name="T754" style:parent-style-name="DefaultParagraphFont" style:family="text">
      <style:text-properties style:font-name="Droid Sans Mono" fo:color="#A5D6FF" fo:font-size="10.5pt" style:font-size-asian="10.5pt" fo:background-color="#121314"/>
    </style:style>
    <style:style style:name="T755" style:parent-style-name="DefaultParagraphFont" style:family="text">
      <style:text-properties style:font-name="Droid Sans Mono" fo:color="#BBBEBF" fo:font-size="10.5pt" style:font-size-asian="10.5pt" fo:background-color="#121314"/>
    </style:style>
    <style:style style:name="T756" style:parent-style-name="DefaultParagraphFont" style:family="text">
      <style:text-properties style:font-name="Droid Sans Mono" fo:color="#B5CEA8" fo:font-size="10.5pt" style:font-size-asian="10.5pt" fo:background-color="#121314"/>
    </style:style>
    <style:style style:name="T757" style:parent-style-name="DefaultParagraphFont" style:family="text">
      <style:text-properties style:font-name="Droid Sans Mono" fo:color="#BBBEBF" fo:font-size="10.5pt" style:font-size-asian="10.5pt" fo:background-color="#121314"/>
    </style:style>
    <style:style style:name="T758" style:parent-style-name="DefaultParagraphFont" style:family="text">
      <style:text-properties style:font-name="Droid Sans Mono" fo:color="#8B949E" fo:font-size="10.5pt" style:font-size-asian="10.5pt" fo:background-color="#121314"/>
    </style:style>
    <style:style style:name="P759" style:parent-style-name="Standard" style:family="paragraph">
      <style:paragraph-properties style:line-height-at-least="0.1979in"/>
    </style:style>
    <style:style style:name="T760" style:parent-style-name="DefaultParagraphFont" style:family="text">
      <style:text-properties style:font-name="Droid Sans Mono" fo:color="#C9D1D9" fo:font-size="10.5pt" style:font-size-asian="10.5pt" fo:background-color="#121314"/>
    </style:style>
    <style:style style:name="T761" style:parent-style-name="DefaultParagraphFont" style:family="text">
      <style:text-properties style:font-name="Droid Sans Mono" fo:color="#BBBEBF" fo:font-size="10.5pt" style:font-size-asian="10.5pt" fo:background-color="#121314"/>
    </style:style>
    <style:style style:name="T762" style:parent-style-name="DefaultParagraphFont" style:family="text">
      <style:text-properties style:font-name="Droid Sans Mono" fo:color="#A5D6FF" fo:font-size="10.5pt" style:font-size-asian="10.5pt" fo:background-color="#121314"/>
    </style:style>
    <style:style style:name="T763" style:parent-style-name="DefaultParagraphFont" style:family="text">
      <style:text-properties style:font-name="Droid Sans Mono" fo:color="#BBBEBF" fo:font-size="10.5pt" style:font-size-asian="10.5pt" fo:background-color="#121314"/>
    </style:style>
    <style:style style:name="T764" style:parent-style-name="DefaultParagraphFont" style:family="text">
      <style:text-properties style:font-name="Droid Sans Mono" fo:color="#D4D4D4" fo:font-size="10.5pt" style:font-size-asian="10.5pt" fo:background-color="#121314"/>
    </style:style>
    <style:style style:name="T765" style:parent-style-name="DefaultParagraphFont" style:family="text">
      <style:text-properties style:font-name="Droid Sans Mono" fo:color="#BBBEBF" fo:font-size="10.5pt" style:font-size-asian="10.5pt" fo:background-color="#121314"/>
    </style:style>
    <style:style style:name="T766" style:parent-style-name="DefaultParagraphFont" style:family="text">
      <style:text-properties style:font-name="Droid Sans Mono" fo:color="#FFA657" fo:font-size="10.5pt" style:font-size-asian="10.5pt" fo:background-color="#121314"/>
    </style:style>
    <style:style style:name="T767" style:parent-style-name="DefaultParagraphFont" style:family="text">
      <style:text-properties style:font-name="Droid Sans Mono" fo:color="#BBBEBF" fo:font-size="10.5pt" style:font-size-asian="10.5pt" fo:background-color="#121314"/>
    </style:style>
    <style:style style:name="T768" style:parent-style-name="DefaultParagraphFont" style:family="text">
      <style:text-properties style:font-name="Droid Sans Mono" fo:color="#D2A8FF" fo:font-size="10.5pt" style:font-size-asian="10.5pt" fo:background-color="#121314"/>
    </style:style>
    <style:style style:name="T769" style:parent-style-name="DefaultParagraphFont" style:family="text">
      <style:text-properties style:font-name="Droid Sans Mono" fo:color="#BBBEBF" fo:font-size="10.5pt" style:font-size-asian="10.5pt" fo:background-color="#121314"/>
    </style:style>
    <style:style style:name="T770" style:parent-style-name="DefaultParagraphFont" style:family="text">
      <style:text-properties style:font-name="Droid Sans Mono" fo:color="#A5D6FF" fo:font-size="10.5pt" style:font-size-asian="10.5pt" fo:background-color="#121314"/>
    </style:style>
    <style:style style:name="T771" style:parent-style-name="DefaultParagraphFont" style:family="text">
      <style:text-properties style:font-name="Droid Sans Mono" fo:color="#BBBEBF" fo:font-size="10.5pt" style:font-size-asian="10.5pt" fo:background-color="#121314"/>
    </style:style>
    <style:style style:name="T772" style:parent-style-name="DefaultParagraphFont" style:family="text">
      <style:text-properties style:font-name="Droid Sans Mono" fo:color="#B5CEA8" fo:font-size="10.5pt" style:font-size-asian="10.5pt" fo:background-color="#121314"/>
    </style:style>
    <style:style style:name="T773" style:parent-style-name="DefaultParagraphFont" style:family="text">
      <style:text-properties style:font-name="Droid Sans Mono" fo:color="#BBBEBF" fo:font-size="10.5pt" style:font-size-asian="10.5pt" fo:background-color="#121314"/>
    </style:style>
    <style:style style:name="T774" style:parent-style-name="DefaultParagraphFont" style:family="text">
      <style:text-properties style:font-name="Droid Sans Mono" fo:color="#B5CEA8" fo:font-size="10.5pt" style:font-size-asian="10.5pt" fo:background-color="#121314"/>
    </style:style>
    <style:style style:name="T775" style:parent-style-name="DefaultParagraphFont" style:family="text">
      <style:text-properties style:font-name="Droid Sans Mono" fo:color="#BBBEBF" fo:font-size="10.5pt" style:font-size-asian="10.5pt" fo:background-color="#121314"/>
    </style:style>
    <style:style style:name="T776" style:parent-style-name="DefaultParagraphFont" style:family="text">
      <style:text-properties style:font-name="Droid Sans Mono" fo:color="#FFA657" fo:font-size="10.5pt" style:font-size-asian="10.5pt" fo:background-color="#121314"/>
    </style:style>
    <style:style style:name="T777" style:parent-style-name="DefaultParagraphFont" style:family="text">
      <style:text-properties style:font-name="Droid Sans Mono" fo:color="#D4D4D4" fo:font-size="10.5pt" style:font-size-asian="10.5pt" fo:background-color="#121314"/>
    </style:style>
    <style:style style:name="T778" style:parent-style-name="DefaultParagraphFont" style:family="text">
      <style:text-properties style:font-name="Droid Sans Mono" fo:color="#569CD6" fo:font-size="10.5pt" style:font-size-asian="10.5pt" fo:background-color="#121314"/>
    </style:style>
    <style:style style:name="T779" style:parent-style-name="DefaultParagraphFont" style:family="text">
      <style:text-properties style:font-name="Droid Sans Mono" fo:color="#BBBEBF" fo:font-size="10.5pt" style:font-size-asian="10.5pt" fo:background-color="#121314"/>
    </style:style>
    <style:style style:name="P780" style:parent-style-name="Standard" style:family="paragraph">
      <style:paragraph-properties style:line-height-at-least="0.1979in"/>
      <style:text-properties style:font-name="Droid Sans Mono" fo:color="#BBBEBF" fo:font-size="10.5pt" style:font-size-asian="10.5pt" fo:background-color="#121314"/>
    </style:style>
    <style:style style:name="P781" style:parent-style-name="Standard" style:family="paragraph">
      <style:paragraph-properties style:line-height-at-least="0.1979in"/>
      <style:text-properties style:font-name="Droid Sans Mono" fo:color="#BBBEBF" fo:font-size="10.5pt" style:font-size-asian="10.5pt" fo:background-color="#121314"/>
    </style:style>
    <style:style style:name="P782" style:parent-style-name="Standard" style:family="paragraph">
      <style:paragraph-properties style:line-height-at-least="0.1979in"/>
      <style:text-properties style:font-name="Droid Sans Mono" fo:color="#BBBEBF" fo:font-size="10.5pt" style:font-size-asian="10.5pt" fo:background-color="#121314"/>
    </style:style>
    <style:style style:name="P783" style:parent-style-name="Standard" style:family="paragraph">
      <style:paragraph-properties style:line-height-at-least="0.1979in"/>
      <style:text-properties style:font-name="Droid Sans Mono" fo:color="#BBBEBF" fo:font-size="10.5pt" style:font-size-asian="10.5pt" fo:background-color="#121314"/>
    </style:style>
    <style:style style:name="P784"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8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86"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8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88"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78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790"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9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2"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93"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4"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79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796"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9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8"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9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0"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0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02"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03"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4"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0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6"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0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08"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0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0"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1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2"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1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1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1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1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1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2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21"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2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2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5"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2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7"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2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3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1"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3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3"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3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5"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3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3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40"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41"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84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43"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4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5"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4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4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9"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5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1"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5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3"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5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5"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5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5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6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1"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62"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63"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86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6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6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7"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6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9"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7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7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7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5"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7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7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8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1"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8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8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8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8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7"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8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9"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9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9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9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5"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9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9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90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901"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90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90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904"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905"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90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907" style:parent-style-name="Normal" style:family="paragraph">
      <style:text-properties style:language-complex="ar" style:country-complex="SA"/>
    </style:style>
    <style:style style:name="T908" style:parent-style-name="DefaultParagraphFont" style:family="text">
      <style:text-properties style:font-name="Apple Color Emoji" style:font-name-complex="Apple Color Emoji" style:language-complex="ar" style:country-complex="SA"/>
    </style:style>
    <style:style style:name="T909" style:parent-style-name="DefaultParagraphFont" style:family="text">
      <style:text-properties style:language-complex="ar" style:country-complex="SA"/>
    </style:style>
    <style:style style:name="T910" style:parent-style-name="DefaultParagraphFont" style:family="text">
      <style:text-properties style:font-name="Apple Color Emoji" style:font-name-complex="Apple Color Emoji" style:language-complex="ar" style:country-complex="SA"/>
    </style:style>
    <style:style style:name="P911" style:parent-style-name="Normal" style:family="paragraph">
      <style:text-properties style:language-complex="ar" style:country-complex="SA"/>
    </style:style>
    <style:style style:name="P912" style:parent-style-name="Normal" style:family="paragraph">
      <style:text-properties style:language-complex="ar" style:country-complex="SA"/>
    </style:style>
    <style:style style:name="P913" style:parent-style-name="Normal" style:family="paragraph">
      <style:text-properties style:language-complex="ar" style:country-complex="SA"/>
    </style:style>
    <style:style style:name="P914" style:parent-style-name="Normal" style:family="paragraph">
      <style:text-properties style:language-complex="ar" style:country-complex="SA"/>
    </style:style>
    <style:style style:name="P915" style:parent-style-name="Normal" style:family="paragraph">
      <style:text-properties style:language-complex="ar" style:country-complex="SA"/>
    </style:style>
    <style:style style:name="P916" style:parent-style-name="Normal" style:family="paragraph">
      <style:text-properties style:language-complex="ar" style:country-complex="SA"/>
    </style:style>
    <style:style style:name="P917" style:parent-style-name="Normal" style:family="paragraph">
      <style:text-properties style:language-complex="ar" style:country-complex="SA"/>
    </style:style>
    <style:style style:name="P918" style:parent-style-name="Normal" style:family="paragraph">
      <style:text-properties style:language-complex="ar" style:country-complex="SA"/>
    </style:style>
    <style:style style:name="P919" style:parent-style-name="Normal" style:family="paragraph">
      <style:text-properties style:language-complex="ar" style:country-complex="SA"/>
    </style:style>
    <style:style style:name="P920" style:parent-style-name="Normal" style:family="paragraph">
      <style:text-properties style:language-complex="ar" style:country-complex="SA"/>
    </style:style>
    <style:style style:name="P921" style:parent-style-name="Normal" style:family="paragraph">
      <style:text-properties style:language-complex="ar" style:country-complex="SA"/>
    </style:style>
    <style:style style:name="P922" style:parent-style-name="Normal" style:family="paragraph">
      <style:text-properties style:language-complex="ar" style:country-complex="SA"/>
    </style:style>
    <style:style style:name="P923" style:parent-style-name="Normal" style:family="paragraph">
      <style:text-properties style:language-complex="ar" style:country-complex="SA"/>
    </style:style>
    <style:style style:name="P924" style:parent-style-name="Normal" style:family="paragraph">
      <style:text-properties style:language-complex="ar" style:country-complex="SA"/>
    </style:style>
    <style:style style:name="P925" style:parent-style-name="Normal" style:family="paragraph">
      <style:text-properties style:language-complex="ar" style:country-complex="SA"/>
    </style:style>
    <style:style style:name="P926" style:parent-style-name="Normal" style:family="paragraph">
      <style:text-properties style:language-complex="ar" style:country-complex="SA"/>
    </style:style>
    <style:style style:name="P927" style:parent-style-name="Normal" style:family="paragraph">
      <style:text-properties style:language-complex="ar" style:country-complex="SA"/>
    </style:style>
    <style:style style:name="P928" style:parent-style-name="Normal" style:family="paragraph">
      <style:text-properties style:language-complex="ar" style:country-complex="SA"/>
    </style:style>
    <style:style style:name="P929" style:parent-style-name="Normal" style:family="paragraph">
      <style:text-properties style:language-complex="ar" style:country-complex="SA"/>
    </style:style>
    <style:style style:name="P930" style:parent-style-name="Normal" style:family="paragraph">
      <style:text-properties style:language-complex="ar" style:country-complex="SA"/>
    </style:style>
    <style:style style:name="P931" style:parent-style-name="Normal" style:family="paragraph">
      <style:text-properties style:language-complex="ar" style:country-complex="SA"/>
    </style:style>
    <style:style style:name="P932" style:parent-style-name="Normal" style:family="paragraph">
      <style:text-properties style:language-complex="ar" style:country-complex="SA"/>
    </style:style>
    <style:style style:name="P933" style:parent-style-name="Normal" style:family="paragraph">
      <style:text-properties style:language-complex="ar" style:country-complex="SA"/>
    </style:style>
    <style:style style:name="P934" style:parent-style-name="Normal" style:family="paragraph">
      <style:text-properties style:language-complex="ar" style:country-complex="SA"/>
    </style:style>
    <style:style style:name="P935" style:parent-style-name="Normal" style:family="paragraph">
      <style:text-properties style:language-complex="ar" style:country-complex="SA"/>
    </style:style>
    <style:style style:name="P936" style:parent-style-name="Normal" style:family="paragraph">
      <style:text-properties style:language-complex="ar" style:country-complex="SA"/>
    </style:style>
    <style:style style:name="P937" style:parent-style-name="Normal" style:family="paragraph">
      <style:text-properties style:language-complex="ar" style:country-complex="SA"/>
    </style:style>
    <style:style style:name="T938" style:parent-style-name="DefaultParagraphFont" style:family="text">
      <style:text-properties style:font-name="Menlo" style:font-name-complex="Menlo" fo:color="#E0E0E0" style:letter-kerning="false" style:language-complex="ar" style:country-complex="SA"/>
    </style:style>
    <style:style style:name="T939" style:parent-style-name="DefaultParagraphFont" style:family="text">
      <style:text-properties style:font-name="Droid Sans Mono" fo:color="#FFA657" fo:font-size="10.5pt" style:font-size-asian="10.5pt" fo:background-color="#121314"/>
    </style:style>
    <style:style style:name="T940" style:parent-style-name="DefaultParagraphFont" style:family="text">
      <style:text-properties style:font-name="Droid Sans Mono" fo:color="#BBBEBF" fo:font-size="10.5pt" style:font-size-asian="10.5pt" fo:background-color="#121314"/>
    </style:style>
    <style:style style:name="T941" style:parent-style-name="DefaultParagraphFont" style:family="text">
      <style:text-properties style:font-name="Droid Sans Mono" fo:color="#D4D4D4" fo:font-size="10.5pt" style:font-size-asian="10.5pt" fo:background-color="#121314"/>
    </style:style>
    <style:style style:name="T942" style:parent-style-name="DefaultParagraphFont" style:family="text">
      <style:text-properties style:font-name="Droid Sans Mono" fo:color="#BBBEBF" fo:font-size="10.5pt" style:font-size-asian="10.5pt" fo:background-color="#121314"/>
    </style:style>
    <style:style style:name="T943" style:parent-style-name="DefaultParagraphFont" style:family="text">
      <style:text-properties style:font-name="Droid Sans Mono" fo:color="#FFA657" fo:font-size="10.5pt" style:font-size-asian="10.5pt" fo:background-color="#121314"/>
    </style:style>
    <style:style style:name="T944" style:parent-style-name="DefaultParagraphFont" style:family="text">
      <style:text-properties style:font-name="Droid Sans Mono" fo:color="#BBBEBF" fo:font-size="10.5pt" style:font-size-asian="10.5pt" fo:background-color="#121314"/>
    </style:style>
    <style:style style:name="T945" style:parent-style-name="DefaultParagraphFont" style:family="text">
      <style:text-properties style:font-name="Droid Sans Mono" fo:color="#D2A8FF" fo:font-size="10.5pt" style:font-size-asian="10.5pt" fo:background-color="#121314"/>
    </style:style>
    <style:style style:name="T946" style:parent-style-name="DefaultParagraphFont" style:family="text">
      <style:text-properties style:font-name="Droid Sans Mono" fo:color="#BBBEBF" fo:font-size="10.5pt" style:font-size-asian="10.5pt" fo:background-color="#121314"/>
    </style:style>
    <style:style style:name="T947" style:parent-style-name="DefaultParagraphFont" style:family="text">
      <style:text-properties style:font-name="Droid Sans Mono" fo:color="#A5D6FF" fo:font-size="10.5pt" style:font-size-asian="10.5pt" fo:background-color="#121314"/>
    </style:style>
    <style:style style:name="T948" style:parent-style-name="DefaultParagraphFont" style:family="text">
      <style:text-properties style:font-name="Droid Sans Mono" fo:color="#FFA657" fo:font-size="10.5pt" style:font-size-asian="10.5pt" fo:background-color="#121314"/>
    </style:style>
    <style:style style:name="T949" style:parent-style-name="DefaultParagraphFont" style:family="text">
      <style:text-properties style:font-name="Droid Sans Mono" fo:color="#A5D6FF" fo:font-size="10.5pt" style:font-size-asian="10.5pt" fo:background-color="#121314"/>
    </style:style>
    <style:style style:name="T950" style:parent-style-name="DefaultParagraphFont" style:family="text">
      <style:text-properties style:font-name="Droid Sans Mono" fo:color="#BBBEBF" fo:font-size="10.5pt" style:font-size-asian="10.5pt" fo:background-color="#121314"/>
    </style:style>
    <style:style style:name="T951" style:parent-style-name="DefaultParagraphFont" style:family="text">
      <style:text-properties style:font-name="Droid Sans Mono" fo:color="#B5CEA8" fo:font-size="10.5pt" style:font-size-asian="10.5pt" fo:background-color="#121314"/>
    </style:style>
    <style:style style:name="T952" style:parent-style-name="DefaultParagraphFont" style:family="text">
      <style:text-properties style:font-name="Droid Sans Mono" fo:color="#BBBEBF" fo:font-size="10.5pt" style:font-size-asian="10.5pt" fo:background-color="#121314"/>
    </style:style>
    <style:style style:name="P953" style:parent-style-name="Standard" style:family="paragraph">
      <style:paragraph-properties style:line-height-at-least="0.1979in"/>
    </style:style>
    <style:style style:name="P954" style:parent-style-name="Standard" style:family="paragraph">
      <style:paragraph-properties style:line-height-at-least="0.1979in"/>
    </style:style>
    <style:style style:name="T955" style:parent-style-name="DefaultParagraphFont" style:family="text">
      <style:text-properties style:font-name="Droid Sans Mono" fo:color="#FFA657" fo:font-size="10.5pt" style:font-size-asian="10.5pt" fo:background-color="#121314"/>
    </style:style>
    <style:style style:name="T956" style:parent-style-name="DefaultParagraphFont" style:family="text">
      <style:text-properties style:font-name="Droid Sans Mono" fo:color="#BBBEBF" fo:font-size="10.5pt" style:font-size-asian="10.5pt" fo:background-color="#121314"/>
    </style:style>
    <style:style style:name="T957" style:parent-style-name="DefaultParagraphFont" style:family="text">
      <style:text-properties style:font-name="Droid Sans Mono" fo:color="#A5D6FF" fo:font-size="10.5pt" style:font-size-asian="10.5pt" fo:background-color="#121314"/>
    </style:style>
    <style:style style:name="T958" style:parent-style-name="DefaultParagraphFont" style:family="text">
      <style:text-properties style:font-name="Droid Sans Mono" fo:color="#BBBEBF" fo:font-size="10.5pt" style:font-size-asian="10.5pt" fo:background-color="#121314"/>
    </style:style>
    <style:style style:name="T959" style:parent-style-name="DefaultParagraphFont" style:family="text">
      <style:text-properties style:font-name="Droid Sans Mono" fo:color="#D4D4D4" fo:font-size="10.5pt" style:font-size-asian="10.5pt" fo:background-color="#121314"/>
    </style:style>
    <style:style style:name="T960" style:parent-style-name="DefaultParagraphFont" style:family="text">
      <style:text-properties style:font-name="Droid Sans Mono" fo:color="#BBBEBF" fo:font-size="10.5pt" style:font-size-asian="10.5pt" fo:background-color="#121314"/>
    </style:style>
    <style:style style:name="T961" style:parent-style-name="DefaultParagraphFont" style:family="text">
      <style:text-properties style:font-name="Droid Sans Mono" fo:color="#FFA657" fo:font-size="10.5pt" style:font-size-asian="10.5pt" fo:background-color="#121314"/>
    </style:style>
    <style:style style:name="T962" style:parent-style-name="DefaultParagraphFont" style:family="text">
      <style:text-properties style:font-name="Droid Sans Mono" fo:color="#BBBEBF" fo:font-size="10.5pt" style:font-size-asian="10.5pt" fo:background-color="#121314"/>
    </style:style>
    <style:style style:name="T963" style:parent-style-name="DefaultParagraphFont" style:family="text">
      <style:text-properties style:font-name="Droid Sans Mono" fo:color="#D2A8FF" fo:font-size="10.5pt" style:font-size-asian="10.5pt" fo:background-color="#121314"/>
    </style:style>
    <style:style style:name="T964" style:parent-style-name="DefaultParagraphFont" style:family="text">
      <style:text-properties style:font-name="Droid Sans Mono" fo:color="#BBBEBF" fo:font-size="10.5pt" style:font-size-asian="10.5pt" fo:background-color="#121314"/>
    </style:style>
    <style:style style:name="T965" style:parent-style-name="DefaultParagraphFont" style:family="text">
      <style:text-properties style:font-name="Droid Sans Mono" fo:color="#A5D6FF" fo:font-size="10.5pt" style:font-size-asian="10.5pt" fo:background-color="#121314"/>
    </style:style>
    <style:style style:name="T966" style:parent-style-name="DefaultParagraphFont" style:family="text">
      <style:text-properties style:font-name="Droid Sans Mono" fo:color="#BBBEBF" fo:font-size="10.5pt" style:font-size-asian="10.5pt" fo:background-color="#121314"/>
    </style:style>
    <style:style style:name="T967" style:parent-style-name="DefaultParagraphFont" style:family="text">
      <style:text-properties style:font-name="Droid Sans Mono" fo:color="#B5CEA8" fo:font-size="10.5pt" style:font-size-asian="10.5pt" fo:background-color="#121314"/>
    </style:style>
    <style:style style:name="T968" style:parent-style-name="DefaultParagraphFont" style:family="text">
      <style:text-properties style:font-name="Droid Sans Mono" fo:color="#BBBEBF" fo:font-size="10.5pt" style:font-size-asian="10.5pt" fo:background-color="#121314"/>
    </style:style>
    <style:style style:name="P969" style:parent-style-name="Standard" style:family="paragraph">
      <style:paragraph-properties style:line-height-at-least="0.1979in"/>
    </style:style>
    <style:style style:name="T970" style:parent-style-name="DefaultParagraphFont" style:family="text">
      <style:text-properties style:font-name="Droid Sans Mono" fo:color="#FFA657" fo:font-size="10.5pt" style:font-size-asian="10.5pt" fo:background-color="#121314"/>
    </style:style>
    <style:style style:name="T971" style:parent-style-name="DefaultParagraphFont" style:family="text">
      <style:text-properties style:font-name="Droid Sans Mono" fo:color="#BBBEBF" fo:font-size="10.5pt" style:font-size-asian="10.5pt" fo:background-color="#121314"/>
    </style:style>
    <style:style style:name="T972" style:parent-style-name="DefaultParagraphFont" style:family="text">
      <style:text-properties style:font-name="Droid Sans Mono" fo:color="#A5D6FF" fo:font-size="10.5pt" style:font-size-asian="10.5pt" fo:background-color="#121314"/>
    </style:style>
    <style:style style:name="T973" style:parent-style-name="DefaultParagraphFont" style:family="text">
      <style:text-properties style:font-name="Droid Sans Mono" fo:color="#BBBEBF" fo:font-size="10.5pt" style:font-size-asian="10.5pt" fo:background-color="#121314"/>
    </style:style>
    <style:style style:name="T974" style:parent-style-name="DefaultParagraphFont" style:family="text">
      <style:text-properties style:font-name="Droid Sans Mono" fo:color="#D4D4D4" fo:font-size="10.5pt" style:font-size-asian="10.5pt" fo:background-color="#121314"/>
    </style:style>
    <style:style style:name="T975" style:parent-style-name="DefaultParagraphFont" style:family="text">
      <style:text-properties style:font-name="Droid Sans Mono" fo:color="#FFA657" fo:font-size="10.5pt" style:font-size-asian="10.5pt" fo:background-color="#121314"/>
    </style:style>
    <style:style style:name="T976" style:parent-style-name="DefaultParagraphFont" style:family="text">
      <style:text-properties style:font-name="Droid Sans Mono" fo:color="#BBBEBF" fo:font-size="10.5pt" style:font-size-asian="10.5pt" fo:background-color="#121314"/>
    </style:style>
    <style:style style:name="T977" style:parent-style-name="DefaultParagraphFont" style:family="text">
      <style:text-properties style:font-name="Droid Sans Mono" fo:color="#D2A8FF" fo:font-size="10.5pt" style:font-size-asian="10.5pt" fo:background-color="#121314"/>
    </style:style>
    <style:style style:name="T978" style:parent-style-name="DefaultParagraphFont" style:family="text">
      <style:text-properties style:font-name="Droid Sans Mono" fo:color="#BBBEBF" fo:font-size="10.5pt" style:font-size-asian="10.5pt" fo:background-color="#121314"/>
    </style:style>
    <style:style style:name="T979" style:parent-style-name="DefaultParagraphFont" style:family="text">
      <style:text-properties style:font-name="Droid Sans Mono" fo:color="#A5D6FF" fo:font-size="10.5pt" style:font-size-asian="10.5pt" fo:background-color="#121314"/>
    </style:style>
    <style:style style:name="T980" style:parent-style-name="DefaultParagraphFont" style:family="text">
      <style:text-properties style:font-name="Droid Sans Mono" fo:color="#BBBEBF" fo:font-size="10.5pt" style:font-size-asian="10.5pt" fo:background-color="#121314"/>
    </style:style>
    <style:style style:name="T981" style:parent-style-name="DefaultParagraphFont" style:family="text">
      <style:text-properties style:font-name="Droid Sans Mono" fo:color="#B5CEA8" fo:font-size="10.5pt" style:font-size-asian="10.5pt" fo:background-color="#121314"/>
    </style:style>
    <style:style style:name="T982" style:parent-style-name="DefaultParagraphFont" style:family="text">
      <style:text-properties style:font-name="Droid Sans Mono" fo:color="#BBBEBF" fo:font-size="10.5pt" style:font-size-asian="10.5pt" fo:background-color="#121314"/>
    </style:style>
    <style:style style:name="P983" style:parent-style-name="Standard" style:family="paragraph">
      <style:paragraph-properties style:line-height-at-least="0.1979in"/>
    </style:style>
    <style:style style:name="T984" style:parent-style-name="DefaultParagraphFont" style:family="text">
      <style:text-properties style:font-name="Droid Sans Mono" fo:color="#FFA657" fo:font-size="10.5pt" style:font-size-asian="10.5pt" fo:background-color="#121314"/>
    </style:style>
    <style:style style:name="T985" style:parent-style-name="DefaultParagraphFont" style:family="text">
      <style:text-properties style:font-name="Droid Sans Mono" fo:color="#BBBEBF" fo:font-size="10.5pt" style:font-size-asian="10.5pt" fo:background-color="#121314"/>
    </style:style>
    <style:style style:name="T986" style:parent-style-name="DefaultParagraphFont" style:family="text">
      <style:text-properties style:font-name="Droid Sans Mono" fo:color="#A5D6FF" fo:font-size="10.5pt" style:font-size-asian="10.5pt" fo:background-color="#121314"/>
    </style:style>
    <style:style style:name="T987" style:parent-style-name="DefaultParagraphFont" style:family="text">
      <style:text-properties style:font-name="Droid Sans Mono" fo:color="#BBBEBF" fo:font-size="10.5pt" style:font-size-asian="10.5pt" fo:background-color="#121314"/>
    </style:style>
    <style:style style:name="T988" style:parent-style-name="DefaultParagraphFont" style:family="text">
      <style:text-properties style:font-name="Droid Sans Mono" fo:color="#D4D4D4" fo:font-size="10.5pt" style:font-size-asian="10.5pt" fo:background-color="#121314"/>
    </style:style>
    <style:style style:name="T989" style:parent-style-name="DefaultParagraphFont" style:family="text">
      <style:text-properties style:font-name="Droid Sans Mono" fo:color="#FFA657" fo:font-size="10.5pt" style:font-size-asian="10.5pt" fo:background-color="#121314"/>
    </style:style>
    <style:style style:name="T990" style:parent-style-name="DefaultParagraphFont" style:family="text">
      <style:text-properties style:font-name="Droid Sans Mono" fo:color="#BBBEBF" fo:font-size="10.5pt" style:font-size-asian="10.5pt" fo:background-color="#121314"/>
    </style:style>
    <style:style style:name="T991" style:parent-style-name="DefaultParagraphFont" style:family="text">
      <style:text-properties style:font-name="Droid Sans Mono" fo:color="#D2A8FF" fo:font-size="10.5pt" style:font-size-asian="10.5pt" fo:background-color="#121314"/>
    </style:style>
    <style:style style:name="T992" style:parent-style-name="DefaultParagraphFont" style:family="text">
      <style:text-properties style:font-name="Droid Sans Mono" fo:color="#BBBEBF" fo:font-size="10.5pt" style:font-size-asian="10.5pt" fo:background-color="#121314"/>
    </style:style>
    <style:style style:name="T993" style:parent-style-name="DefaultParagraphFont" style:family="text">
      <style:text-properties style:font-name="Droid Sans Mono" fo:color="#A5D6FF" fo:font-size="10.5pt" style:font-size-asian="10.5pt" fo:background-color="#121314"/>
    </style:style>
    <style:style style:name="T994" style:parent-style-name="DefaultParagraphFont" style:family="text">
      <style:text-properties style:font-name="Droid Sans Mono" fo:color="#BBBEBF" fo:font-size="10.5pt" style:font-size-asian="10.5pt" fo:background-color="#121314"/>
    </style:style>
    <style:style style:name="T995" style:parent-style-name="DefaultParagraphFont" style:family="text">
      <style:text-properties style:font-name="Droid Sans Mono" fo:color="#B5CEA8" fo:font-size="10.5pt" style:font-size-asian="10.5pt" fo:background-color="#121314"/>
    </style:style>
    <style:style style:name="T996" style:parent-style-name="DefaultParagraphFont" style:family="text">
      <style:text-properties style:font-name="Droid Sans Mono" fo:color="#BBBEBF" fo:font-size="10.5pt" style:font-size-asian="10.5pt" fo:background-color="#121314"/>
    </style:style>
    <style:style style:name="P997" style:parent-style-name="Standard" style:family="paragraph">
      <style:paragraph-properties style:line-height-at-least="0.1979in"/>
    </style:style>
    <style:style style:name="P998" style:parent-style-name="Standard" style:family="paragraph">
      <style:paragraph-properties style:line-height-at-least="0.1979in"/>
    </style:style>
    <style:style style:name="T999" style:parent-style-name="DefaultParagraphFont" style:family="text">
      <style:text-properties style:font-name="Droid Sans Mono" fo:color="#FFA657" fo:font-size="10.5pt" style:font-size-asian="10.5pt" fo:background-color="#121314"/>
    </style:style>
    <style:style style:name="T1000" style:parent-style-name="DefaultParagraphFont" style:family="text">
      <style:text-properties style:font-name="Droid Sans Mono" fo:color="#BBBEBF" fo:font-size="10.5pt" style:font-size-asian="10.5pt" fo:background-color="#121314"/>
    </style:style>
    <style:style style:name="T1001" style:parent-style-name="DefaultParagraphFont" style:family="text">
      <style:text-properties style:font-name="Droid Sans Mono" fo:color="#A5D6FF" fo:font-size="10.5pt" style:font-size-asian="10.5pt" fo:background-color="#121314"/>
    </style:style>
    <style:style style:name="T1002" style:parent-style-name="DefaultParagraphFont" style:family="text">
      <style:text-properties style:font-name="Droid Sans Mono" fo:color="#BBBEBF" fo:font-size="10.5pt" style:font-size-asian="10.5pt" fo:background-color="#121314"/>
    </style:style>
    <style:style style:name="T1003" style:parent-style-name="DefaultParagraphFont" style:family="text">
      <style:text-properties style:font-name="Droid Sans Mono" fo:color="#D4D4D4" fo:font-size="10.5pt" style:font-size-asian="10.5pt" fo:background-color="#121314"/>
    </style:style>
    <style:style style:name="T1004" style:parent-style-name="DefaultParagraphFont" style:family="text">
      <style:text-properties style:font-name="Droid Sans Mono" fo:color="#BBBEBF" fo:font-size="10.5pt" style:font-size-asian="10.5pt" fo:background-color="#121314"/>
    </style:style>
    <style:style style:name="T1005" style:parent-style-name="DefaultParagraphFont" style:family="text">
      <style:text-properties style:font-name="Droid Sans Mono" fo:color="#FFA657" fo:font-size="10.5pt" style:font-size-asian="10.5pt" fo:background-color="#121314"/>
    </style:style>
    <style:style style:name="T1006" style:parent-style-name="DefaultParagraphFont" style:family="text">
      <style:text-properties style:font-name="Droid Sans Mono" fo:color="#BBBEBF" fo:font-size="10.5pt" style:font-size-asian="10.5pt" fo:background-color="#121314"/>
    </style:style>
    <style:style style:name="T1007" style:parent-style-name="DefaultParagraphFont" style:family="text">
      <style:text-properties style:font-name="Droid Sans Mono" fo:color="#D2A8FF" fo:font-size="10.5pt" style:font-size-asian="10.5pt" fo:background-color="#121314"/>
    </style:style>
    <style:style style:name="T1008" style:parent-style-name="DefaultParagraphFont" style:family="text">
      <style:text-properties style:font-name="Droid Sans Mono" fo:color="#BBBEBF" fo:font-size="10.5pt" style:font-size-asian="10.5pt" fo:background-color="#121314"/>
    </style:style>
    <style:style style:name="T1009" style:parent-style-name="DefaultParagraphFont" style:family="text">
      <style:text-properties style:font-name="Droid Sans Mono" fo:color="#A5D6FF" fo:font-size="10.5pt" style:font-size-asian="10.5pt" fo:background-color="#121314"/>
    </style:style>
    <style:style style:name="T1010" style:parent-style-name="DefaultParagraphFont" style:family="text">
      <style:text-properties style:font-name="Droid Sans Mono" fo:color="#BBBEBF" fo:font-size="10.5pt" style:font-size-asian="10.5pt" fo:background-color="#121314"/>
    </style:style>
    <style:style style:name="T1011" style:parent-style-name="DefaultParagraphFont" style:family="text">
      <style:text-properties style:font-name="Droid Sans Mono" fo:color="#B5CEA8" fo:font-size="10.5pt" style:font-size-asian="10.5pt" fo:background-color="#121314"/>
    </style:style>
    <style:style style:name="T1012" style:parent-style-name="DefaultParagraphFont" style:family="text">
      <style:text-properties style:font-name="Droid Sans Mono" fo:color="#BBBEBF" fo:font-size="10.5pt" style:font-size-asian="10.5pt" fo:background-color="#121314"/>
    </style:style>
    <style:style style:name="P1013" style:parent-style-name="Standard" style:family="paragraph">
      <style:paragraph-properties style:line-height-at-least="0.1979in"/>
    </style:style>
    <style:style style:name="T1014" style:parent-style-name="DefaultParagraphFont" style:family="text">
      <style:text-properties style:font-name="Droid Sans Mono" fo:color="#FFA657" fo:font-size="10.5pt" style:font-size-asian="10.5pt" fo:background-color="#121314"/>
    </style:style>
    <style:style style:name="T1015" style:parent-style-name="DefaultParagraphFont" style:family="text">
      <style:text-properties style:font-name="Droid Sans Mono" fo:color="#BBBEBF" fo:font-size="10.5pt" style:font-size-asian="10.5pt" fo:background-color="#121314"/>
    </style:style>
    <style:style style:name="T1016" style:parent-style-name="DefaultParagraphFont" style:family="text">
      <style:text-properties style:font-name="Droid Sans Mono" fo:color="#A5D6FF" fo:font-size="10.5pt" style:font-size-asian="10.5pt" fo:background-color="#121314"/>
    </style:style>
    <style:style style:name="T1017" style:parent-style-name="DefaultParagraphFont" style:family="text">
      <style:text-properties style:font-name="Droid Sans Mono" fo:color="#BBBEBF" fo:font-size="10.5pt" style:font-size-asian="10.5pt" fo:background-color="#121314"/>
    </style:style>
    <style:style style:name="T1018" style:parent-style-name="DefaultParagraphFont" style:family="text">
      <style:text-properties style:font-name="Droid Sans Mono" fo:color="#D4D4D4" fo:font-size="10.5pt" style:font-size-asian="10.5pt" fo:background-color="#121314"/>
    </style:style>
    <style:style style:name="T1019" style:parent-style-name="DefaultParagraphFont" style:family="text">
      <style:text-properties style:font-name="Droid Sans Mono" fo:color="#BBBEBF" fo:font-size="10.5pt" style:font-size-asian="10.5pt" fo:background-color="#121314"/>
    </style:style>
    <style:style style:name="T1020" style:parent-style-name="DefaultParagraphFont" style:family="text">
      <style:text-properties style:font-name="Droid Sans Mono" fo:color="#4EC9B0" fo:font-size="10.5pt" style:font-size-asian="10.5pt" fo:background-color="#121314"/>
    </style:style>
    <style:style style:name="T1021" style:parent-style-name="DefaultParagraphFont" style:family="text">
      <style:text-properties style:font-name="Droid Sans Mono" fo:color="#BBBEBF" fo:font-size="10.5pt" style:font-size-asian="10.5pt" fo:background-color="#121314"/>
    </style:style>
    <style:style style:name="T1022" style:parent-style-name="DefaultParagraphFont" style:family="text">
      <style:text-properties style:font-name="Droid Sans Mono" fo:color="#FFA657" fo:font-size="10.5pt" style:font-size-asian="10.5pt" fo:background-color="#121314"/>
    </style:style>
    <style:style style:name="T1023" style:parent-style-name="DefaultParagraphFont" style:family="text">
      <style:text-properties style:font-name="Droid Sans Mono" fo:color="#BBBEBF" fo:font-size="10.5pt" style:font-size-asian="10.5pt" fo:background-color="#121314"/>
    </style:style>
    <style:style style:name="T1024" style:parent-style-name="DefaultParagraphFont" style:family="text">
      <style:text-properties style:font-name="Droid Sans Mono" fo:color="#D2A8FF" fo:font-size="10.5pt" style:font-size-asian="10.5pt" fo:background-color="#121314"/>
    </style:style>
    <style:style style:name="T1025" style:parent-style-name="DefaultParagraphFont" style:family="text">
      <style:text-properties style:font-name="Droid Sans Mono" fo:color="#BBBEBF" fo:font-size="10.5pt" style:font-size-asian="10.5pt" fo:background-color="#121314"/>
    </style:style>
    <style:style style:name="T1026" style:parent-style-name="DefaultParagraphFont" style:family="text">
      <style:text-properties style:font-name="Droid Sans Mono" fo:color="#A5D6FF" fo:font-size="10.5pt" style:font-size-asian="10.5pt" fo:background-color="#121314"/>
    </style:style>
    <style:style style:name="T1027" style:parent-style-name="DefaultParagraphFont" style:family="text">
      <style:text-properties style:font-name="Droid Sans Mono" fo:color="#BBBEBF" fo:font-size="10.5pt" style:font-size-asian="10.5pt" fo:background-color="#121314"/>
    </style:style>
    <style:style style:name="T1028" style:parent-style-name="DefaultParagraphFont" style:family="text">
      <style:text-properties style:font-name="Droid Sans Mono" fo:color="#B5CEA8" fo:font-size="10.5pt" style:font-size-asian="10.5pt" fo:background-color="#121314"/>
    </style:style>
    <style:style style:name="T1029" style:parent-style-name="DefaultParagraphFont" style:family="text">
      <style:text-properties style:font-name="Droid Sans Mono" fo:color="#BBBEBF" fo:font-size="10.5pt" style:font-size-asian="10.5pt" fo:background-color="#121314"/>
    </style:style>
    <style:style style:name="T1030" style:parent-style-name="DefaultParagraphFont" style:family="text">
      <style:text-properties style:font-name="Droid Sans Mono" fo:color="#B5CEA8" fo:font-size="10.5pt" style:font-size-asian="10.5pt" fo:background-color="#121314"/>
    </style:style>
    <style:style style:name="T1031" style:parent-style-name="DefaultParagraphFont" style:family="text">
      <style:text-properties style:font-name="Droid Sans Mono" fo:color="#BBBEBF" fo:font-size="10.5pt" style:font-size-asian="10.5pt" fo:background-color="#121314"/>
    </style:style>
    <style:style style:name="T1032" style:parent-style-name="DefaultParagraphFont" style:family="text">
      <style:text-properties style:font-name="Droid Sans Mono" fo:color="#FFA657" fo:font-size="10.5pt" style:font-size-asian="10.5pt" fo:background-color="#121314"/>
    </style:style>
    <style:style style:name="T1033" style:parent-style-name="DefaultParagraphFont" style:family="text">
      <style:text-properties style:font-name="Droid Sans Mono" fo:color="#D4D4D4" fo:font-size="10.5pt" style:font-size-asian="10.5pt" fo:background-color="#121314"/>
    </style:style>
    <style:style style:name="T1034" style:parent-style-name="DefaultParagraphFont" style:family="text">
      <style:text-properties style:font-name="Droid Sans Mono" fo:color="#569CD6" fo:font-size="10.5pt" style:font-size-asian="10.5pt" fo:background-color="#121314"/>
    </style:style>
    <style:style style:name="T1035" style:parent-style-name="DefaultParagraphFont" style:family="text">
      <style:text-properties style:font-name="Droid Sans Mono" fo:color="#BBBEBF" fo:font-size="10.5pt" style:font-size-asian="10.5pt" fo:background-color="#121314"/>
    </style:style>
    <style:style style:name="P1036" style:parent-style-name="Standard" style:family="paragraph">
      <style:paragraph-properties style:line-height-at-least="0.1979in"/>
    </style:style>
    <style:style style:name="T1037" style:parent-style-name="DefaultParagraphFont" style:family="text">
      <style:text-properties style:font-name="Droid Sans Mono" fo:color="#FFA657" fo:font-size="10.5pt" style:font-size-asian="10.5pt" fo:background-color="#121314"/>
    </style:style>
    <style:style style:name="T1038" style:parent-style-name="DefaultParagraphFont" style:family="text">
      <style:text-properties style:font-name="Droid Sans Mono" fo:color="#BBBEBF" fo:font-size="10.5pt" style:font-size-asian="10.5pt" fo:background-color="#121314"/>
    </style:style>
    <style:style style:name="T1039" style:parent-style-name="DefaultParagraphFont" style:family="text">
      <style:text-properties style:font-name="Droid Sans Mono" fo:color="#A5D6FF" fo:font-size="10.5pt" style:font-size-asian="10.5pt" fo:background-color="#121314"/>
    </style:style>
    <style:style style:name="T1040" style:parent-style-name="DefaultParagraphFont" style:family="text">
      <style:text-properties style:font-name="Droid Sans Mono" fo:color="#BBBEBF" fo:font-size="10.5pt" style:font-size-asian="10.5pt" fo:background-color="#121314"/>
    </style:style>
    <style:style style:name="T1041" style:parent-style-name="DefaultParagraphFont" style:family="text">
      <style:text-properties style:font-name="Droid Sans Mono" fo:color="#D4D4D4" fo:font-size="10.5pt" style:font-size-asian="10.5pt" fo:background-color="#121314"/>
    </style:style>
    <style:style style:name="T1042" style:parent-style-name="DefaultParagraphFont" style:family="text">
      <style:text-properties style:font-name="Droid Sans Mono" fo:color="#BBBEBF" fo:font-size="10.5pt" style:font-size-asian="10.5pt" fo:background-color="#121314"/>
    </style:style>
    <style:style style:name="T1043" style:parent-style-name="DefaultParagraphFont" style:family="text">
      <style:text-properties style:font-name="Droid Sans Mono" fo:color="#4EC9B0" fo:font-size="10.5pt" style:font-size-asian="10.5pt" fo:background-color="#121314"/>
    </style:style>
    <style:style style:name="T1044" style:parent-style-name="DefaultParagraphFont" style:family="text">
      <style:text-properties style:font-name="Droid Sans Mono" fo:color="#BBBEBF" fo:font-size="10.5pt" style:font-size-asian="10.5pt" fo:background-color="#121314"/>
    </style:style>
    <style:style style:name="T1045" style:parent-style-name="DefaultParagraphFont" style:family="text">
      <style:text-properties style:font-name="Droid Sans Mono" fo:color="#FFA657" fo:font-size="10.5pt" style:font-size-asian="10.5pt" fo:background-color="#121314"/>
    </style:style>
    <style:style style:name="T1046" style:parent-style-name="DefaultParagraphFont" style:family="text">
      <style:text-properties style:font-name="Droid Sans Mono" fo:color="#BBBEBF" fo:font-size="10.5pt" style:font-size-asian="10.5pt" fo:background-color="#121314"/>
    </style:style>
    <style:style style:name="T1047" style:parent-style-name="DefaultParagraphFont" style:family="text">
      <style:text-properties style:font-name="Droid Sans Mono" fo:color="#D2A8FF" fo:font-size="10.5pt" style:font-size-asian="10.5pt" fo:background-color="#121314"/>
    </style:style>
    <style:style style:name="T1048" style:parent-style-name="DefaultParagraphFont" style:family="text">
      <style:text-properties style:font-name="Droid Sans Mono" fo:color="#BBBEBF" fo:font-size="10.5pt" style:font-size-asian="10.5pt" fo:background-color="#121314"/>
    </style:style>
    <style:style style:name="T1049" style:parent-style-name="DefaultParagraphFont" style:family="text">
      <style:text-properties style:font-name="Droid Sans Mono" fo:color="#A5D6FF" fo:font-size="10.5pt" style:font-size-asian="10.5pt" fo:background-color="#121314"/>
    </style:style>
    <style:style style:name="T1050" style:parent-style-name="DefaultParagraphFont" style:family="text">
      <style:text-properties style:font-name="Droid Sans Mono" fo:color="#BBBEBF" fo:font-size="10.5pt" style:font-size-asian="10.5pt" fo:background-color="#121314"/>
    </style:style>
    <style:style style:name="T1051" style:parent-style-name="DefaultParagraphFont" style:family="text">
      <style:text-properties style:font-name="Droid Sans Mono" fo:color="#B5CEA8" fo:font-size="10.5pt" style:font-size-asian="10.5pt" fo:background-color="#121314"/>
    </style:style>
    <style:style style:name="T1052" style:parent-style-name="DefaultParagraphFont" style:family="text">
      <style:text-properties style:font-name="Droid Sans Mono" fo:color="#BBBEBF" fo:font-size="10.5pt" style:font-size-asian="10.5pt" fo:background-color="#121314"/>
    </style:style>
    <style:style style:name="T1053" style:parent-style-name="DefaultParagraphFont" style:family="text">
      <style:text-properties style:font-name="Droid Sans Mono" fo:color="#B5CEA8" fo:font-size="10.5pt" style:font-size-asian="10.5pt" fo:background-color="#121314"/>
    </style:style>
    <style:style style:name="T1054" style:parent-style-name="DefaultParagraphFont" style:family="text">
      <style:text-properties style:font-name="Droid Sans Mono" fo:color="#BBBEBF" fo:font-size="10.5pt" style:font-size-asian="10.5pt" fo:background-color="#121314"/>
    </style:style>
    <style:style style:name="T1055" style:parent-style-name="DefaultParagraphFont" style:family="text">
      <style:text-properties style:font-name="Droid Sans Mono" fo:color="#FFA657" fo:font-size="10.5pt" style:font-size-asian="10.5pt" fo:background-color="#121314"/>
    </style:style>
    <style:style style:name="T1056" style:parent-style-name="DefaultParagraphFont" style:family="text">
      <style:text-properties style:font-name="Droid Sans Mono" fo:color="#D4D4D4" fo:font-size="10.5pt" style:font-size-asian="10.5pt" fo:background-color="#121314"/>
    </style:style>
    <style:style style:name="T1057" style:parent-style-name="DefaultParagraphFont" style:family="text">
      <style:text-properties style:font-name="Droid Sans Mono" fo:color="#569CD6" fo:font-size="10.5pt" style:font-size-asian="10.5pt" fo:background-color="#121314"/>
    </style:style>
    <style:style style:name="T1058" style:parent-style-name="DefaultParagraphFont" style:family="text">
      <style:text-properties style:font-name="Droid Sans Mono" fo:color="#BBBEBF" fo:font-size="10.5pt" style:font-size-asian="10.5pt" fo:background-color="#121314"/>
    </style:style>
    <style:style style:name="T1059" style:parent-style-name="DefaultParagraphFont" style:family="text">
      <style:text-properties style:font-name="Apple Color Emoji" style:font-name-complex="Apple Color Emoji"/>
    </style:style>
    <style:style style:name="T1060" style:parent-style-name="DefaultParagraphFont" style:family="text">
      <style:text-properties style:font-name="Apple Color Emoji" style:font-name-complex="Apple Color Emoji"/>
    </style:style>
    <style:style style:name="T1061" style:parent-style-name="DefaultParagraphFont" style:family="text">
      <style:text-properties style:font-name="Apple Color Emoji" style:font-name-complex="Apple Color Emoji"/>
    </style:style>
    <style:style style:name="T1062" style:parent-style-name="DefaultParagraphFont" style:family="text">
      <style:text-properties style:font-name="Apple Color Emoji" style:font-name-complex="Apple Color Emoji"/>
    </style:style>
  </office:automatic-styles>
  <office:body>
    <office:text text:use-soft-page-breaks="true">
      <text:p text:style-name="P1">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text:p>
      <text:p text:style-name="Textbody"/>
      <text:p text:style-name="Textbody">Here's what I have done so far…</text:p>
      <text:p text:style-name="Textbody">PHASE 1</text:p>
      <text:p text:style-name="Textbody">Using seed 42 for jax.random and the cost function</text:p>
      <text:p text:style-name="Standard">J=\intop_{t_0}{t_f}(q_e*t*|e(t)|^2+r_u|u(t)|^2)dt</text:p>
      <text:p text:style-name="Standard"/>
      <text:p text:style-name="Standard">where t_f=60 and the search ranges were</text:p>
      <text:p text:style-name="Standard"/>
      <text:p text:style-name="P2"><text:span text:style-name="T3">param_dict</text:span><text:span text:style-name="T4">[</text:span><text:span text:style-name="T5">'k1'</text:span><text:span text:style-name="T6">]<text:s/></text:span><text:span text:style-name="T7">=</text:span><text:span text:style-name="T8"><text:s/></text:span><text:span text:style-name="T9">trial</text:span><text:span text:style-name="T10">.</text:span><text:span text:style-name="T11">suggest_float</text:span><text:span text:style-name="T12">(</text:span><text:span text:style-name="T13">"k1"</text:span><text:span text:style-name="T14">,<text:s/></text:span><text:span text:style-name="T15">0.1</text:span><text:span text:style-name="T16">,<text:s/></text:span><text:span text:style-name="T17">2.0</text:span><text:span text:style-name="T18">)</text:span></text:p>
      <text:p text:style-name="P19"><text:span text:style-name="T20">param_dict</text:span><text:span text:style-name="T21">[</text:span><text:span text:style-name="T22">'k2'</text:span><text:span text:style-name="T23">]<text:s/></text:span><text:span text:style-name="T24">=</text:span><text:span text:style-name="T25"><text:s/></text:span><text:span text:style-name="T26">trial</text:span><text:span text:style-name="T27">.</text:span><text:span text:style-name="T28">suggest_float</text:span><text:span text:style-name="T29">(</text:span><text:span text:style-name="T30">"k2"</text:span><text:span text:style-name="T31">,<text:s/></text:span><text:span text:style-name="T32">0.1</text:span><text:span text:style-name="T33">,<text:s/></text:span><text:span text:style-name="T34">2.0</text:span><text:span text:style-name="T35">)</text:span></text:p>
      <text:p text:style-name="P36"><text:span text:style-name="T37">param_dict</text:span><text:span text:style-name="T38">[</text:span><text:span text:style-name="T39">'k3'</text:span><text:span text:style-name="T40">]<text:s/></text:span><text:span text:style-name="T41">=</text:span><text:span text:style-name="T42"><text:s/></text:span><text:span text:style-name="T43">trial</text:span><text:span text:style-name="T44">.</text:span><text:span text:style-name="T45">suggest_float</text:span><text:span text:style-name="T46">(</text:span><text:span text:style-name="T47">"k3"</text:span><text:span text:style-name="T48">,<text:s/></text:span><text:span text:style-name="T49">0.1</text:span><text:span text:style-name="T50">,<text:s/></text:span><text:span text:style-name="T51">2.0</text:span><text:span text:style-name="T52">)</text:span></text:p>
      <text:p text:style-name="P53"><text:span text:style-name="T54">param_dict</text:span><text:span text:style-name="T55">[</text:span><text:span text:style-name="T56">'k_rise'</text:span><text:span text:style-name="T57">]<text:s/></text:span><text:span text:style-name="T58">=</text:span><text:span text:style-name="T59"><text:s/></text:span><text:span text:style-name="T60">trial</text:span><text:span text:style-name="T61">.</text:span><text:span text:style-name="T62">suggest_float</text:span><text:span text:style-name="T63">(</text:span><text:span text:style-name="T64">"k_rise"</text:span><text:span text:style-name="T65">,<text:s/></text:span><text:span text:style-name="T66">0.0001</text:span><text:span text:style-name="T67">,<text:s/></text:span><text:span text:style-name="T68">0.01</text:span><text:span text:style-name="T69">,<text:s/></text:span><text:span text:style-name="T70">log</text:span><text:span text:style-name="T71">=</text:span><text:span text:style-name="T72">True</text:span><text:span text:style-name="T73">)</text:span></text:p>
      <text:p text:style-name="Textbody"/>
      <text:p text:style-name="Textbody">The desired trajectory was a figure eight with a period of 30 seconds:</text:p>
      <text:p text:style-name="Textbody"/>
      <text:p text:style-name="Standard"><text:span text:style-name="T74">def</text:span><text:span text:style-name="T75"><text:s/></text:span><text:span text:style-name="T76">get_desired_state</text:span><text:span text:style-name="T77">(</text:span><text:span text:style-name="T78">self</text:span><text:span text:style-name="T79">,<text:s/></text:span><text:span text:style-name="T80">t</text:span><text:span text:style-name="T81">:<text:s/></text:span><text:span text:style-name="T82">float</text:span><text:span text:style-name="T83">) -&gt;<text:s/></text:span><text:span text:style-name="T84">tuple</text:span><text:span text:style-name="T85">[</text:span><text:span text:style-name="T86">np</text:span><text:span text:style-name="T87">.</text:span><text:span text:style-name="T88">ndarray</text:span><text:span text:style-name="T89">,<text:s/></text:span><text:span text:style-name="T90">np</text:span><text:span text:style-name="T91">.</text:span><text:span text:style-name="T92">ndarray</text:span><text:span text:style-name="T93">,<text:s/></text:span><text:span text:style-name="T94">np</text:span><text:span text:style-name="T95">.</text:span><text:span text:style-name="T96">ndarray</text:span><text:span text:style-name="T97">]:</text:span></text:p>
      <text:p text:style-name="P98"><text:span text:style-name="T99">wx</text:span><text:span text:style-name="T100"><text:s/></text:span><text:span text:style-name="T101">=</text:span><text:span text:style-name="T102"><text:s/>(</text:span><text:span text:style-name="T103">4.0</text:span><text:span text:style-name="T104"><text:s/></text:span><text:span text:style-name="T105">*</text:span><text:span text:style-name="T106"><text:s/></text:span><text:span text:style-name="T107">math</text:span><text:span text:style-name="T108">.</text:span><text:span text:style-name="T109">pi</text:span><text:span text:style-name="T110">)<text:s/></text:span><text:span text:style-name="T111">/</text:span><text:span text:style-name="T112"><text:s/></text:span><text:span text:style-name="T113">self</text:span><text:span text:style-name="T114">.</text:span><text:span text:style-name="T115">T_period</text:span></text:p>
      <text:p text:style-name="P116"><text:span text:style-name="T117">wy</text:span><text:span text:style-name="T118"><text:s/></text:span><text:span text:style-name="T119">=</text:span><text:span text:style-name="T120"><text:s/>(</text:span><text:span text:style-name="T121">2.0</text:span><text:span text:style-name="T122"><text:s/></text:span><text:span text:style-name="T123">*</text:span><text:span text:style-name="T124"><text:s/></text:span><text:span text:style-name="T125">math</text:span><text:span text:style-name="T126">.</text:span><text:span text:style-name="T127">pi</text:span><text:span text:style-name="T128">)<text:s/></text:span><text:span text:style-name="T129">/</text:span><text:span text:style-name="T130"><text:s/></text:span><text:span text:style-name="T131">self</text:span><text:span text:style-name="T132">.</text:span><text:span text:style-name="T133">T_period</text:span></text:p>
      <text:p text:style-name="P134"><text:span text:style-name="T135">wz</text:span><text:span text:style-name="T136"><text:s/></text:span><text:span text:style-name="T137">=</text:span><text:span text:style-name="T138"><text:s/>(</text:span><text:span text:style-name="T139">2.0</text:span><text:span text:style-name="T140"><text:s/></text:span><text:span text:style-name="T141">*</text:span><text:span text:style-name="T142"><text:s/></text:span><text:span text:style-name="T143">math</text:span><text:span text:style-name="T144">.</text:span><text:span text:style-name="T145">pi</text:span><text:span text:style-name="T146">)<text:s/></text:span><text:span text:style-name="T147">/</text:span><text:span text:style-name="T148"><text:s/></text:span><text:span text:style-name="T149">self</text:span><text:span text:style-name="T150">.</text:span><text:span text:style-name="T151">T_period</text:span></text:p>
      <text:p text:style-name="P152"><text:span text:style-name="T153">zc</text:span><text:span text:style-name="T154"><text:s/></text:span><text:span text:style-name="T155">=</text:span><text:span text:style-name="T156"><text:s/></text:span><text:span text:style-name="T157">-</text:span><text:span text:style-name="T158">4.0</text:span></text:p>
      <text:p text:style-name="P159"><text:span text:style-name="T160">xd</text:span><text:span text:style-name="T161"><text:s/></text:span><text:span text:style-name="T162">=</text:span><text:span text:style-name="T163"><text:s/></text:span><text:span text:style-name="T164">3.0</text:span><text:span text:style-name="T165"><text:s/></text:span><text:span text:style-name="T166">*</text:span><text:span text:style-name="T167"><text:s/></text:span><text:span text:style-name="T168">math</text:span><text:span text:style-name="T169">.</text:span><text:span text:style-name="T170">sin</text:span><text:span text:style-name="T171">(</text:span><text:span text:style-name="T172">wx</text:span><text:span text:style-name="T173"><text:s/></text:span><text:span text:style-name="T174">*</text:span><text:span text:style-name="T175"><text:s/></text:span><text:span text:style-name="T176">t</text:span><text:span text:style-name="T177">)</text:span></text:p>
      <text:p text:style-name="P178"><text:span text:style-name="T179">yd</text:span><text:span text:style-name="T180"><text:s/></text:span><text:span text:style-name="T181">=</text:span><text:span text:style-name="T182"><text:s/></text:span><text:span text:style-name="T183">8.0</text:span><text:span text:style-name="T184"><text:s/></text:span><text:span text:style-name="T185">*</text:span><text:span text:style-name="T186"><text:s/></text:span><text:span text:style-name="T187">math</text:span><text:span text:style-name="T188">.</text:span><text:span text:style-name="T189">sin</text:span><text:span text:style-name="T190">(</text:span><text:span text:style-name="T191">wy</text:span><text:span text:style-name="T192"><text:s/></text:span><text:span text:style-name="T193">*</text:span><text:span text:style-name="T194"><text:s/></text:span><text:span text:style-name="T195">t</text:span><text:span text:style-name="T196">)</text:span></text:p>
      <text:p text:style-name="P197"><text:span text:style-name="T198">zd</text:span><text:span text:style-name="T199"><text:s/></text:span><text:span text:style-name="T200">=</text:span><text:span text:style-name="T201"><text:s/></text:span><text:span text:style-name="T202">0.5</text:span><text:span text:style-name="T203"><text:s/></text:span><text:span text:style-name="T204">*</text:span><text:span text:style-name="T205"><text:s/></text:span><text:span text:style-name="T206">math</text:span><text:span text:style-name="T207">.</text:span><text:span text:style-name="T208">sin</text:span><text:span text:style-name="T209">(</text:span><text:span text:style-name="T210">wz</text:span><text:span text:style-name="T211"><text:s/></text:span><text:span text:style-name="T212">*</text:span><text:span text:style-name="T213"><text:s/></text:span><text:span text:style-name="T214">t</text:span><text:span text:style-name="T215">)<text:s/></text:span><text:span text:style-name="T216">+</text:span><text:span text:style-name="T217"><text:s/></text:span><text:span text:style-name="T218">zc</text:span></text:p>
      <text:p text:style-name="P219"><text:span text:style-name="T220">vxd</text:span><text:span text:style-name="T221"><text:s/></text:span><text:span text:style-name="T222">=</text:span><text:span text:style-name="T223"><text:s/></text:span><text:span text:style-name="T224">3.0</text:span><text:span text:style-name="T225"><text:s/></text:span><text:span text:style-name="T226">*</text:span><text:span text:style-name="T227"><text:s/></text:span><text:span text:style-name="T228">wx</text:span><text:span text:style-name="T229"><text:s/></text:span><text:span text:style-name="T230">*</text:span><text:span text:style-name="T231"><text:s/></text:span><text:span text:style-name="T232">math</text:span><text:span text:style-name="T233">.</text:span><text:span text:style-name="T234">cos</text:span><text:span text:style-name="T235">(</text:span><text:span text:style-name="T236">wx</text:span><text:span text:style-name="T237"><text:s/></text:span><text:span text:style-name="T238">*</text:span><text:span text:style-name="T239"><text:s/></text:span><text:span text:style-name="T240">t</text:span><text:span text:style-name="T241">)</text:span></text:p>
      <text:p text:style-name="P242"><text:span text:style-name="T243">vyd</text:span><text:span text:style-name="T244"><text:s/></text:span><text:span text:style-name="T245">=</text:span><text:span text:style-name="T246"><text:s/></text:span><text:span text:style-name="T247">8.0</text:span><text:span text:style-name="T248"><text:s/></text:span><text:span text:style-name="T249">*</text:span><text:span text:style-name="T250"><text:s/></text:span><text:span text:style-name="T251">wy</text:span><text:span text:style-name="T252"><text:s/></text:span><text:span text:style-name="T253">*</text:span><text:span text:style-name="T254"><text:s/></text:span><text:span text:style-name="T255">math</text:span><text:span text:style-name="T256">.</text:span><text:span text:style-name="T257">cos</text:span><text:span text:style-name="T258">(</text:span><text:span text:style-name="T259">wy</text:span><text:span text:style-name="T260"><text:s/></text:span><text:span text:style-name="T261">*</text:span><text:span text:style-name="T262"><text:s/></text:span><text:span text:style-name="T263">t</text:span><text:span text:style-name="T264">)</text:span></text:p>
      <text:p text:style-name="P265"><text:span text:style-name="T266">vzd</text:span><text:span text:style-name="T267"><text:s/></text:span><text:span text:style-name="T268">=</text:span><text:span text:style-name="T269"><text:s/></text:span><text:span text:style-name="T270">0.5</text:span><text:span text:style-name="T271"><text:s/></text:span><text:span text:style-name="T272">*</text:span><text:span text:style-name="T273"><text:s/></text:span><text:span text:style-name="T274">wz</text:span><text:span text:style-name="T275"><text:s/></text:span><text:span text:style-name="T276">*</text:span><text:span text:style-name="T277"><text:s/></text:span><text:span text:style-name="T278">math</text:span><text:span text:style-name="T279">.</text:span><text:span text:style-name="T280">cos</text:span><text:span text:style-name="T281">(</text:span><text:span text:style-name="T282">wz</text:span><text:span text:style-name="T283"><text:s/></text:span><text:span text:style-name="T284">*</text:span><text:span text:style-name="T285"><text:s/></text:span><text:span text:style-name="T286">t</text:span><text:span text:style-name="T287">)</text:span></text:p>
      <text:p text:style-name="P288"><text:span text:style-name="T289">axd</text:span><text:span text:style-name="T290"><text:s/></text:span><text:span text:style-name="T291">=</text:span><text:span text:style-name="T292"><text:s/></text:span><text:span text:style-name="T293">-</text:span><text:span text:style-name="T294">(</text:span><text:span text:style-name="T295">wx</text:span><text:span text:style-name="T296">**</text:span><text:span text:style-name="T297">2</text:span><text:span text:style-name="T298">)<text:s/></text:span><text:span text:style-name="T299">*</text:span><text:span text:style-name="T300"><text:s/></text:span><text:span text:style-name="T301">xd</text:span></text:p>
      <text:p text:style-name="P302"><text:span text:style-name="T303">ayd</text:span><text:span text:style-name="T304"><text:s/></text:span><text:span text:style-name="T305">=</text:span><text:span text:style-name="T306"><text:s/></text:span><text:span text:style-name="T307">-</text:span><text:span text:style-name="T308">(</text:span><text:span text:style-name="T309">wy</text:span><text:span text:style-name="T310">**</text:span><text:span text:style-name="T311">2</text:span><text:span text:style-name="T312">)<text:s/></text:span><text:span text:style-name="T313">*</text:span><text:span text:style-name="T314"><text:s/></text:span><text:span text:style-name="T315">yd</text:span></text:p>
      <text:p text:style-name="P316"><text:span text:style-name="T317">azd</text:span><text:span text:style-name="T318"><text:s/></text:span><text:span text:style-name="T319">=</text:span><text:span text:style-name="T320"><text:s/></text:span><text:span text:style-name="T321">-</text:span><text:span text:style-name="T322">(</text:span><text:span text:style-name="T323">wz</text:span><text:span text:style-name="T324">**</text:span><text:span text:style-name="T325">2</text:span><text:span text:style-name="T326">)<text:s/></text:span><text:span text:style-name="T327">*</text:span><text:span text:style-name="T328"><text:s/>(</text:span><text:span text:style-name="T329">zd</text:span><text:span text:style-name="T330"><text:s/></text:span><text:span text:style-name="T331">-</text:span><text:span text:style-name="T332"><text:s/></text:span><text:span text:style-name="T333">zc</text:span><text:span text:style-name="T334">)</text:span></text:p>
      <text:p text:style-name="P335"><text:span text:style-name="T336">return</text:span><text:span text:style-name="T337"><text:s/>(</text:span></text:p>
      <text:p text:style-name="P338"><text:span text:style-name="T339">np</text:span><text:span text:style-name="T340">.</text:span><text:span text:style-name="T341">array</text:span><text:span text:style-name="T342">([</text:span><text:span text:style-name="T343">xd</text:span><text:span text:style-name="T344">,<text:s/></text:span><text:span text:style-name="T345">yd</text:span><text:span text:style-name="T346">,<text:s/></text:span><text:span text:style-name="T347">zd</text:span><text:span text:style-name="T348">],<text:s/></text:span><text:span text:style-name="T349">dtype</text:span><text:span text:style-name="T350">=</text:span><text:span text:style-name="T351">np</text:span><text:span text:style-name="T352">.</text:span><text:span text:style-name="T353">float64</text:span><text:span text:style-name="T354">),</text:span></text:p>
      <text:p text:style-name="P355"><text:span text:style-name="T356">np</text:span><text:span text:style-name="T357">.</text:span><text:span text:style-name="T358">array</text:span><text:span text:style-name="T359">([</text:span><text:span text:style-name="T360">vxd</text:span><text:span text:style-name="T361">,<text:s/></text:span><text:span text:style-name="T362">vyd</text:span><text:span text:style-name="T363">,<text:s/></text:span><text:span text:style-name="T364">vzd</text:span><text:span text:style-name="T365">],<text:s/></text:span><text:span text:style-name="T366">dtype</text:span><text:span text:style-name="T367">=</text:span><text:span text:style-name="T368">np</text:span><text:span text:style-name="T369">.</text:span><text:span text:style-name="T370">float64</text:span><text:span text:style-name="T371">),</text:span></text:p>
      <text:p text:style-name="P372"><text:span text:style-name="T373">np</text:span><text:span text:style-name="T374">.</text:span><text:span text:style-name="T375">array</text:span><text:span text:style-name="T376">([</text:span><text:span text:style-name="T377">axd</text:span><text:span text:style-name="T378">,<text:s/></text:span><text:span text:style-name="T379">ayd</text:span><text:span text:style-name="T380">,<text:s/></text:span><text:span text:style-name="T381">azd</text:span><text:span text:style-name="T382">],<text:s/></text:span><text:span text:style-name="T383">dtype</text:span><text:span text:style-name="T384">=</text:span><text:span text:style-name="T385">np</text:span><text:span text:style-name="T386">.</text:span><text:span text:style-name="T387">float64</text:span><text:span text:style-name="T388">)</text:span></text:p>
      <text:p text:style-name="P389">)</text:p>
      <text:p text:style-name="Textbody"/>
      <text:p text:style-name="Textbody">Optuna was given 100 trials to find the gains in these ranges that minimize this cost. In each, the initial condition was always</text:p>
      <text:p text:style-name="Textbody"><text:span text:style-name="T390">FIXED_X</text:span><text:span text:style-name="T391"><text:s/></text:span><text:span text:style-name="T392">=</text:span><text:span text:style-name="T393"><text:s/></text:span><text:span text:style-name="T394">0.70</text:span></text:p>
      <text:p text:style-name="P395"><text:span text:style-name="T396">FIXED_Y</text:span><text:span text:style-name="T397"><text:s/></text:span><text:span text:style-name="T398">=</text:span><text:span text:style-name="T399"><text:s/></text:span><text:span text:style-name="T400">-</text:span><text:span text:style-name="T401">2.37</text:span></text:p>
      <text:p text:style-name="P402"><text:span text:style-name="T403">TARGET_Z</text:span><text:span text:style-name="T404"><text:s/></text:span><text:span text:style-name="T405">=</text:span><text:span text:style-name="T406"><text:s/></text:span><text:span text:style-name="T407">-</text:span><text:span text:style-name="T408">3.0</text:span></text:p>
      <text:p text:style-name="P409"/>
      <text:p text:style-name="Standard">where the z-value is chosen by letting the quad copter first ascend to that altitude (negative z is up) before activating the controller. The x-y portion of the initial condition was randomly selected (once at the beginning, not every flight) from a 5 by 5 meter square centered at the origin. If the quadcopter violates a defined spatial safety boundary at some time t_fail before reaching t_f, the integration stops and a massive scalar penalty is added to whatever cost has accumulated up to that point:</text:p>
      <text:p text:style-name="Standard">J_fail=J(t_fail)+w_fail(t_f−t_fail)^2</text:p>
      <text:p text:style-name="Standard"/>
      <text:p text:style-name="Standard">where w_fail = 1000.</text:p>
      <text:p text:style-name="Standard"/>
      <text:p text:style-name="Standard">PHASE 2</text:p>
      <text:p text:style-name="Standard">With the same initial condition and using the initial condition function from my 1.2.0 ResNet library,</text:p>
      <text:p text:style-name="Standard"/>
      <text:p text:style-name="Standard">As of June 16, I ran both ResNet controllers with the search spaces:</text:p>
      <text:p text:style-name="Standard"/>
      <text:p text:style-name="Standard"><text:span text:style-name="T410">param_dict</text:span><text:span text:style-name="T411">[</text:span><text:span text:style-name="T412">'gamma'</text:span><text:span text:style-name="T413">]<text:s/></text:span><text:span text:style-name="T414">=</text:span><text:span text:style-name="T415"><text:s/></text:span><text:span text:style-name="T416">float</text:span><text:span text:style-name="T417">(</text:span><text:span text:style-name="T418">trial</text:span><text:span text:style-name="T419">.</text:span><text:span text:style-name="T420">suggest_float</text:span><text:span text:style-name="T421">(</text:span><text:span text:style-name="T422">"gamma"</text:span><text:span text:style-name="T423">,<text:s/></text:span><text:span text:style-name="T424">0.5</text:span><text:span text:style-name="T425">,<text:s/></text:span><text:span text:style-name="T426">50.0</text:span><text:span text:style-name="T427">))</text:span></text:p>
      <text:p text:style-name="P428"><text:span text:style-name="T429">param_dict</text:span><text:span text:style-name="T430">[</text:span><text:span text:style-name="T431">'sigma_mod'</text:span><text:span text:style-name="T432">]<text:s/></text:span><text:span text:style-name="T433">=</text:span><text:span text:style-name="T434"><text:s/></text:span><text:span text:style-name="T435">float</text:span><text:span text:style-name="T436">(</text:span><text:span text:style-name="T437">trial</text:span><text:span text:style-name="T438">.</text:span><text:span text:style-name="T439">suggest_float</text:span><text:span text:style-name="T440">(</text:span><text:span text:style-name="T441">"sigma_mod"</text:span><text:span text:style-name="T442">,<text:s/></text:span><text:span text:style-name="T443">0.001</text:span><text:span text:style-name="T444">,<text:s/></text:span><text:span text:style-name="T445">1.0</text:span><text:span text:style-name="T446">,<text:s/></text:span><text:span text:style-name="T447">log</text:span><text:span text:style-name="T448">=</text:span><text:span text:style-name="T449">True</text:span><text:span text:style-name="T450">))</text:span></text:p>
      <text:p text:style-name="P451"><text:span text:style-name="T452">k_0</text:span><text:span text:style-name="T453"><text:s/></text:span><text:span text:style-name="T454">=</text:span><text:span text:style-name="T455"><text:s/></text:span><text:span text:style-name="T456">trial</text:span><text:span text:style-name="T457">.</text:span><text:span text:style-name="T458">suggest_categorical</text:span><text:span text:style-name="T459">(</text:span><text:span text:style-name="T460">"k_0"</text:span><text:span text:style-name="T461">, [</text:span><text:span text:style-name="T462">1</text:span><text:span text:style-name="T463">,<text:s/></text:span><text:span text:style-name="T464">2</text:span><text:span text:style-name="T465">,<text:s/></text:span><text:span text:style-name="T466">4</text:span><text:span text:style-name="T467">,<text:s/></text:span><text:span text:style-name="T468">8</text:span><text:span text:style-name="T469">])</text:span></text:p>
      <text:p text:style-name="P470"><text:span text:style-name="T471">k_i</text:span><text:span text:style-name="T472"><text:s/></text:span><text:span text:style-name="T473">=</text:span><text:span text:style-name="T474"><text:s/></text:span><text:span text:style-name="T475">trial</text:span><text:span text:style-name="T476">.</text:span><text:span text:style-name="T477">suggest_categorical</text:span><text:span text:style-name="T478">(</text:span><text:span text:style-name="T479">"k_i"</text:span><text:span text:style-name="T480">, [</text:span><text:span text:style-name="T481">1</text:span><text:span text:style-name="T482">,<text:s/></text:span><text:span text:style-name="T483">2</text:span><text:span text:style-name="T484">,<text:s/></text:span><text:span text:style-name="T485">4</text:span><text:span text:style-name="T486">,<text:s/></text:span><text:span text:style-name="T487">8</text:span><text:span text:style-name="T488">])</text:span></text:p>
      <text:p text:style-name="P489"><text:span text:style-name="T490">theta_bar_scale</text:span><text:span text:style-name="T491"><text:s/></text:span><text:span text:style-name="T492">=</text:span><text:span text:style-name="T493"><text:s/></text:span><text:span text:style-name="T494">trial</text:span><text:span text:style-name="T495">.</text:span><text:span text:style-name="T496">suggest_float</text:span><text:span text:style-name="T497">(</text:span><text:span text:style-name="T498">"theta_bar_scale"</text:span><text:span text:style-name="T499">,<text:s/></text:span><text:span text:style-name="T500">0.001</text:span><text:span text:style-name="T501">,<text:s/></text:span><text:span text:style-name="T502">1.0</text:span><text:span text:style-name="T503">,<text:s/></text:span><text:span text:style-name="T504">log</text:span><text:span text:style-name="T505">=</text:span><text:span text:style-name="T506">True</text:span><text:span text:style-name="T507">)</text:span></text:p>
      <text:p text:style-name="P508"><text:span text:style-name="T509">b</text:span><text:span text:style-name="T510"><text:s/></text:span><text:span text:style-name="T511">=</text:span><text:span text:style-name="T512"><text:s/></text:span><text:span text:style-name="T513">1</text:span></text:p>
      <text:p text:style-name="P514"><text:span text:style-name="T515">hidden_width</text:span><text:span text:style-name="T516"><text:s/></text:span><text:span text:style-name="T517">=</text:span><text:span text:style-name="T518"><text:s/></text:span><text:span text:style-name="T519">16</text:span></text:p>
      <text:p text:style-name="P520"/>
      <text:p text:style-name="Standard">I have generated database using the above gains. Each were run 100 times.</text:p>
      <text:p text:style-name="Standard"/>
      <text:p text:style-name="Standard">For developed (ResNet inside the integral), the best cost was 107.5518 with gamma = 22.3669, sigma_mod = 0.76541, k_0 = 2, k_i =2, theta_bar_scale: 0.00132766</text:p>
      <text:p text:style-name="Standard"/>
      <text:p text:style-name="Standard">For the baseline (ResNet outside the integral), the best cost was 137.9704 with gamma = 37.66, sigma_mod = 0.001197, k_0 = 1, k_i =8, theta_bar: 1337.21 (Scale: 0.5749)</text:p>
      <text:p text:style-name="Standard"/>
      <text:p text:style-name="Standard">PHASE 1 (TAKE 2)</text:p>
      <text:p text:style-name="Standard">On June 17, I ran 501 trials of Phase 1 again from scratch. The best ITAE cost was 160.8355 and the best parameters were</text:p>
      <text:p text:style-name="Standard">Best Params: {'k1': 1.9998108856232995, 'k2': 0.6529643057605065, 'k3': 0.7406820227437091, 'k_rise': 0.003695960415369938}</text:p>
      <text:p text:style-name="Standard">k1=2, k2=0.65, k3=0.74,k_rise=0.0037.</text:p>
      <text:p text:style-name="Standard"/>
      <text:p text:style-name="Standard"><text:span text:style-name="T521">I changed the desired trajectory<text:s/></text:span>to something more interesting. I am now running 1000 trials (which stop early if the cost hasn’t improved in 100 trials). I also removed the symmetry from k_2 and k_3.</text:p>
      <text:p text:style-name="Standard"/>
      <text:p text:style-name="Standard">PHASE 1 (TAKE 3)</text:p>
      <text:p text:style-name="Standard">It converged at trial 204. Best cost was trial 102 with value: 143.9321 and parameters: {'k1': 3.3262179738426725, 'k2': 0.2918707785937102, 'k3': 0.432471391222489, 'k_rise': 0.0496335953575354}. RMS Tracking error was .5834</text:p>
      <text:p text:style-name="Standard"/>
      <text:p text:style-name="Standard"><text:span text:style-name="T522">param_dict</text:span><text:span text:style-name="T523">[</text:span><text:span text:style-name="T524">'k1'</text:span><text:span text:style-name="T525">]<text:s/></text:span><text:span text:style-name="T526">=</text:span><text:span text:style-name="T527"><text:s/></text:span><text:span text:style-name="T528">trial</text:span><text:span text:style-name="T529">.</text:span><text:span text:style-name="T530">suggest_float</text:span><text:span text:style-name="T531">(</text:span><text:span text:style-name="T532">"k1"</text:span><text:span text:style-name="T533">,<text:s/></text:span><text:span text:style-name="T534">1.0</text:span><text:span text:style-name="T535">,<text:s/></text:span><text:span text:style-name="T536">8.0</text:span><text:span text:style-name="T537">)</text:span></text:p>
      <text:p text:style-name="P538"><text:span text:style-name="T539">param_dict</text:span><text:span text:style-name="T540">[</text:span><text:span text:style-name="T541">'k2'</text:span><text:span text:style-name="T542">]<text:s/></text:span><text:span text:style-name="T543">=</text:span><text:span text:style-name="T544"><text:s/></text:span><text:span text:style-name="T545">trial</text:span><text:span text:style-name="T546">.</text:span><text:span text:style-name="T547">suggest_float</text:span><text:span text:style-name="T548">(</text:span><text:span text:style-name="T549">"k2"</text:span><text:span text:style-name="T550">,<text:s/></text:span><text:span text:style-name="T551">0.1</text:span><text:span text:style-name="T552">,<text:s/></text:span><text:span text:style-name="T553">5.0</text:span><text:span text:style-name="T554">)</text:span></text:p>
      <text:p text:style-name="P555"><text:span text:style-name="T556">param_dict</text:span><text:span text:style-name="T557">[</text:span><text:span text:style-name="T558">'k3'</text:span><text:span text:style-name="T559">]<text:s/></text:span><text:span text:style-name="T560">=</text:span><text:span text:style-name="T561"><text:s/></text:span><text:span text:style-name="T562">trial</text:span><text:span text:style-name="T563">.</text:span><text:span text:style-name="T564">suggest_float</text:span><text:span text:style-name="T565">(</text:span><text:span text:style-name="T566">"k3"</text:span><text:span text:style-name="T567">,<text:s/></text:span><text:span text:style-name="T568">param_dict</text:span><text:span text:style-name="T569">[</text:span><text:span text:style-name="T570">'k2'</text:span><text:span text:style-name="T571">],<text:s/></text:span><text:span text:style-name="T572">5.0</text:span><text:span text:style-name="T573">)<text:s/></text:span><text:span text:style-name="T574"># BREAK SYMMETRY: Force k3's lower bound to be k2</text:span></text:p>
      <text:p text:style-name="P575"><text:span text:style-name="T576">param_dict</text:span><text:span text:style-name="T577">[</text:span><text:span text:style-name="T578">'k_rise'</text:span><text:span text:style-name="T579">]<text:s/></text:span><text:span text:style-name="T580">=</text:span><text:span text:style-name="T581"><text:s/></text:span><text:span text:style-name="T582">trial</text:span><text:span text:style-name="T583">.</text:span><text:span text:style-name="T584">suggest_float</text:span><text:span text:style-name="T585">(</text:span><text:span text:style-name="T586">"k_rise"</text:span><text:span text:style-name="T587">,<text:s/></text:span><text:span text:style-name="T588">0.0001</text:span><text:span text:style-name="T589">,<text:s/></text:span><text:span text:style-name="T590">0.05</text:span><text:span text:style-name="T591">,<text:s/></text:span><text:span text:style-name="T592">log</text:span><text:span text:style-name="T593">=</text:span><text:span text:style-name="T594">True</text:span><text:span text:style-name="T595">)</text:span></text:p>
      <text:p text:style-name="Standard"/>
      <text:p text:style-name="Standard"/>
      <text:p text:style-name="Standard">Unfortunately k_rise was quite close to the limit so we have to rerun.</text:p>
      <text:p text:style-name="Standard"/>
      <text:p text:style-name="Standard">PHASE 1 (TAKE 4)</text:p>
      <text:p text:style-name="Standard"><text:span text:style-name="T596">param_dict</text:span><text:span text:style-name="T597">[</text:span><text:span text:style-name="T598">'k1'</text:span><text:span text:style-name="T599">]<text:s/></text:span><text:span text:style-name="T600">=</text:span><text:span text:style-name="T601"><text:s/></text:span><text:span text:style-name="T602">trial</text:span><text:span text:style-name="T603">.</text:span><text:span text:style-name="T604">suggest_float</text:span><text:span text:style-name="T605">(</text:span><text:span text:style-name="T606">"k1"</text:span><text:span text:style-name="T607">,<text:s/></text:span><text:span text:style-name="T608">1.0</text:span><text:span text:style-name="T609">,<text:s/></text:span><text:span text:style-name="T610">8.0</text:span><text:span text:style-name="T611">)</text:span></text:p>
      <text:p text:style-name="P612"><text:span text:style-name="T613">param_dict</text:span><text:span text:style-name="T614">[</text:span><text:span text:style-name="T615">'k2'</text:span><text:span text:style-name="T616">]<text:s/></text:span><text:span text:style-name="T617">=</text:span><text:span text:style-name="T618"><text:s/></text:span><text:span text:style-name="T619">trial</text:span><text:span text:style-name="T620">.</text:span><text:span text:style-name="T621">suggest_float</text:span><text:span text:style-name="T622">(</text:span><text:span text:style-name="T623">"k2"</text:span><text:span text:style-name="T624">,<text:s/></text:span><text:span text:style-name="T625">0.1</text:span><text:span text:style-name="T626">,<text:s/></text:span><text:span text:style-name="T627">1.0</text:span><text:span text:style-name="T628">)</text:span></text:p>
      <text:p text:style-name="P629"><text:span text:style-name="T630">param_dict</text:span><text:span text:style-name="T631">[</text:span><text:span text:style-name="T632">'k3'</text:span><text:span text:style-name="T633">]<text:s/></text:span><text:span text:style-name="T634">=</text:span><text:span text:style-name="T635"><text:s/></text:span><text:span text:style-name="T636">trial</text:span><text:span text:style-name="T637">.</text:span><text:span text:style-name="T638">suggest_float</text:span><text:span text:style-name="T639">(</text:span><text:span text:style-name="T640">"k3"</text:span><text:span text:style-name="T641">,<text:s/></text:span><text:span text:style-name="T642">param_dict</text:span><text:span text:style-name="T643">[</text:span><text:span text:style-name="T644">'k2'</text:span><text:span text:style-name="T645">],<text:s/></text:span><text:span text:style-name="T646">1.0</text:span><text:span text:style-name="T647">)<text:s/></text:span><text:span text:style-name="T648"># BREAK SYMMETRY: Force k3's lower bound to be k2</text:span></text:p>
      <text:p text:style-name="P649"><text:span text:style-name="T650">param_dict</text:span><text:span text:style-name="T651">[</text:span><text:span text:style-name="T652">'k_rise'</text:span><text:span text:style-name="T653">]<text:s/></text:span><text:span text:style-name="T654">=</text:span><text:span text:style-name="T655"><text:s/></text:span><text:span text:style-name="T656">trial</text:span><text:span text:style-name="T657">.</text:span><text:span text:style-name="T658">suggest_float</text:span><text:span text:style-name="T659">(</text:span><text:span text:style-name="T660">"k_rise"</text:span><text:span text:style-name="T661">,<text:s/></text:span><text:span text:style-name="T662">0.001</text:span><text:span text:style-name="T663">,<text:s/></text:span><text:span text:style-name="T664">10.0</text:span><text:span text:style-name="T665">,<text:s/></text:span><text:span text:style-name="T666">log</text:span><text:span text:style-name="T667">=</text:span><text:span text:style-name="T668">True</text:span><text:span text:style-name="T669">)</text:span></text:p>
      <text:p text:style-name="P670"/>
      <text:p text:style-name="P671">========================================</text:p>
      <text:p text:style-name="P672">🏆 ABSOLUTE BEST TRIAL 🏆</text:p>
      <text:p text:style-name="P673">========================================</text:p>
      <text:p text:style-name="P674">Trial Number : 479</text:p>
      <text:p text:style-name="P675">ITAE Cost <text:s text:c="3"/>: 45.3812</text:p>
      <text:p text:style-name="P676">Parameters <text:s text:c="2"/>:</text:p>
      <text:p text:style-name="P677"><text:s text:c="4"/>k1: 1.0023023754462224</text:p>
      <text:p text:style-name="P678"><text:s text:c="4"/>k2: 0.47303088708289664</text:p>
      <text:p text:style-name="P679"><text:s text:c="4"/>k3: 0.4876260355061123</text:p>
      <text:p text:style-name="P680"><text:s text:c="4"/>k_rise: 0.08491915751268746</text:p>
      <text:p text:style-name="P681"/>
      <text:p text:style-name="P682">=================================================================</text:p>
      <text:p text:style-name="P683">Rank <text:s text:c="2"/>| Trial <text:s text:c="2"/>| Cost <text:s text:c="5"/>| k1 <text:s text:c="5"/>| k2 <text:s text:c="5"/>| k3 <text:s text:c="5"/>| k_rise <text:s text:c="2"/></text:p>
      <text:p text:style-name="P684">-----------------------------------------------------------------</text:p>
      <text:p text:style-name="P685">1 <text:s text:c="5"/>| 479 <text:s text:c="4"/>| 45.4 <text:s text:c="5"/>| 1 <text:s text:c="6"/>| 0.473 <text:s text:c="2"/>| 0.488 <text:s text:c="2"/>| 0.0849 <text:s text:c="2"/></text:p>
      <text:p text:style-name="P686">2 <text:s text:c="5"/>| 553 <text:s text:c="4"/>| 45.5 <text:s text:c="5"/>| 1.01 <text:s text:c="3"/>| 0.474 <text:s text:c="2"/>| 0.488 <text:s text:c="2"/>| 0.0957 <text:s text:c="2"/></text:p>
      <text:p text:style-name="P687">3 <text:s text:c="5"/>| 540 <text:s text:c="4"/>| 45.5 <text:s text:c="5"/>| 1 <text:s text:c="6"/>| 0.471 <text:s text:c="2"/>| 0.485 <text:s text:c="2"/>| 0.116 <text:s text:c="3"/></text:p>
      <text:p text:style-name="P688">4 <text:s text:c="5"/>| 403 <text:s text:c="4"/>| 45.6 <text:s text:c="5"/>| 1.01 <text:s text:c="3"/>| 0.468 <text:s text:c="2"/>| 0.487 <text:s text:c="2"/>| 0.109 <text:s text:c="3"/></text:p>
      <text:p text:style-name="P689">5 <text:s text:c="5"/>| 411 <text:s text:c="4"/>| 45.7 <text:s text:c="5"/>| 1 <text:s text:c="6"/>| 0.472 <text:s text:c="2"/>| 0.489 <text:s text:c="2"/>| 0.111 <text:s text:c="3"/></text:p>
      <text:p text:style-name="P690">6 <text:s text:c="5"/>| 400 <text:s text:c="4"/>| 45.7 <text:s text:c="5"/>| 1.01 <text:s text:c="3"/>| 0.467 <text:s text:c="2"/>| 0.484 <text:s text:c="2"/>| 0.112 <text:s text:c="3"/></text:p>
      <text:p text:style-name="P691">7 <text:s text:c="5"/>| 549 <text:s text:c="4"/>| 45.8 <text:s text:c="5"/>| 1 <text:s text:c="6"/>| 0.481 <text:s text:c="2"/>| 0.494 <text:s text:c="2"/>| 0.0955 <text:s text:c="2"/></text:p>
      <text:p text:style-name="P692">8 <text:s text:c="5"/>| 424 <text:s text:c="4"/>| 45.8 <text:s text:c="5"/>| 1.01 <text:s text:c="3"/>| 0.483 <text:s text:c="2"/>| 0.513 <text:s text:c="2"/>| 0.103 <text:s text:c="3"/></text:p>
      <text:p text:style-name="P693">9 <text:s text:c="5"/>| 634 <text:s text:c="4"/>| 45.8 <text:s text:c="5"/>| 1.01 <text:s text:c="3"/>| 0.51 <text:s text:c="3"/>| 0.519 <text:s text:c="2"/>| 0.0801 <text:s text:c="2"/></text:p>
      <text:p text:style-name="P694">10 <text:s text:c="4"/>| 409 <text:s text:c="4"/>| 45.9 <text:s text:c="5"/>| 1 <text:s text:c="6"/>| 0.475 <text:s text:c="2"/>| 0.489 <text:s text:c="2"/>| 0.114 <text:s text:c="3"/></text:p>
      <text:p text:style-name="P695">11 <text:s text:c="4"/>| 407 <text:s text:c="4"/>| 46 <text:s text:c="7"/>| 1 <text:s text:c="6"/>| 0.473 <text:s text:c="2"/>| 0.489 <text:s text:c="2"/>| 0.115 <text:s text:c="3"/></text:p>
      <text:soft-page-break/>
      <text:p text:style-name="P696">12 <text:s text:c="4"/>| 467 <text:s text:c="4"/>| 46.1 <text:s text:c="5"/>| 1.01 <text:s text:c="3"/>| 0.46 <text:s text:c="3"/>| 0.475 <text:s text:c="2"/>| 0.101 <text:s text:c="3"/></text:p>
      <text:p text:style-name="P697">13 <text:s text:c="4"/>| 438 <text:s text:c="4"/>| 46.1 <text:s text:c="5"/>| 1 <text:s text:c="6"/>| 0.466 <text:s text:c="2"/>| 0.48 <text:s text:c="3"/>| 0.0924 <text:s text:c="2"/></text:p>
      <text:p text:style-name="P698">14 <text:s text:c="4"/>| 401 <text:s text:c="4"/>| 46.1 <text:s text:c="5"/>| 1.03 <text:s text:c="3"/>| 0.465 <text:s text:c="2"/>| 0.482 <text:s text:c="2"/>| 0.115 <text:s text:c="3"/></text:p>
      <text:p text:style-name="P699">15 <text:s text:c="4"/>| 574 <text:s text:c="4"/>| 46.1 <text:s text:c="5"/>| 1 <text:s text:c="6"/>| 0.472 <text:s text:c="2"/>| 0.49 <text:s text:c="3"/>| 0.096 <text:s text:c="3"/></text:p>
      <text:p text:style-name="P700">=================================================================</text:p>
      <text:p text:style-name="P701"/>
      <text:p text:style-name="P702">It ran for 679 trials. 1000 limited. Stops after 200 if best one doesn’t improve.</text:p>
      <text:p text:style-name="P703"/>
      <text:p text:style-name="P704">PHASE 1 (TAKE 5)</text:p>
      <text:p text:style-name="P705">Changing to 500 trials limit. Stop after 50</text:p>
      <text:p text:style-name="Standard">New search space is</text:p>
      <text:p text:style-name="Standard"/>
      <text:p text:style-name="Standard"><text:span text:style-name="T706">param_dict</text:span><text:span text:style-name="T707">[</text:span><text:span text:style-name="T708">'k1'</text:span><text:span text:style-name="T709">]<text:s/></text:span><text:span text:style-name="T710">=</text:span><text:span text:style-name="T711"><text:s/></text:span><text:span text:style-name="T712">trial</text:span><text:span text:style-name="T713">.</text:span><text:span text:style-name="T714">suggest_float</text:span><text:span text:style-name="T715">(</text:span><text:span text:style-name="T716">"k1"</text:span><text:span text:style-name="T717">,<text:s/></text:span><text:span text:style-name="T718">0.1</text:span><text:span text:style-name="T719">,<text:s/></text:span><text:span text:style-name="T720">3.0</text:span><text:span text:style-name="T721">)</text:span></text:p>
      <text:p text:style-name="P722"><text:span text:style-name="T723">param_dict</text:span><text:span text:style-name="T724">[</text:span><text:span text:style-name="T725">'k2'</text:span><text:span text:style-name="T726">]<text:s/></text:span><text:span text:style-name="T727">=</text:span><text:span text:style-name="T728"><text:s/></text:span><text:span text:style-name="T729">trial</text:span><text:span text:style-name="T730">.</text:span><text:span text:style-name="T731">suggest_float</text:span><text:span text:style-name="T732">(</text:span><text:span text:style-name="T733">"k2"</text:span><text:span text:style-name="T734">,<text:s/></text:span><text:span text:style-name="T735">0.1</text:span><text:span text:style-name="T736">,<text:s/></text:span><text:span text:style-name="T737">2.0</text:span><text:span text:style-name="T738">)</text:span></text:p>
      <text:p text:style-name="P739"><text:span text:style-name="T740">param_dict</text:span><text:span text:style-name="T741">[</text:span><text:span text:style-name="T742">'k3'</text:span><text:span text:style-name="T743">]<text:s/></text:span><text:span text:style-name="T744">=</text:span><text:span text:style-name="T745"><text:s/></text:span><text:span text:style-name="T746">trial</text:span><text:span text:style-name="T747">.</text:span><text:span text:style-name="T748">suggest_float</text:span><text:span text:style-name="T749">(</text:span><text:span text:style-name="T750">"k3"</text:span><text:span text:style-name="T751">,<text:s/></text:span><text:span text:style-name="T752">param_dict</text:span><text:span text:style-name="T753">[</text:span><text:span text:style-name="T754">'k2'</text:span><text:span text:style-name="T755">],<text:s/></text:span><text:span text:style-name="T756">2.0</text:span><text:span text:style-name="T757">)<text:s/></text:span><text:span text:style-name="T758"># BREAK SYMMETRY: Force k3's lower bound to be k2</text:span></text:p>
      <text:p text:style-name="P759"><text:span text:style-name="T760">param_dict</text:span><text:span text:style-name="T761">[</text:span><text:span text:style-name="T762">'k_rise'</text:span><text:span text:style-name="T763">]<text:s/></text:span><text:span text:style-name="T764">=</text:span><text:span text:style-name="T765"><text:s/></text:span><text:span text:style-name="T766">trial</text:span><text:span text:style-name="T767">.</text:span><text:span text:style-name="T768">suggest_float</text:span><text:span text:style-name="T769">(</text:span><text:span text:style-name="T770">"k_rise"</text:span><text:span text:style-name="T771">,<text:s/></text:span><text:span text:style-name="T772">0.01</text:span><text:span text:style-name="T773">,<text:s/></text:span><text:span text:style-name="T774">10.0</text:span><text:span text:style-name="T775">,<text:s/></text:span><text:span text:style-name="T776">log</text:span><text:span text:style-name="T777">=</text:span><text:span text:style-name="T778">True</text:span><text:span text:style-name="T779">)</text:span></text:p>
      <text:p text:style-name="P780"/>
      <text:p text:style-name="P781">max@MAX-MINT ~/voxl-px4-sitl % python3 get_best_results.py <text:s/></text:p>
      <text:p text:style-name="P782">[*] Loading study 'phase1_noresnet_baseline_tuning' from sqlite:///phase1_tuning.db...</text:p>
      <text:p text:style-name="P783"/>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soft-page-break/>
      <text:p text:style-name="Standard">14 <text:s text:c="4"/>| 227 <text:s text:c="4"/>| 32.3 <text:s text:c="5"/>| 0.103 <text:s text:c="2"/>| 0.166 <text:s text:c="2"/>| 1.48 <text:s text:c="3"/>| 0.145 <text:s text:c="3"/></text:p>
      <text:p text:style-name="Standard">15 <text:s text:c="4"/>| 203 <text:s text:c="4"/>| 32.4 <text:s text:c="5"/>| 0.103 <text:s text:c="2"/>| 0.138 <text:s text:c="2"/>| 1.38 <text:s text:c="3"/>| 0.119 <text:s text:c="3"/></text:p>
      <text:p text:style-name="Standard">=================================================================</text:p>
      <text:p text:style-name="Standard"/>
      <text:p text:style-name="Standard">PHASE 1 (Take 6)</text:p>
      <text:p text:style-name="Standard"/>
      <text:p text:style-name="Standard">I shortened to 500 trials with a cutoff of 50. It finished in 206 trials.</text:p>
      <text:p text:style-name="Standard"/>
      <text:p text:style-name="Standard">param_dict['k1'] = trial.suggest_float("k1", 0.001, 2.0, log=True)</text:p>
      <text:p text:style-name="Standard">param_dict['k2'] = trial.suggest_float("k2", 0.001, 5.0, log=True)</text:p>
      <text:p text:style-name="Standard">param_dict['k3'] = trial.suggest_float("k3", param_dict['k2'], 5.0)</text:p>
      <text:p text:style-name="Standard">param_dict['k_rise'] = trial.suggest_float("k_rise", 0.01, 2.0, log=True)</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56 <text:s text:c="4"/>| 31.4 <text:s text:c="5"/>| 0.0906 <text:s/>| 0.15 <text:s text:c="3"/>| 1.42 <text:s text:c="3"/>| 0.141 <text:s text:c="3"/></text:p>
      <text:p text:style-name="Standard">2 <text:s text:c="5"/>| 179 <text:s text:c="4"/>| 31.5 <text:s text:c="5"/>| 0.125 <text:s text:c="2"/>| 0.0763 <text:s/>| 1.53 <text:s text:c="3"/>| 0.145 <text:s text:c="3"/></text:p>
      <text:p text:style-name="Standard">3 <text:s text:c="5"/>| 177 <text:s text:c="4"/>| 31.6 <text:s text:c="5"/>| 0.135 <text:s text:c="2"/>| 0.0942 <text:s/>| 1.37 <text:s text:c="3"/>| 0.152 <text:s text:c="3"/></text:p>
      <text:p text:style-name="Standard">4 <text:s text:c="5"/>| 155 <text:s text:c="4"/>| 31.6 <text:s text:c="5"/>| 0.11 <text:s text:c="3"/>| 0.165 <text:s text:c="2"/>| 1.33 <text:s text:c="3"/>| 0.172 <text:s text:c="3"/></text:p>
      <text:p text:style-name="Standard">5 <text:s text:c="5"/>| 185 <text:s text:c="4"/>| 31.9 <text:s text:c="5"/>| 0.162 <text:s text:c="2"/>| 0.0494 <text:s/>| 1.52 <text:s text:c="3"/>| 0.14 <text:s text:c="4"/></text:p>
      <text:p text:style-name="Standard">6 <text:s text:c="5"/>| 165 <text:s text:c="4"/>| 32.1 <text:s text:c="5"/>| 0.126 <text:s text:c="2"/>| 0.215 <text:s text:c="2"/>| 1.46 <text:s text:c="3"/>| 0.188 <text:s text:c="3"/></text:p>
      <text:p text:style-name="Standard">7 <text:s text:c="5"/>| 205 <text:s text:c="4"/>| 32.2 <text:s text:c="5"/>| 0.13 <text:s text:c="3"/>| 0.0415 <text:s/>| 1.61 <text:s text:c="3"/>| 0.156 <text:s text:c="3"/></text:p>
      <text:p text:style-name="Standard">8 <text:s text:c="5"/>| 110 <text:s text:c="4"/>| 32.3 <text:s text:c="5"/>| 0.108 <text:s text:c="2"/>| 0.182 <text:s text:c="2"/>| 1.44 <text:s text:c="3"/>| 0.182 <text:s text:c="3"/></text:p>
      <text:p text:style-name="Standard">9 <text:s text:c="5"/>| 206 <text:s text:c="4"/>| 32.3 <text:s text:c="5"/>| 0.0956 <text:s/>| 0.0386 <text:s/>| 1.38 <text:s text:c="3"/>| 0.148 <text:s text:c="3"/></text:p>
      <text:p text:style-name="Standard">10 <text:s text:c="4"/>| 113 <text:s text:c="4"/>| 32.3 <text:s text:c="5"/>| 0.231 <text:s text:c="2"/>| 0.00822 | 1.39 <text:s text:c="3"/>| 0.183 <text:s text:c="3"/></text:p>
      <text:p text:style-name="Standard">11 <text:s text:c="4"/>| 176 <text:s text:c="4"/>| 32.5 <text:s text:c="5"/>| 0.14 <text:s text:c="3"/>| 0.134 <text:s text:c="2"/>| 1.34 <text:s text:c="3"/>| 0.189 <text:s text:c="3"/></text:p>
      <text:p text:style-name="Standard">12 <text:s text:c="4"/>| 180 <text:s text:c="4"/>| 32.6 <text:s text:c="5"/>| 0.134 <text:s text:c="2"/>| 0.0706 <text:s/>| 1.64 <text:s text:c="3"/>| 0.135 <text:s text:c="3"/></text:p>
      <text:p text:style-name="Standard">13 <text:s text:c="4"/>| 203 <text:s text:c="4"/>| 32.6 <text:s text:c="5"/>| 0.126 <text:s text:c="2"/>| 0.0374 <text:s/>| 1.5 <text:s text:c="4"/>| 0.175 <text:s text:c="3"/></text:p>
      <text:p text:style-name="Standard">14 <text:s text:c="4"/>| 181 <text:s text:c="4"/>| 32.6 <text:s text:c="5"/>| 0.137 <text:s text:c="2"/>| 0.0503 <text:s/>| 1.62 <text:s text:c="3"/>| 0.144 <text:s text:c="3"/></text:p>
      <text:p text:style-name="Standard">15 <text:s text:c="4"/>| 178 <text:s text:c="4"/>| 32.6 <text:s text:c="5"/>| 0.135 <text:s text:c="2"/>| 0.138 <text:s text:c="2"/>| 1.48 <text:s text:c="3"/>| 0.154 <text:s text:c="3"/></text:p>
      <text:p text:style-name="Standard">=================================================================</text:p>
      <text:p text:style-name="Standard"/>
      <text:p text:style-name="Standard">Select. <text:s/>K_1 = 0.09, k2= 0.15, k3= 1.4, k_Rise=0.14</text:p>
      <text:p text:style-name="Standard"/>
      <text:p text:style-name="Standard">PHASE 2 (Take 2)</text:p>
      <text:p text:style-name="Standard"/>
      <text:p text:style-name="Standard">max@MAX-MINT ~/voxl-px4-sitl % python3 get_best_results.py developed</text:p>
      <text:p text:style-name="Standard">[*] Loading study 'phase2_developed_optimization' from sqlite:///phase2_developed.db...</text:p>
      <text:p text:style-name="Standard"/>
      <text:p text:style-name="Standard">========================================</text:p>
      <text:p text:style-name="Standard">🏆 BEST TRIAL 🏆</text:p>
      <text:p text:style-name="Standard">========================================</text:p>
      <text:p text:style-name="Standard">Trial Number : 86</text:p>
      <text:p text:style-name="Standard">ITAE Cost <text:s text:c="3"/>: 161.1521</text:p>
      <text:p text:style-name="Standard">Parameters <text:s text:c="2"/>:</text:p>
      <text:p text:style-name="Standard"><text:s text:c="4"/>hidden_width: 16</text:p>
      <text:p text:style-name="Standard"><text:s text:c="4"/>gamma: 23.780655567965937</text:p>
      <text:p text:style-name="Standard"><text:s text:c="4"/>sigma_mod: 2.0029218323002667</text:p>
      <text:p text:style-name="Standard"/>
      <text:p text:style-name="Standard">=====================================================================</text:p>
      <text:p text:style-name="Standard">Rank <text:s text:c="2"/>| Trial <text:s text:c="2"/>| Cost <text:s text:c="5"/>| hidden_width | gamma <text:s text:c="5"/>| sigma_mod</text:p>
      <text:p text:style-name="Standard">---------------------------------------------------------------------</text:p>
      <text:p text:style-name="Standard">1 <text:s text:c="5"/>| 86 <text:s text:c="5"/>| 161 <text:s text:c="6"/>| 16 <text:s text:c="8"/>| 23.8 <text:s text:c="6"/>| 2 <text:s text:c="8"/></text:p>
      <text:p text:style-name="Standard">2 <text:s text:c="5"/>| 133 <text:s text:c="4"/>| 173 <text:s text:c="6"/>| 16 <text:s text:c="8"/>| 15.2 <text:s text:c="6"/>| 3.18 <text:s text:c="5"/></text:p>
      <text:p text:style-name="Standard">3 <text:s text:c="5"/>| 129 <text:s text:c="4"/>| 185 <text:s text:c="6"/>| 16 <text:s text:c="8"/>| 16.9 <text:s text:c="6"/>| 3.06 <text:s text:c="5"/></text:p>
      <text:p text:style-name="Standard">4 <text:s text:c="5"/>| 73 <text:s text:c="5"/>| 186 <text:s text:c="6"/>| 16 <text:s text:c="8"/>| 16.9 <text:s text:c="6"/>| 2.69 <text:s text:c="5"/></text:p>
      <text:p text:style-name="Standard">5 <text:s text:c="5"/>| 142 <text:s text:c="4"/>| 193 <text:s text:c="6"/>| 16 <text:s text:c="8"/>| 14.1 <text:s text:c="6"/>| 3.3 <text:s text:c="6"/></text:p>
      <text:p text:style-name="Standard">6 <text:s text:c="5"/>| 132 <text:s text:c="4"/>| 205 <text:s text:c="6"/>| 16 <text:s text:c="8"/>| 15.4 <text:s text:c="6"/>| 3.24 <text:s text:c="5"/></text:p>
      <text:p text:style-name="Standard">7 <text:s text:c="5"/>| 140 <text:s text:c="4"/>| 210 <text:s text:c="6"/>| 16 <text:s text:c="8"/>| 10.2 <text:s text:c="6"/>| 4.23 <text:s text:c="5"/></text:p>
      <text:p text:style-name="Standard">8 <text:s text:c="5"/>| 126 <text:s text:c="4"/>| 211 <text:s text:c="6"/>| 16 <text:s text:c="8"/>| 15.8 <text:s text:c="6"/>| 3.05 <text:s text:c="5"/></text:p>
      <text:p text:style-name="Standard">9 <text:s text:c="5"/>| 127 <text:s text:c="4"/>| 215 <text:s text:c="6"/>| 16 <text:s text:c="8"/>| 16.6 <text:s text:c="6"/>| 2.94 <text:s text:c="5"/></text:p>
      <text:p text:style-name="Standard">10 <text:s text:c="4"/>| 78 <text:s text:c="5"/>| 217 <text:s text:c="6"/>| 16 <text:s text:c="8"/>| 13.8 <text:s text:c="6"/>| 3.67 <text:s text:c="5"/></text:p>
      <text:p text:style-name="Standard">11 <text:s text:c="4"/>| 128 <text:s text:c="4"/>| 217 <text:s text:c="6"/>| 16 <text:s text:c="8"/>| 15 <text:s text:c="8"/>| 3.13 <text:s text:c="5"/></text:p>
      <text:p text:style-name="Standard">12 <text:s text:c="4"/>| 118 <text:s text:c="4"/>| 221 <text:s text:c="6"/>| 16 <text:s text:c="8"/>| 12.5 <text:s text:c="6"/>| 3.49 <text:s text:c="5"/></text:p>
      <text:p text:style-name="Standard">13 <text:s text:c="4"/>| 144 <text:s text:c="4"/>| 222 <text:s text:c="6"/>| 32 <text:s text:c="8"/>| 14.1 <text:s text:c="6"/>| 3.46 <text:s text:c="5"/></text:p>
      <text:p text:style-name="Standard">14 <text:s text:c="4"/>| 122 <text:s text:c="4"/>| 229 <text:s text:c="6"/>| 16 <text:s text:c="8"/>| 11.6 <text:s text:c="6"/>| 4.24 <text:s text:c="5"/></text:p>
      <text:p text:style-name="Standard">15 <text:s text:c="4"/>| 141 <text:s text:c="4"/>| 233 <text:s text:c="6"/>| 32 <text:s text:c="8"/>| 14.1 <text:s text:c="6"/>| 3.47 <text:s text:c="5"/></text:p>
      <text:p text:style-name="Standard">=====================================================================</text:p>
      <text:p text:style-name="Standard"/>
      <text:p text:style-name="Standard">max@MAX-MINT ~/voxl-px4-sitl % python3 get_best_results.py baseline</text:p>
      <text:p text:style-name="Standard">[*] Loading study 'phase2_baseline_optimization' from sqlite:///phase2_baseline.db...</text:p>
      <text:p text:style-name="Standard"/>
      <text:p text:style-name="Standard">========================================</text:p>
      <text:p text:style-name="Standard">🏆 BEST TRIAL 🏆</text:p>
      <text:p text:style-name="Standard">========================================</text:p>
      <text:p text:style-name="Standard">Trial Number : 108</text:p>
      <text:p text:style-name="Standard">ITAE Cost <text:s text:c="3"/>: 224.6790</text:p>
      <text:p text:style-name="Standard">Parameters <text:s text:c="2"/>:</text:p>
      <text:p text:style-name="Standard"><text:s text:c="4"/>hidden_width: 16</text:p>
      <text:p text:style-name="Standard"><text:s text:c="4"/>gamma: 0.7723368178093489</text:p>
      <text:p text:style-name="Standard"><text:s text:c="4"/>sigma_mod: 2.2560451011608462</text:p>
      <text:p text:style-name="Standard"/>
      <text:p text:style-name="Standard">=====================================================================</text:p>
      <text:p text:style-name="Standard">Rank <text:s text:c="2"/>| Trial <text:s text:c="2"/>| Cost <text:s text:c="5"/>| hidden_width | gamma <text:s text:c="5"/>| sigma_mod</text:p>
      <text:p text:style-name="Standard">---------------------------------------------------------------------</text:p>
      <text:p text:style-name="Standard">1 <text:s text:c="5"/>| 108 <text:s text:c="4"/>| 225 <text:s text:c="6"/>| 16 <text:s text:c="8"/>| 0.772<text:s/>­<text:s text:c="5"/>| 2.26 <text:s text:c="5"/></text:p>
      <text:p text:style-name="Standard">2 <text:s text:c="5"/>| 123 <text:s text:c="4"/>| 229 <text:s text:c="6"/>| 16 <text:s text:c="8"/>| 0.742 <text:s text:c="5"/>| 2.29 <text:s text:c="5"/></text:p>
      <text:p text:style-name="Standard">3 <text:s text:c="5"/>| 147 <text:s text:c="4"/>| 229 <text:s text:c="6"/>| 16 <text:s text:c="8"/>| 0.673 <text:s text:c="5"/>| 2.38 <text:s text:c="5"/></text:p>
      <text:p text:style-name="Standard">4 <text:s text:c="5"/>| 128 <text:s text:c="4"/>| 230 <text:s text:c="6"/>| 16 <text:s text:c="8"/>| 0.613 <text:s text:c="5"/>| 2.35 <text:s text:c="5"/></text:p>
      <text:p text:style-name="Standard">5 <text:s text:c="5"/>| 133 <text:s text:c="4"/>| 230 <text:s text:c="6"/>| 16 <text:s text:c="8"/>| 0.876 <text:s text:c="5"/>| 2.39 <text:s text:c="5"/></text:p>
      <text:p text:style-name="Standard">6 <text:s text:c="5"/>| 79 <text:s text:c="5"/>| 230 <text:s text:c="6"/>| 16 <text:s text:c="8"/>| 0.958 <text:s text:c="5"/>| 2.66 <text:s text:c="5"/></text:p>
      <text:p text:style-name="Standard">7 <text:s text:c="5"/>| 81 <text:s text:c="5"/>| 232 <text:s text:c="6"/>| 16 <text:s text:c="8"/>| 1.11 <text:s text:c="6"/>| 2.86 <text:s text:c="5"/></text:p>
      <text:p text:style-name="Standard">8 <text:s text:c="5"/>| 125 <text:s text:c="4"/>| 233 <text:s text:c="6"/>| 16 <text:s text:c="8"/>|<text:s/>­0.777 <text:s text:c="5"/>| 2.26 <text:s text:c="5"/></text:p>
      <text:p text:style-name="Standard">9 <text:s text:c="5"/>| 40 <text:s text:c="5"/>| 233 <text:s text:c="6"/>| 16 <text:s text:c="8"/>| 1.31 <text:s text:c="6"/>| 2.44 <text:s text:c="5"/></text:p>
      <text:p text:style-name="Standard">10 <text:s text:c="4"/>| 94 <text:s text:c="5"/>| 233 <text:s text:c="6"/>| 16 <text:s text:c="8"/>| 0.872 <text:s text:c="5"/>| 2.48 <text:s text:c="5"/></text:p>
      <text:p text:style-name="Standard">11 <text:s text:c="4"/>| 103 <text:s text:c="4"/>| 234 <text:s text:c="6"/>| 16 <text:s text:c="8"/>| 0.993 <text:s text:c="5"/>| 2.32 <text:s text:c="5"/></text:p>
      <text:p text:style-name="Standard">12 <text:s text:c="4"/>| 122 <text:s text:c="4"/>| 234 <text:s text:c="6"/>| 16 <text:s text:c="8"/>| 0.649 <text:s text:c="5"/>| 2.51 <text:s text:c="5"/></text:p>
      <text:soft-page-break/>
      <text:p text:style-name="Standard">13 <text:s text:c="4"/>| 42 <text:s text:c="5"/>| 234 <text:s text:c="6"/>| 16 <text:s text:c="8"/>| 0.8 <text:s text:c="7"/>| 2.19 <text:s text:c="5"/></text:p>
      <text:p text:style-name="Standard">14 <text:s text:c="4"/>| 157 <text:s text:c="4"/>| 234 <text:s text:c="6"/>| 16 <text:s text:c="8"/>| 0.941 <text:s text:c="5"/>| 2.57 <text:s text:c="5"/></text:p>
      <text:p text:style-name="Standard">15 <text:s text:c="4"/>| 104 <text:s text:c="4"/>| 234 <text:s text:c="6"/>| 16 <text:s text:c="8"/>| 0.848 <text:s text:c="5"/>| 2.32 <text:s text:c="5"/></text:p>
      <text:p text:style-name="Standard">=====================================================================</text:p>
      <text:p text:style-name="Standard"/>
      <text:p text:style-name="Standard">Running the best ones:</text:p>
      <text:p text:style-name="Standard">“NO_FF” means that there is no feedforward term qd_ddot.</text:p>
      <text:p text:style-name="Standard"/>
      <text:p text:style-name="Standard">======================================================================</text:p>
      <text:p text:style-name="Standard">Controller <text:s text:c="8"/>| ITAE Cost <text:s text:c="3"/>| Tracking RMS (m) <text:s text:c="2"/>| Effort RMS (m/s^2)</text:p>
      <text:p text:style-name="Standard">----------------------------------------------------------------------</text:p>
      <text:p text:style-name="Standard">noresnet <text:s text:c="10"/>| 31.4746 <text:s text:c="5"/>| 0.5394 <text:s text:c="12"/>| 0.9746 <text:s text:c="8"/></text:p>
      <text:p text:style-name="Standard">noresnet_no_ff <text:s text:c="4"/>| 297.0451 <text:s text:c="4"/>| 0.6369 <text:s text:c="12"/>| 1.0858 <text:s text:c="8"/></text:p>
      <text:p text:style-name="Standard">baseline <text:s text:c="10"/>| 237.0074 <text:s text:c="4"/>| 0.6942 <text:s text:c="12"/>| 1.6116 <text:s text:c="8"/></text:p>
      <text:p text:style-name="Standard">developed <text:s text:c="9"/>| 177.7252 <text:s text:c="4"/>| 0.6012 <text:s text:c="12"/>| 1.1556 <text:s text:c="8"/></text:p>
      <text:p text:style-name="Standard">======================================================================<text:line-break/></text:p>
      <text:p text:style-name="Standard">Technically the best DEVELOPED had Gamma = 23.7807 and sigma_mod = 2.0029 and a Cost of 389.1152 even Optuna said it 116 ish. RMS Error is 0.8688. Effort RMS is 1.1805. Above was the second best one Optuna found. I image the spike in cost was because it was marginally numerically stable.</text:p>
      <text:p text:style-name="Standard"/>
      <text:p text:style-name="Standard"/>
      <text:p text:style-name="Standard">PHASE 1 (TAKE 7)</text:p>
      <text:p text:style-name="Standard"/>
      <text:p text:style-name="Standard">I have changed the desired trajectory. There are two now. A warped figure eight (trajectory 1) and a 4-petal rose. Below is data for trajectory 1 only. No wind. It finished in 80. 250 trials max with 50 patience<text:s/>(patience means it exits if no improvement in that many trials).</text:p>
      <text:p text:style-name="Standard"><text:s/></text:p>
      <text:p text:style-name="P784"><text:span text:style-name="T785"><text:s text:c="8"/></text:span><text:span text:style-name="T786">'traj1_period'</text:span><text:span text:style-name="T787">:<text:s/></text:span><text:span text:style-name="T788">30.0</text:span><text:span text:style-name="T789">,</text:span></text:p>
      <text:p text:style-name="P790"><text:span text:style-name="T791"><text:s text:c="8"/></text:span><text:span text:style-name="T792">'traj1_alpha_warp'</text:span><text:span text:style-name="T793">:<text:s/></text:span><text:span text:style-name="T794">0.5</text:span><text:span text:style-name="T795">,</text:span></text:p>
      <text:p text:style-name="P796"><text:span text:style-name="T797"><text:s text:c="8"/></text:span><text:span text:style-name="T798">'traj1_x_amp'</text:span><text:span text:style-name="T799">:<text:s/></text:span><text:span text:style-name="T800">1.5</text:span><text:span text:style-name="T801">,</text:span></text:p>
      <text:p text:style-name="P802"><text:span text:style-name="T803"><text:s text:c="8"/></text:span><text:span text:style-name="T804">'traj1_y_amp'</text:span><text:span text:style-name="T805">:<text:s/></text:span><text:span text:style-name="T806">3.0</text:span><text:span text:style-name="T807">,</text:span></text:p>
      <text:p text:style-name="P808"><text:span text:style-name="T809"><text:s text:c="8"/></text:span><text:span text:style-name="T810">'traj1_center_z'</text:span><text:span text:style-name="T811">:<text:s/></text:span><text:span text:style-name="T812">-</text:span><text:span text:style-name="T813">0.75</text:span><text:span text:style-name="T814">,</text:span></text:p>
      <text:p text:style-name="P815"><text:span text:style-name="T816"><text:s text:c="8"/></text:span><text:span text:style-name="T817">'traj1_z_amp'</text:span><text:span text:style-name="T818">:<text:s/></text:span><text:span text:style-name="T819">0.25</text:span><text:span text:style-name="T820">,</text:span></text:p>
      <text:p text:style-name="Standard"/>
      <text:p text:style-name="P821"><text:span text:style-name="T822"><text:s text:c="8"/></text:span><text:span text:style-name="T823">param_dict</text:span><text:span text:style-name="T824">[</text:span><text:span text:style-name="T825">'k1'</text:span><text:span text:style-name="T826">]<text:s/></text:span><text:span text:style-name="T827">=</text:span><text:span text:style-name="T828"><text:s/></text:span><text:span text:style-name="T829">trial</text:span><text:span text:style-name="T830">.</text:span><text:span text:style-name="T831">suggest_float</text:span><text:span text:style-name="T832">(</text:span><text:span text:style-name="T833">"k1"</text:span><text:span text:style-name="T834">,<text:s/></text:span><text:span text:style-name="T835">0.01</text:span><text:span text:style-name="T836">,<text:s/></text:span><text:span text:style-name="T837">2.0</text:span><text:span text:style-name="T838">,<text:s/></text:span><text:span text:style-name="T839">log</text:span><text:span text:style-name="T840">=</text:span><text:span text:style-name="T841">True</text:span><text:span text:style-name="T842">)</text:span></text:p>
      <text:p text:style-name="P843"><text:span text:style-name="T844"><text:s text:c="8"/></text:span><text:span text:style-name="T845">param_dict</text:span><text:span text:style-name="T846">[</text:span><text:span text:style-name="T847">'k2'</text:span><text:span text:style-name="T848">]<text:s/></text:span><text:span text:style-name="T849">=</text:span><text:span text:style-name="T850"><text:s/></text:span><text:span text:style-name="T851">trial</text:span><text:span text:style-name="T852">.</text:span><text:span text:style-name="T853">suggest_float</text:span><text:span text:style-name="T854">(</text:span><text:span text:style-name="T855">"k2"</text:span><text:span text:style-name="T856">,<text:s/></text:span><text:span text:style-name="T857">0.01</text:span><text:span text:style-name="T858">,<text:s/></text:span><text:span text:style-name="T859">5.0</text:span><text:span text:style-name="T860">,<text:s/></text:span><text:span text:style-name="T861">log</text:span><text:span text:style-name="T862">=</text:span><text:span text:style-name="T863">True</text:span><text:span text:style-name="T864">)</text:span></text:p>
      <text:p text:style-name="P865"><text:span text:style-name="T866"><text:s text:c="8"/></text:span><text:span text:style-name="T867">param_dict</text:span><text:span text:style-name="T868">[</text:span><text:span text:style-name="T869">'k3'</text:span><text:span text:style-name="T870">]<text:s/></text:span><text:span text:style-name="T871">=</text:span><text:span text:style-name="T872"><text:s/></text:span><text:span text:style-name="T873">trial</text:span><text:span text:style-name="T874">.</text:span><text:span text:style-name="T875">suggest_float</text:span><text:span text:style-name="T876">(</text:span><text:span text:style-name="T877">"k3"</text:span><text:span text:style-name="T878">,<text:s/></text:span><text:span text:style-name="T879">param_dict</text:span><text:span text:style-name="T880">[</text:span><text:span text:style-name="T881">'k2'</text:span><text:span text:style-name="T882">],<text:s/></text:span><text:span text:style-name="T883">5.0</text:span><text:span text:style-name="T884">)<text:s/></text:span></text:p>
      <text:p text:style-name="P885"><text:span text:style-name="T886"><text:s text:c="8"/></text:span><text:span text:style-name="T887">param_dict</text:span><text:span text:style-name="T888">[</text:span><text:span text:style-name="T889">'k_rise'</text:span><text:span text:style-name="T890">]<text:s/></text:span><text:span text:style-name="T891">=</text:span><text:span text:style-name="T892"><text:s/></text:span><text:span text:style-name="T893">trial</text:span><text:span text:style-name="T894">.</text:span><text:span text:style-name="T895">suggest_float</text:span><text:span text:style-name="T896">(</text:span><text:span text:style-name="T897">"k_rise"</text:span><text:span text:style-name="T898">,<text:s/></text:span><text:span text:style-name="T899">0.01</text:span><text:span text:style-name="T900">,<text:s/></text:span><text:span text:style-name="T901">2.0</text:span><text:span text:style-name="T902">,<text:s/></text:span><text:span text:style-name="T903">log</text:span><text:span text:style-name="T904">=</text:span><text:span text:style-name="T905">True</text:span><text:span text:style-name="T906">)</text:span></text:p>
      <text:p text:style-name="Standard"/>
      <text:p text:style-name="P907">========================================</text:p>
      <text:p text:style-name="Normal"><text:span text:style-name="T908">🏆</text:span><text:span text:style-name="T909"><text:s/>ABSOLUTE BEST TRIAL<text:s/></text:span><text:span text:style-name="T910">🏆</text:span></text:p>
      <text:p text:style-name="P911">========================================</text:p>
      <text:p text:style-name="P912">Trial Number : 24</text:p>
      <text:p text:style-name="P913">ITAE Cost <text:s text:c="3"/>: 23.5345</text:p>
      <text:p text:style-name="P914">Parameters <text:s text:c="2"/>:</text:p>
      <text:p text:style-name="P915"><text:s text:c="4"/>k1: 1.3073677471294982</text:p>
      <text:p text:style-name="P916"><text:s text:c="4"/>k2: 0.13124007419771933</text:p>
      <text:soft-page-break/>
      <text:p text:style-name="P917"><text:s text:c="4"/>k3: 0.8295798439010058</text:p>
      <text:p text:style-name="P918"><text:s text:c="4"/>k_rise: 0.028674499805437688</text:p>
      <text:p text:style-name="P919"/>
      <text:p text:style-name="P920">=================================================================</text:p>
      <text:p text:style-name="P921">Rank <text:s text:c="2"/>| Trial <text:s text:c="2"/>| Cost <text:s text:c="5"/>| k1 <text:s text:c="5"/>| k2 <text:s text:c="5"/>| k3 <text:s text:c="5"/>| k_rise <text:s text:c="2"/></text:p>
      <text:p text:style-name="P922">-----------------------------------------------------------------</text:p>
      <text:p text:style-name="P923">1 <text:s text:c="5"/>| 24 <text:s text:c="5"/>| 23.5 <text:s text:c="5"/>| 1.31 <text:s text:c="3"/>| 0.131 <text:s text:c="2"/>| 0.83 <text:s text:c="3"/>| 0.0287 <text:s text:c="2"/></text:p>
      <text:p text:style-name="P924">2 <text:s text:c="5"/>| 26 <text:s text:c="5"/>| 24.4 <text:s text:c="5"/>| 1.46 <text:s text:c="3"/>| 0.09 <text:s text:c="3"/>| 0.625 <text:s text:c="2"/>| 0.0103 <text:s text:c="2"/></text:p>
      <text:p text:style-name="P925">3 <text:s text:c="5"/>| 70 <text:s text:c="5"/>| 24.7 <text:s text:c="5"/>| 1.06 <text:s text:c="3"/>| 0.365 <text:s text:c="2"/>| 0.659 <text:s text:c="2"/>| 0.0101 <text:s text:c="2"/></text:p>
      <text:p text:style-name="P926">4 <text:s text:c="5"/>| 25 <text:s text:c="5"/>| 24.7 <text:s text:c="5"/>| 1.47 <text:s text:c="3"/>| 0.104 <text:s text:c="2"/>| 0.554 <text:s text:c="2"/>| 0.0108 <text:s text:c="2"/></text:p>
      <text:p text:style-name="P927">5 <text:s text:c="5"/>| 27 <text:s text:c="5"/>| 26.6 <text:s text:c="5"/>| 1.67 <text:s text:c="3"/>| 0.111 <text:s text:c="2"/>| 0.417 <text:s text:c="2"/>| 0.0109 <text:s text:c="2"/></text:p>
      <text:p text:style-name="P928">6 <text:s text:c="5"/>| 23 <text:s text:c="5"/>| 29.5 <text:s text:c="5"/>| 1.03 <text:s text:c="3"/>| 0.1 <text:s text:c="4"/>| 0.63 <text:s text:c="3"/>| 0.0299 <text:s text:c="2"/></text:p>
      <text:p text:style-name="P929">7 <text:s text:c="5"/>| 31 <text:s text:c="5"/>| 30.3 <text:s text:c="5"/>| 1.38 <text:s text:c="3"/>| 0.121 <text:s text:c="2"/>| 0.466 <text:s text:c="2"/>| 0.0145 <text:s text:c="2"/></text:p>
      <text:p text:style-name="P930">8 <text:s text:c="5"/>| 77 <text:s text:c="5"/>| 31.4 <text:s text:c="5"/>| 1.45 <text:s text:c="3"/>| 0.246 <text:s text:c="2"/>| 0.757 <text:s text:c="2"/>| 0.0451 <text:s text:c="2"/></text:p>
      <text:p text:style-name="P931">9 <text:s text:c="5"/>| 80 <text:s text:c="5"/>| 31.9 <text:s text:c="5"/>| 1.52 <text:s text:c="3"/>| 0.16 <text:s text:c="3"/>| 0.782 <text:s text:c="2"/>| 0.0473 <text:s text:c="2"/></text:p>
      <text:p text:style-name="P932">10 <text:s text:c="4"/>| 0 <text:s text:c="6"/>| 32.2 <text:s text:c="5"/>| 0.305 <text:s text:c="2"/>| 0.332 <text:s text:c="2"/>| 2.66 <text:s text:c="3"/>| 0.425 <text:s text:c="3"/></text:p>
      <text:p text:style-name="P933">11 <text:s text:c="4"/>| 60 <text:s text:c="5"/>| 32.3 <text:s text:c="5"/>| 1.61 <text:s text:c="3"/>| 0.375 <text:s text:c="2"/>| 1.01 <text:s text:c="3"/>| 0.068 <text:s text:c="3"/></text:p>
      <text:p text:style-name="P934">12 <text:s text:c="4"/>| 33 <text:s text:c="5"/>| 32.4 <text:s text:c="5"/>| 1.98 <text:s text:c="3"/>| 0.316 <text:s text:c="2"/>| 0.764 <text:s text:c="2"/>| 0.0216 <text:s text:c="2"/></text:p>
      <text:p text:style-name="P935">13 <text:s text:c="4"/>| 78 <text:s text:c="5"/>| 32.6 <text:s text:c="5"/>| 1.38 <text:s text:c="3"/>| 0.097 <text:s text:c="2"/>| 1.25 <text:s text:c="3"/>| 0.024 <text:s text:c="3"/></text:p>
      <text:p text:style-name="P936">14 <text:s text:c="4"/>| 28 <text:s text:c="5"/>| 32.7 <text:s text:c="5"/>| 1.42 <text:s text:c="3"/>| 0.0849 <text:s/>| 1.05 <text:s text:c="3"/>| 0.0175 <text:s text:c="2"/></text:p>
      <text:p text:style-name="P937">15 <text:s text:c="4"/>| 72 <text:s text:c="5"/>| 32.8 <text:s text:c="5"/>| 0.802 <text:s text:c="2"/>| 0.718 <text:s text:c="2"/>| 0.962 <text:s text:c="2"/>| 0.01 <text:s text:c="4"/></text:p>
      <text:p text:style-name="Standard"><text:span text:style-name="T938">=================================================================</text:span></text:p>
      <text:p text:style-name="Standard"/>
      <text:p text:style-name="Standard">COMMENT: There seems to be a tradeoff between K_I (which is dominated by k_1) and \beta.</text:p>
      <text:p text:style-name="Standard"/>
      <text:p text:style-name="Standard">COMMENT: Running the best gains with wind makes the cost go from 22.9 to 90.1. For the #10 gains, it went from 32.95 and 48.5. This suggests more K_RISE is more robust.</text:p>
      <text:p text:style-name="Standard"/>
      <text:p text:style-name="Standard">PHASE 2 (TAKE 3)</text:p>
      <text:p text:style-name="Standard"/>
      <text:p text:style-name="Standard">I propose we do this for 500 trials with 200 trials of patience next for each controller. Should we or should we not?</text:p>
      <text:p text:style-name="Standard"/>
      <text:p text:style-name="Standard"><text:span text:style-name="T939">initial_weight_scale_factor</text:span><text:span text:style-name="T940"><text:s/></text:span><text:span text:style-name="T941">=</text:span><text:span text:style-name="T942"><text:s text:c="2"/></text:span><text:span text:style-name="T943">trial</text:span><text:span text:style-name="T944">.</text:span><text:span text:style-name="T945">suggest_categorical</text:span><text:span text:style-name="T946">(</text:span><text:span text:style-name="T947">"</text:span><text:span text:style-name="T948">initial_weight_scale_factor</text:span><text:span text:style-name="T949">"</text:span><text:span text:style-name="T950">, [</text:span><text:span text:style-name="T951">0.2, 1</text:span><text:span text:style-name="T952">])</text:span></text:p>
      <text:p text:style-name="P953"/>
      <text:p text:style-name="P954"><text:span text:style-name="T955">param_dict</text:span><text:span text:style-name="T956">[</text:span><text:span text:style-name="T957">'num_blocks'</text:span><text:span text:style-name="T958">]<text:s/></text:span><text:span text:style-name="T959">=</text:span><text:span text:style-name="T960"><text:s/></text:span><text:span text:style-name="T961">trial</text:span><text:span text:style-name="T962">.</text:span><text:span text:style-name="T963">suggest_categorical</text:span><text:span text:style-name="T964">(</text:span><text:span text:style-name="T965">"num_blocks"</text:span><text:span text:style-name="T966">, [</text:span><text:span text:style-name="T967">1, 2, 4</text:span><text:span text:style-name="T968">])</text:span></text:p>
      <text:p text:style-name="P969"><text:span text:style-name="T970">param_dict</text:span><text:span text:style-name="T971">[</text:span><text:span text:style-name="T972">'k_0'</text:span><text:span text:style-name="T973">]<text:s/></text:span><text:span text:style-name="T974">=<text:s/></text:span><text:span text:style-name="T975">trial</text:span><text:span text:style-name="T976">.</text:span><text:span text:style-name="T977">suggest_categorical</text:span><text:span text:style-name="T978">(</text:span><text:span text:style-name="T979">"k_0"</text:span><text:span text:style-name="T980">, [</text:span><text:span text:style-name="T981">1, 2, 4</text:span><text:span text:style-name="T982">])</text:span></text:p>
      <text:p text:style-name="P983"><text:span text:style-name="T984">param_dict</text:span><text:span text:style-name="T985">[</text:span><text:span text:style-name="T986">'k_i'</text:span><text:span text:style-name="T987">]<text:s/></text:span><text:span text:style-name="T988">=<text:s/></text:span><text:span text:style-name="T989">trial</text:span><text:span text:style-name="T990">.</text:span><text:span text:style-name="T991">suggest_categorical</text:span><text:span text:style-name="T992">(</text:span><text:span text:style-name="T993">"k_i"</text:span><text:span text:style-name="T994">, [</text:span><text:span text:style-name="T995">1, 2, 4</text:span><text:span text:style-name="T996">])</text:span></text:p>
      <text:p text:style-name="P997"/>
      <text:p text:style-name="P998"><text:span text:style-name="T999">param_dict</text:span><text:span text:style-name="T1000">[</text:span><text:span text:style-name="T1001">'hidden_width'</text:span><text:span text:style-name="T1002">]<text:s/></text:span><text:span text:style-name="T1003">=</text:span><text:span text:style-name="T1004"><text:s/></text:span><text:span text:style-name="T1005">trial</text:span><text:span text:style-name="T1006">.</text:span><text:span text:style-name="T1007">suggest_categorical</text:span><text:span text:style-name="T1008">(</text:span><text:span text:style-name="T1009">"hidden_width"</text:span><text:span text:style-name="T1010">, [4, 8</text:span><text:span text:style-name="T1011">, 16</text:span><text:span text:style-name="T1012">])</text:span></text:p>
      <text:p text:style-name="P1013"><text:span text:style-name="T1014">param_dict</text:span><text:span text:style-name="T1015">[</text:span><text:span text:style-name="T1016">'gamma'</text:span><text:span text:style-name="T1017">]<text:s/></text:span><text:span text:style-name="T1018">=</text:span><text:span text:style-name="T1019"><text:s/></text:span><text:span text:style-name="T1020">float</text:span><text:span text:style-name="T1021">(</text:span><text:span text:style-name="T1022">trial</text:span><text:span text:style-name="T1023">.</text:span><text:span text:style-name="T1024">suggest_float</text:span><text:span text:style-name="T1025">(</text:span><text:span text:style-name="T1026">"gamma"</text:span><text:span text:style-name="T1027">,<text:s/></text:span><text:span text:style-name="T1028">0.1</text:span><text:span text:style-name="T1029">, 10</text:span><text:span text:style-name="T1030">.0</text:span><text:span text:style-name="T1031">,<text:s/></text:span><text:span text:style-name="T1032">log</text:span><text:span text:style-name="T1033">=</text:span><text:span text:style-name="T1034">True</text:span><text:span text:style-name="T1035">))</text:span></text:p>
      <text:p text:style-name="P1036"><text:span text:style-name="T1037">param_dict</text:span><text:span text:style-name="T1038">[</text:span><text:span text:style-name="T1039">'sigma_mod'</text:span><text:span text:style-name="T1040">]<text:s/></text:span><text:span text:style-name="T1041">=</text:span><text:span text:style-name="T1042"><text:s/></text:span><text:span text:style-name="T1043">float</text:span><text:span text:style-name="T1044">(</text:span><text:span text:style-name="T1045">trial</text:span><text:span text:style-name="T1046">.</text:span><text:span text:style-name="T1047">suggest_float</text:span><text:span text:style-name="T1048">(</text:span><text:span text:style-name="T1049">"sigma_mod"</text:span><text:span text:style-name="T1050">,<text:s/></text:span><text:span text:style-name="T1051">0.5</text:span><text:span text:style-name="T1052">,<text:s/></text:span><text:span text:style-name="T1053">5.0</text:span><text:span text:style-name="T1054">,<text:s/></text:span><text:span text:style-name="T1055">log</text:span><text:span text:style-name="T1056">=</text:span><text:span text:style-name="T1057">True</text:span><text:span text:style-name="T1058">))</text:span></text:p>
      <text:p text:style-name="Standard"/>
      <text:p text:style-name="Standard"/>
      <text:p text:style-name="Standard">max@Maxs-MacBook-Pro voxl-px4-sitl % python3 get_best_results.py baseline</text:p>
      <text:p text:style-name="Standard">[*] Loading baseline study 'phase2_baseline_wind_optimization' from sqlite:///phase2_baseline_wind.db...</text:p>
      <text:p text:style-name="Standard"/>
      <text:soft-page-break/>
      <text:p text:style-name="Standard">========================================</text:p>
      <text:p text:style-name="Standard"><text:span text:style-name="T1059">🏆</text:span><text:s/>ABSOLUTE BEST TRIAL<text:s/><text:span text:style-name="T1060">🏆</text:span></text:p>
      <text:p text:style-name="Standard">========================================</text:p>
      <text:p text:style-name="Standard">Trial Number : 208</text:p>
      <text:p text:style-name="Standard">ITAE Cost <text:s text:c="3"/>: 47.5804</text:p>
      <text:p text:style-name="Standard">Parameters <text:s text:c="2"/>:</text:p>
      <text:p text:style-name="Standard"><text:s text:c="4"/>initial_weight_scale_factor: 0.2</text:p>
      <text:p text:style-name="Standard"><text:s text:c="4"/>num_blocks: 4</text:p>
      <text:p text:style-name="Standard"><text:s text:c="4"/>k_0: 2</text:p>
      <text:p text:style-name="Standard"><text:s text:c="4"/>k_i: 4</text:p>
      <text:p text:style-name="Standard"><text:s text:c="4"/>hidden_width: 8</text:p>
      <text:p text:style-name="Standard"><text:s text:c="4"/>gamma: 6.7362992973814935</text:p>
      <text:p text:style-name="Standard"><text:s text:c="4"/>sigma_mod: 1.0312702653999692</text:p>
      <text:p text:style-name="Standard"/>
      <text:p text:style-name="Standard"/>
      <text:p text:style-name="Standard">BASELINE</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08 <text:s text:c="4"/>| 47.6 <text:s text:c="5"/>| 4 <text:s text:c="9"/>| 8 <text:s text:c="11"/>| 2 <text:s text:c="5"/>| 4 <text:s text:c="5"/>| 6.74 <text:s text:c="3"/>| 1.03 <text:s text:c="5"/>| 0.2 <text:s text:c="2"/></text:p>
      <text:p text:style-name="Standard">2 <text:s text:c="5"/>| 213 <text:s text:c="4"/>| 47.9 <text:s text:c="5"/>| 4 <text:s text:c="9"/>| 8 <text:s text:c="11"/>| 2 <text:s text:c="5"/>| 4 <text:s text:c="5"/>| 8.85 <text:s text:c="3"/>| 0.995 <text:s text:c="4"/>| 0.2 <text:s text:c="2"/></text:p>
      <text:p text:style-name="Standard">3 <text:s text:c="5"/>| 373 <text:s text:c="4"/>| 47.9 <text:s text:c="5"/>| 4 <text:s text:c="9"/>| 8 <text:s text:c="11"/>| 2 <text:s text:c="5"/>| 4 <text:s text:c="5"/>| 6.66 <text:s text:c="3"/>| 1.07 <text:s text:c="5"/>| 0.2 <text:s text:c="2"/></text:p>
      <text:p text:style-name="Standard">4 <text:s text:c="5"/>| 246 <text:s text:c="4"/>| 48.1 <text:s text:c="5"/>| 4 <text:s text:c="9"/>| 8 <text:s text:c="11"/>| 2 <text:s text:c="5"/>| 4 <text:s text:c="5"/>| 6.86 <text:s text:c="3"/>| 1.14 <text:s text:c="5"/>| 0.2 <text:s text:c="2"/></text:p>
      <text:p text:style-name="Standard">5 <text:s text:c="5"/>| 365 <text:s text:c="4"/>| 48.1 <text:s text:c="5"/>| 4 <text:s text:c="9"/>| 8 <text:s text:c="11"/>| 2 <text:s text:c="5"/>| 4 <text:s text:c="5"/>| 5.27 <text:s text:c="3"/>| 1.05 <text:s text:c="5"/>| 0.2 <text:s text:c="2"/></text:p>
      <text:p text:style-name="Standard">6 <text:s text:c="5"/>| 293 <text:s text:c="4"/>| 48.1 <text:s text:c="5"/>| 4 <text:s text:c="9"/>| 8 <text:s text:c="11"/>| 2 <text:s text:c="5"/>| 4 <text:s text:c="5"/>| 8.02 <text:s text:c="3"/>| 1.13 <text:s text:c="5"/>| 0.2 <text:s text:c="2"/></text:p>
      <text:p text:style-name="Standard">7 <text:s text:c="5"/>| 250 <text:s text:c="4"/>| 48.1 <text:s text:c="5"/>| 4 <text:s text:c="9"/>| 8 <text:s text:c="11"/>| 2 <text:s text:c="5"/>| 4 <text:s text:c="5"/>| 7.54 <text:s text:c="3"/>| 1.06 <text:s text:c="5"/>| 0.2 <text:s text:c="2"/></text:p>
      <text:p text:style-name="Standard">8 <text:s text:c="5"/>| 189 <text:s text:c="4"/>| 48.2 <text:s text:c="5"/>| 4 <text:s text:c="9"/>| 8 <text:s text:c="11"/>| 2 <text:s text:c="5"/>| 4 <text:s text:c="5"/>| 4.6 <text:s text:c="4"/>| 1.08 <text:s text:c="5"/>| 0.2 <text:s text:c="2"/></text:p>
      <text:p text:style-name="Standard">9 <text:s text:c="5"/>| 323 <text:s text:c="4"/>| 48.2 <text:s text:c="5"/>| 4 <text:s text:c="9"/>| 8 <text:s text:c="11"/>| 2 <text:s text:c="5"/>| 4 <text:s text:c="5"/>| 8.08 <text:s text:c="3"/>| 1.03 <text:s text:c="5"/>| 0.2 <text:s text:c="2"/></text:p>
      <text:p text:style-name="Standard">10 <text:s text:c="4"/>| 385 <text:s text:c="4"/>| 48.2 <text:s text:c="5"/>| 4 <text:s text:c="9"/>| 8 <text:s text:c="11"/>| 2 <text:s text:c="5"/>| 4 <text:s text:c="5"/>| 7.4 <text:s text:c="4"/>| 1.01 <text:s text:c="5"/>| 0.2 <text:s text:c="2"/></text:p>
      <text:p text:style-name="Standard">11 <text:s text:c="4"/>| 396 <text:s text:c="4"/>| 48.2 <text:s text:c="5"/>| 4 <text:s text:c="9"/>| 8 <text:s text:c="11"/>| 2 <text:s text:c="5"/>| 4 <text:s text:c="5"/>| 6.43 <text:s text:c="3"/>| 1.04 <text:s text:c="5"/>| 0.2 <text:s text:c="2"/></text:p>
      <text:p text:style-name="Standard">12 <text:s text:c="4"/>| 245 <text:s text:c="4"/>| 48.3 <text:s text:c="5"/>| 4 <text:s text:c="9"/>| 8 <text:s text:c="11"/>| 2 <text:s text:c="5"/>| 4 <text:s text:c="5"/>| 7.45 <text:s text:c="3"/>| 1.04 <text:s text:c="5"/>| 0.2 <text:s text:c="2"/></text:p>
      <text:p text:style-name="Standard">13 <text:s text:c="4"/>| 188 <text:s text:c="4"/>| 48.3 <text:s text:c="5"/>| 4 <text:s text:c="9"/>| 8 <text:s text:c="11"/>| 2 <text:s text:c="5"/>| 4 <text:s text:c="5"/>| 4.36 <text:s text:c="3"/>| 1.1 <text:s text:c="6"/>| 0.2 <text:s text:c="2"/></text:p>
      <text:p text:style-name="Standard">14 <text:s text:c="4"/>| 366 <text:s text:c="4"/>| 48.3 <text:s text:c="5"/>| 4 <text:s text:c="9"/>| 8 <text:s text:c="11"/>| 2 <text:s text:c="5"/>| 4 <text:s text:c="5"/>| 7.41 <text:s text:c="3"/>| 1.05 <text:s text:c="5"/>| 0.2 <text:s text:c="2"/></text:p>
      <text:p text:style-name="Standard">15 <text:s text:c="4"/>| 219 <text:s text:c="4"/>| 48.4 <text:s text:c="5"/>| 4 <text:s text:c="9"/>| 8 <text:s text:c="11"/>| 2 <text:s text:c="5"/>| 4 <text:s text:c="5"/>| 6.99 <text:s text:c="3"/>| 1.04 <text:s text:c="5"/>| 0.2 <text:s text:c="2"/></text:p>
      <text:p text:style-name="Standard">=========================================================================================================</text:p>
      <text:p text:style-name="Standard"/>
      <text:p text:style-name="Standard">max@Maxs-MacBook-Pro voxl-px4-sitl % python3 get_best_results.py developed</text:p>
      <text:p text:style-name="Standard">[*] Loading developed study 'phase2_developed_wind_optimization' from sqlite:///phase2_developed_wind.db...</text:p>
      <text:p text:style-name="Standard"/>
      <text:p text:style-name="Standard">========================================</text:p>
      <text:p text:style-name="Standard"><text:span text:style-name="T1061">🏆</text:span><text:s/>ABSOLUTE BEST TRIAL<text:s/><text:span text:style-name="T1062">🏆</text:span></text:p>
      <text:p text:style-name="Standard">========================================</text:p>
      <text:p text:style-name="Standard">Trial Number : 154</text:p>
      <text:p text:style-name="Standard">ITAE Cost <text:s text:c="3"/>: 48.7975</text:p>
      <text:p text:style-name="Standard">Parameters <text:s text:c="2"/>:</text:p>
      <text:soft-page-break/>
      <text:p text:style-name="Standard"><text:s text:c="4"/>initial_weight_scale_factor: 0.2</text:p>
      <text:p text:style-name="Standard"><text:s text:c="4"/>num_blocks: 4</text:p>
      <text:p text:style-name="Standard"><text:s text:c="4"/>k_0: 4</text:p>
      <text:p text:style-name="Standard"><text:s text:c="4"/>k_i: 4</text:p>
      <text:p text:style-name="Standard"><text:s text:c="4"/>hidden_width: 8</text:p>
      <text:p text:style-name="Standard"><text:s text:c="4"/>gamma: 6.670745862501159</text:p>
      <text:p text:style-name="Standard"><text:s text:c="4"/>sigma_mod: 2.1893280520971734</text:p>
      <text:p text:style-name="Standard"/>
      <text:p text:style-name="Standard">DEVELOPED</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54 <text:s text:c="4"/>| 48.8 <text:s text:c="5"/>| 4 <text:s text:c="9"/>| 8 <text:s text:c="11"/>| 4 <text:s text:c="5"/>| 4 <text:s text:c="5"/>| 6.67 <text:s text:c="3"/>| 2.19 <text:s text:c="5"/>| 0.2 <text:s text:c="2"/></text:p>
      <text:p text:style-name="Standard">2 <text:s text:c="5"/>| 246 <text:s text:c="4"/>| 48.8 <text:s text:c="5"/>| 4 <text:s text:c="9"/>| 8 <text:s text:c="11"/>| 4 <text:s text:c="5"/>| 4 <text:s text:c="5"/>| 9.16 <text:s text:c="3"/>| 2.28 <text:s text:c="5"/>| 0.2 <text:s text:c="2"/></text:p>
      <text:p text:style-name="Standard">3 <text:s text:c="5"/>| 272 <text:s text:c="4"/>| 49 <text:s text:c="7"/>| 4 <text:s text:c="9"/>| 4 <text:s text:c="11"/>| 4 <text:s text:c="5"/>| 4 <text:s text:c="5"/>| 9.31 <text:s text:c="3"/>| 2.01 <text:s text:c="5"/>| 0.2 <text:s text:c="2"/></text:p>
      <text:p text:style-name="Standard">4 <text:s text:c="5"/>| 269 <text:s text:c="4"/>| 49 <text:s text:c="7"/>| 4 <text:s text:c="9"/>| 4 <text:s text:c="11"/>| 4 <text:s text:c="5"/>| 4 <text:s text:c="5"/>| 9.27 <text:s text:c="3"/>| 1.95 <text:s text:c="5"/>| 0.2 <text:s text:c="2"/></text:p>
      <text:p text:style-name="Standard">5 <text:s text:c="5"/>| 203 <text:s text:c="4"/>| 49.2 <text:s text:c="5"/>| 4 <text:s text:c="9"/>| 8 <text:s text:c="11"/>| 4 <text:s text:c="5"/>| 4 <text:s text:c="5"/>| 8.76 <text:s text:c="3"/>| 1.98 <text:s text:c="5"/>| 0.2 <text:s text:c="2"/></text:p>
      <text:p text:style-name="Standard">6 <text:s text:c="5"/>| 277 <text:s text:c="4"/>| 49.3 <text:s text:c="5"/>| 4 <text:s text:c="9"/>| 4 <text:s text:c="11"/>| 4 <text:s text:c="5"/>| 4 <text:s text:c="5"/>| 9.38 <text:s text:c="3"/>| 2.1 <text:s text:c="6"/>| 0.2 <text:s text:c="2"/></text:p>
      <text:p text:style-name="Standard">7 <text:s text:c="5"/>| 337 <text:s text:c="4"/>| 49.8 <text:s text:c="5"/>| 4 <text:s text:c="9"/>| 4 <text:s text:c="11"/>| 4 <text:s text:c="5"/>| 4 <text:s text:c="5"/>| 7.07 <text:s text:c="3"/>| 2.32 <text:s text:c="5"/>| 0.2 <text:s text:c="2"/></text:p>
      <text:p text:style-name="Standard">8 <text:s text:c="5"/>| 167 <text:s text:c="4"/>| 49.9 <text:s text:c="5"/>| 4 <text:s text:c="9"/>| 8 <text:s text:c="11"/>| 4 <text:s text:c="5"/>| 4 <text:s text:c="5"/>| 8.26 <text:s text:c="3"/>| 2.13 <text:s text:c="5"/>| 0.2 <text:s text:c="2"/></text:p>
      <text:p text:style-name="Standard">9 <text:s text:c="5"/>| 322 <text:s text:c="4"/>| 50.1 <text:s text:c="5"/>| 4 <text:s text:c="9"/>| 4 <text:s text:c="11"/>| 4 <text:s text:c="5"/>| 4 <text:s text:c="5"/>| 8.67 <text:s text:c="3"/>| 2.03 <text:s text:c="5"/>| 0.2 <text:s text:c="2"/></text:p>
      <text:p text:style-name="Standard">10 <text:s text:c="4"/>| 82 <text:s text:c="5"/>| 50.2 <text:s text:c="5"/>| 4 <text:s text:c="9"/>| 8 <text:s text:c="11"/>| 4 <text:s text:c="5"/>| 4 <text:s text:c="5"/>| 9.13 <text:s text:c="3"/>| 2.42 <text:s text:c="5"/>| 0.2 <text:s text:c="2"/></text:p>
      <text:p text:style-name="Standard">11 <text:s text:c="4"/>| 200 <text:s text:c="4"/>| 50.3 <text:s text:c="5"/>| 4 <text:s text:c="9"/>| 8 <text:s text:c="11"/>| 4 <text:s text:c="5"/>| 4 <text:s text:c="5"/>| 8.54 <text:s text:c="3"/>| 2.12 <text:s text:c="5"/>| 0.2 <text:s text:c="2"/></text:p>
      <text:p text:style-name="Standard">12 <text:s text:c="4"/>| 184 <text:s text:c="4"/>| 50.3 <text:s text:c="5"/>| 4 <text:s text:c="9"/>| 8 <text:s text:c="11"/>| 4 <text:s text:c="5"/>| 4 <text:s text:c="5"/>| 8.88 <text:s text:c="3"/>| 2.25 <text:s text:c="5"/>| 0.2 <text:s text:c="2"/></text:p>
      <text:p text:style-name="Standard">13 <text:s text:c="4"/>| 323 <text:s text:c="4"/>| 50.5 <text:s text:c="5"/>| 4 <text:s text:c="9"/>| 4 <text:s text:c="11"/>| 4 <text:s text:c="5"/>| 4 <text:s text:c="5"/>| 8.66 <text:s text:c="3"/>| 2.32 <text:s text:c="5"/>| 0.2 <text:s text:c="2"/></text:p>
      <text:p text:style-name="Standard">14 <text:s text:c="4"/>| 202 <text:s text:c="4"/>| 50.5 <text:s text:c="5"/>| 4 <text:s text:c="9"/>| 8 <text:s text:c="11"/>| 4 <text:s text:c="5"/>| 4 <text:s text:c="5"/>| 9.02 <text:s text:c="3"/>| 1.99 <text:s text:c="5"/>| 0.2 <text:s text:c="2"/></text:p>
      <text:p text:style-name="Standard">15 <text:s text:c="4"/>| 326 <text:s text:c="4"/>| 50.5 <text:s text:c="5"/>| 4 <text:s text:c="9"/>| 4 <text:s text:c="11"/>| 4 <text:s text:c="5"/>| 4 <text:s text:c="5"/>| 8.95 <text:s text:c="3"/>| 2.46 <text:s text:c="5"/>| 0.2 <text:s text:c="2"/></text:p>
      <text:p text:style-name="Standa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Droid Sans Mono" svg:font-family="Droid Sans Mono" style:font-family-generic="system" svg:panose-1="2 11 6 4 2 2 2 2 2 4"/>
    <style:font-face style:name="Menlo" svg:font-family="Menlo" style:font-family-generic="modern" style:font-pitch="fixed" svg:panose-1="2 11 6 9 3 8 4 2 2 4"/>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x Gardenswartz</dc:creator>
    <meta:creation-date>2026-06-15T08:58:00Z</meta:creation-date>
    <dc:date>2026-06-29T04:36:00Z</dc:date>
    <meta:template xlink:href="Normal.dotm" xlink:type="simple"/>
    <meta:editing-cycles>51</meta:editing-cycles>
    <meta:editing-duration>PT184680S</meta:editing-duration>
    <meta:document-statistic meta:page-count="10" meta:paragraph-count="46" meta:word-count="3487" meta:character-count="23317" meta:row-count="165" meta:non-whitespace-character-count="19876"/>
  </office:meta>
</office:document-meta>
</file>