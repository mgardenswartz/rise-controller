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bbbebf" loext:opacity="100%" style:font-name="Droid Sans Mono" fo:font-size="10.5pt" fo:font-weight="normal" fo:background-color="#121314"/>
    </style:style>
    <style:style style:name="P2" style:family="paragraph" style:parent-style-name="Text_20_body">
      <style:text-properties fo:color="#bbbebf" loext:opacity="100%" style:font-name="Droid Sans Mono" fo:font-size="10.5pt" fo:font-weight="normal" officeooo:rsid="00081a4e" fo:background-color="#121314"/>
    </style:style>
    <style:style style:name="P3" style:family="paragraph" style:parent-style-name="Standard">
      <style:text-properties officeooo:paragraph-rsid="00081a4e"/>
    </style:style>
    <style:style style:name="P4" style:family="paragraph" style:parent-style-name="Text_20_body">
      <style:text-properties officeooo:paragraph-rsid="00081a4e"/>
    </style:style>
    <style:style style:name="P5" style:family="paragraph" style:parent-style-name="Text_20_body">
      <style:text-properties officeooo:rsid="00081a4e" officeooo:paragraph-rsid="00081a4e"/>
    </style:style>
    <style:style style:name="P6" style:family="paragraph" style:parent-style-name="Standard">
      <style:text-properties officeooo:rsid="00081a4e" officeooo:paragraph-rsid="00081a4e"/>
    </style:style>
    <style:style style:name="P7" style:family="paragraph" style:parent-style-name="Standard">
      <style:text-properties officeooo:rsid="00083310" officeooo:paragraph-rsid="00083310"/>
    </style:style>
    <style:style style:name="P8" style:family="paragraph" style:parent-style-name="Standard">
      <style:text-properties officeooo:rsid="000b4291" officeooo:paragraph-rsid="000b4291"/>
    </style:style>
    <style:style style:name="P9" style:family="paragraph" style:parent-style-name="Standard">
      <style:paragraph-properties style:line-height-at-least="0.198in"/>
      <style:text-properties fo:color="#bbbebf" loext:opacity="100%" style:font-name="Droid Sans Mono" fo:font-size="10.5pt" fo:font-weight="normal" fo:background-color="#121314"/>
    </style:style>
    <style:style style:name="P10" style:family="paragraph" style:parent-style-name="Standard">
      <style:text-properties fo:color="#bbbebf" loext:opacity="100%" style:font-name="Droid Sans Mono" fo:font-size="10.5pt" fo:font-weight="normal" officeooo:rsid="000b4291" officeooo:paragraph-rsid="000b4291" fo:background-color="#121314"/>
    </style:style>
    <style:style style:name="P11" style:family="paragraph" style:parent-style-name="Standard">
      <style:text-properties officeooo:rsid="000bde0e" officeooo:paragraph-rsid="000bde0e"/>
    </style:style>
    <style:style style:name="P12" style:family="paragraph" style:parent-style-name="Standard">
      <style:text-properties officeooo:rsid="000c7b4a" officeooo:paragraph-rsid="000c7b4a"/>
    </style:style>
    <style:style style:name="P13" style:family="paragraph" style:parent-style-name="Standard">
      <style:paragraph-properties fo:break-before="page"/>
      <style:text-properties officeooo:rsid="000c7b4a" officeooo:paragraph-rsid="000c7b4a"/>
    </style:style>
    <style:style style:name="T1" style:family="text">
      <style:text-properties fo:color="#c9d1d9" loext:opacity="100%"/>
    </style:style>
    <style:style style:name="T2" style:family="text">
      <style:text-properties fo:color="#bbbebf" loext:opacity="100%" style:font-name="Droid Sans Mono" fo:font-size="10.5pt" fo:font-weight="normal" fo:background-color="#121314" loext:char-shading-value="0"/>
    </style:style>
    <style:style style:name="T3" style:family="text">
      <style:text-properties fo:color="#a5d6ff" loext:opacity="100%"/>
    </style:style>
    <style:style style:name="T4" style:family="text">
      <style:text-properties fo:color="#d4d4d4" loext:opacity="100%"/>
    </style:style>
    <style:style style:name="T5" style:family="text">
      <style:text-properties fo:color="#d4d4d4" loext:opacity="100%" style:font-name="Droid Sans Mono" fo:font-size="10.5pt" fo:font-weight="normal" fo:background-color="#121314" loext:char-shading-value="0"/>
    </style:style>
    <style:style style:name="T6" style:family="text">
      <style:text-properties fo:color="#ffa657" loext:opacity="100%"/>
    </style:style>
    <style:style style:name="T7" style:family="text">
      <style:text-properties fo:color="#d2a8ff" loext:opacity="100%"/>
    </style:style>
    <style:style style:name="T8" style:family="text">
      <style:text-properties fo:color="#b5cea8" loext:opacity="100%"/>
    </style:style>
    <style:style style:name="T9" style:family="text">
      <style:text-properties fo:color="#b5cea8" loext:opacity="100%" style:font-name="Droid Sans Mono" fo:font-size="10.5pt" fo:font-weight="normal" fo:background-color="#121314" loext:char-shading-value="0"/>
    </style:style>
    <style:style style:name="T10" style:family="text">
      <style:text-properties fo:color="#569cd6" loext:opacity="100%"/>
    </style:style>
    <style:style style:name="T11" style:family="text">
      <style:text-properties officeooo:rsid="00081a4e"/>
    </style:style>
    <style:style style:name="T12" style:family="text">
      <style:text-properties fo:color="#79c0ff" loext:opacity="100%"/>
    </style:style>
    <style:style style:name="T13" style:family="text">
      <style:text-properties fo:color="#79c0ff" loext:opacity="100%" style:font-name="Droid Sans Mono" fo:font-size="10.5pt" fo:font-weight="normal" fo:background-color="#121314" loext:char-shading-value="0"/>
    </style:style>
    <style:style style:name="T14" style:family="text">
      <style:text-properties officeooo:rsid="00083310"/>
    </style:style>
    <style:style style:name="T15" style:family="text">
      <style:text-properties officeooo:rsid="000b4291"/>
    </style:style>
    <style:style style:name="T16" style:family="text">
      <style:text-properties fo:color="#4ec9b0" loext:opacity="100%"/>
    </style:style>
    <style:style style:name="T17" style:family="text">
      <style:text-properties officeooo:rsid="000c7b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Returning to the Gazebo wind thing. It's been a few days since I've chatted here so I forgot what we were doing.</text:p>
      <text:p text:style-name="Text_20_body"/>
      <text:p text:style-name="Text_20_body">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 </text:p>
      <text:p text:style-name="Text_20_body"/>
      <text:p text:style-name="Text_20_body">Here's what I have done so far…</text:p>
      <text:p text:style-name="P5">PHASE 1</text:p>
      <text:p text:style-name="Text_20_body">Using seed 42 for jax.rando<text:span text:style-name="T11">m and the cost function</text:span></text:p>
      <text:p text:style-name="P3">J=<text:span text:style-name="T11">\intop_{t_0}{t_f}(q_e*t*|e(t)|^2</text:span>+<text:span text:style-name="T11">r_u|u(t)|^2</text:span>)dt</text:p>
      <text:p text:style-name="P3"/>
      <text:p text:style-name="P6">where t_f=60 and the search ranges were</text:p>
      <text:p text:style-name="P3"/>
      <text:p text:style-name="P1"><text:span text:style-name="T1">param_dict</text:span>[<text:span text:style-name="T3">'k1'</text:span>] <text:span text:style-name="T4">=</text:span> <text:span text:style-name="T6">trial</text:span>.<text:span text:style-name="T7">suggest_float</text:span>(<text:span text:style-name="T3">"k1"</text:span>, <text:span text:style-name="T8">0.1</text:span>, <text:span text:style-name="T8">2.0</text:span>)</text:p>
      <text:p text:style-name="P1"><text:span text:style-name="T1">param_dict</text:span>[<text:span text:style-name="T3">'k2'</text:span>] <text:span text:style-name="T4">=</text:span> <text:span text:style-name="T6">trial</text:span>.<text:span text:style-name="T7">suggest_float</text:span>(<text:span text:style-name="T3">"k2"</text:span>, <text:span text:style-name="T8">0.1</text:span>, <text:span text:style-name="T8">2.0</text:span>)</text:p>
      <text:p text:style-name="P1"><text:span text:style-name="T1">param_dict</text:span>[<text:span text:style-name="T3">'k3'</text:span>] <text:span text:style-name="T4">=</text:span> <text:span text:style-name="T6">trial</text:span>.<text:span text:style-name="T7">suggest_float</text:span>(<text:span text:style-name="T3">"k3"</text:span>, <text:span text:style-name="T8">0.1</text:span>, <text:span text:style-name="T8">2.0</text:span>)</text:p>
      <text:p text:style-name="P1"><text:span text:style-name="T1">param_dict</text:span>[<text:span text:style-name="T3">'k_rise'</text:span>] <text:span text:style-name="T4">=</text:span> <text:span text:style-name="T6">trial</text:span>.<text:span text:style-name="T7">suggest_float</text:span>(<text:span text:style-name="T3">"k_rise"</text:span>, <text:span text:style-name="T8">0.0001</text:span>, <text:span text:style-name="T8">0.01</text:span>, <text:span text:style-name="T6">log</text:span><text:span text:style-name="T4">=</text:span><text:span text:style-name="T10">True</text:span>)</text:p>
      <text:p text:style-name="Text_20_body"/>
      <text:p text:style-name="P4"><text:span text:style-name="T11">The desired trajectory was a figure eight with a period of 30 seconds. Optuna was given</text:span> 100 trials <text:span text:style-name="T11">to find the gains in these ranges that minimize this cost. In each, the initial condition was always</text:span></text:p>
      <text:p text:style-name="P4"><text:span text:style-name="T13">FIXED_X</text:span><text:span text:style-name="T2"> </text:span><text:span text:style-name="T5">=</text:span><text:span text:style-name="T2"> </text:span><text:span text:style-name="T9">0.70</text:span></text:p>
      <text:p text:style-name="P1"><text:span text:style-name="T12">FIXED_Y</text:span> <text:span text:style-name="T4">=</text:span> <text:span text:style-name="T4">-</text:span><text:span text:style-name="T8">2.37</text:span></text:p>
      <text:p text:style-name="P1"><text:span text:style-name="T12">TARGET_Z</text:span> <text:span text:style-name="T4">=</text:span> <text:span text:style-name="T4">-</text:span><text:span text:style-name="T8">3.0</text:span></text:p>
      <text:p text:style-name="P1"/>
      <text:p text:style-name="Standard">where the <text:span text:style-name="T11">z-value is chosen by letting the quad copter first ascend to that altitude (negative z is up) before activating the controller. Th</text:span><text:span text:style-name="T14">e x-y portion of the</text:span><text:span text:style-name="T11"> initial </text:span><text:span text:style-name="T14">condition</text:span><text:span text:style-name="T11"> was randomly selected (once at the beginning, not every flight) from a 5 by 5 meter square centered at the origin. </text:span>If the quadcopter violates <text:span text:style-name="T11">a</text:span> defined spatial safety boundar<text:span text:style-name="T11">y</text:span> at some time t_fail before reaching t_<text:span text:style-name="T11">f</text:span>, the integration stops and a massive scalar penalty is added to whatever cost has accumulated up to that point:</text:p>
      <text:p text:style-name="Standard">J_fail=J(t_fail)+w_fail(t_<text:span text:style-name="T11">f</text:span>−t_fai<text:span text:style-name="T11">l)^2</text:span></text:p>
      <text:p text:style-name="Standard"/>
      <text:p text:style-name="P7">where w_fail = 1000.</text:p>
      <text:p text:style-name="P7"/>
      <text:p text:style-name="P8">PHASE 2</text:p>
      <text:p text:style-name="P12">With the same initial condition and using the initial condition function from my 1.2.0 ResNet library, </text:p>
      <text:p text:style-name="P8"><text:soft-page-break/></text:p>
      <text:p text:style-name="P8">As of June 16, I ran both ResNet controllers with the search spaces:</text:p>
      <text:p text:style-name="P8"/>
      <text:p text:style-name="P10"><text:span text:style-name="T1">param_dict</text:span>[<text:span text:style-name="T3">'gamma'</text:span>] <text:span text:style-name="T4">=</text:span> <text:span text:style-name="T16">float</text:span>(<text:span text:style-name="T6">trial</text:span>.<text:span text:style-name="T7">suggest_float</text:span>(<text:span text:style-name="T3">"gamma"</text:span>, <text:span text:style-name="T8">0.5</text:span>, <text:span text:style-name="T8">50.0</text:span>))</text:p>
      <text:p text:style-name="P1"><text:span text:style-name="T1">param_dict</text:span>[<text:span text:style-name="T3">'sigma_mod'</text:span>] <text:span text:style-name="T4">=</text:span> <text:span text:style-name="T16">float</text:span>(<text:span text:style-name="T6">trial</text:span>.<text:span text:style-name="T7">suggest_float</text:span>(<text:span text:style-name="T3">"sigma_mod"</text:span>, <text:span text:style-name="T8">0.001</text:span>, <text:span text:style-name="T8">1.0</text:span>, <text:span text:style-name="T6">log</text:span><text:span text:style-name="T4">=</text:span><text:span text:style-name="T10">True</text:span>))</text:p>
      <text:p text:style-name="P1"><text:span text:style-name="T1">k_0</text:span> <text:span text:style-name="T4">=</text:span> <text:span text:style-name="T6">trial</text:span>.<text:span text:style-name="T7">suggest_categorical</text:span>(<text:span text:style-name="T3">"k_0"</text:span>, [<text:span text:style-name="T8">1</text:span>, <text:span text:style-name="T8">2</text:span>, <text:span text:style-name="T8">4</text:span>, <text:span text:style-name="T8">8</text:span>])</text:p>
      <text:p text:style-name="P1"><text:span text:style-name="T1">k_i</text:span> <text:span text:style-name="T4">=</text:span> <text:span text:style-name="T6">trial</text:span>.<text:span text:style-name="T7">suggest_categorical</text:span>(<text:span text:style-name="T3">"k_i"</text:span>, [<text:span text:style-name="T8">1</text:span>, <text:span text:style-name="T8">2</text:span>, <text:span text:style-name="T8">4</text:span>, <text:span text:style-name="T8">8</text:span>])</text:p>
      <text:p text:style-name="P1"><text:span text:style-name="T1">theta_bar_scale</text:span> <text:span text:style-name="T4">=</text:span> <text:span text:style-name="T6">trial</text:span>.<text:span text:style-name="T7">suggest_float</text:span>(<text:span text:style-name="T3">"theta_bar_scale"</text:span>, <text:span text:style-name="T8">0.001</text:span>, <text:span text:style-name="T8">1.0</text:span>, <text:span text:style-name="T6">log</text:span><text:span text:style-name="T4">=</text:span><text:span text:style-name="T10">True</text:span>)</text:p>
      <text:p text:style-name="P1"><text:span text:style-name="T1">b</text:span> <text:span text:style-name="T4">=</text:span> <text:span text:style-name="T8">1</text:span></text:p>
      <text:p text:style-name="P1"><text:span text:style-name="T1">hidden_width</text:span> <text:span text:style-name="T4">=</text:span> <text:span text:style-name="T8">16</text:span></text:p>
      <text:p text:style-name="P1"/>
      <text:p text:style-name="Standard">I have generated database using the <text:span text:style-name="T15">above</text:span> gains. <text:span text:style-name="T15">Each were run 100 times.</text:span></text:p>
      <text:p text:style-name="Standard"/>
      <text:p text:style-name="P11">For developed (ResNet inside the integral), the best cost was 107.5518 with gamma = 22.3669, sigma_mod = 0.76541, k_0 = 2, k_i =2, theta_bar_scale: 0.00132766</text:p>
      <text:p text:style-name="P11"/>
      <text:p text:style-name="P11">For the baseline (ResNet outside the integral), the best cost was 137.9704 with gamma = 37.66, sigma_m<text:span text:style-name="T17">o</text:span>d = 0.001197, k_0 = 1, k_i =8, theta_bar: 1337.21 (Scale: 0.5749)</text:p>
      <text:p text:style-name="P11"/>
      <text:p text:style-name="P12"/>
      <text:p text:style-name="P13">NEW DOCKER</text:p>
      <text:p text:style-name="P12">cd /home/root</text:p>
      <text:p text:style-name="P12">apt update &amp;&amp; apt install -y python3.10-venv</text:p>
      <text:p text:style-name="P12">python3 -m venv venv --system-site-packages</text:p>
      <text:p text:style-name="P12">source venv/bin/activate</text:p>
      <text:p text:style-name="P12">python3 -m pip install --upgrade pip pyyaml packaging "setuptools==69.0.3"</text:p>
      <text:p text:style-name="P12">python3 -m pip install ./resnet</text:p>
      <text:p text:style-name="P12">source ros-sources.sh</text:p>
      <text:p text:style-name="P12">cd /home/root/ros2_ws</text:p>
      <text:p text:style-name="P12">rm -rf build/ install/ log/</text:p>
      <text:p text:style-name="P12">colcon build --cmake-args -DPython3_EXECUTABLE=/home/root/venv/bin/python3</text:p>
      <text:p text:style-name="P12">sed -i '1s|^.*$|#!/home/root/venv/bin/python3|' install/aviary_rise_controller/lib/aviary_rise_controller/aviary_rise_controller</text:p>
      <text:p text:style-name="P12">source install/setup.bash</text:p>
      <text:p text:style-name="P12"/>
      <text:p text:style-name="P12"/>
      <text:p text:style-name="P12">ros2 run aviary_rise_controller aviary_rise_controller --ros-args --params-file /home/root/ros2_ws/src/aviary_rise_controller/param/params.yaml</text:p>
      <text:p text:style-name="P12"/>
      <text:p text:style-name="P11"/>
      <text:p text:style-name="P8"/>
      <text:p text:style-name="Standard"/>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08:58:59.506469531</meta:creation-date>
    <dc:date>2026-06-16T13:56:34.890662696</dc:date>
    <meta:editing-duration>PT8H11M33S</meta:editing-duration>
    <meta:editing-cycles>5</meta:editing-cycles>
    <meta:generator>LibreOffice/7.3.7.2$Linux_X86_64 LibreOffice_project/30$Build-2</meta:generator>
    <meta:document-statistic meta:table-count="0" meta:image-count="0" meta:object-count="0" meta:page-count="3" meta:paragraph-count="45" meta:word-count="519" meta:character-count="3678" meta:non-whitespace-character-count="3207"/>
  </office:meta>
</office:document-meta>
</file>