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198in"/>
      <style:text-properties fo:color="#bbbebf" loext:opacity="100%" style:font-name="Droid Sans Mono" fo:font-size="10.5pt" fo:font-weight="normal" fo:background-color="#121314"/>
    </style:style>
    <style:style style:name="P2" style:family="paragraph" style:parent-style-name="Text_20_body">
      <style:text-properties fo:color="#bbbebf" loext:opacity="100%" style:font-name="Droid Sans Mono" fo:font-size="10.5pt" fo:font-weight="normal" officeooo:rsid="00081a4e" fo:background-color="#121314"/>
    </style:style>
    <style:style style:name="P3" style:family="paragraph" style:parent-style-name="Standard">
      <style:text-properties fo:color="#bbbebf" loext:opacity="100%" style:font-name="Droid Sans Mono" fo:font-size="10.5pt" fo:font-weight="normal" officeooo:rsid="000b4291" officeooo:paragraph-rsid="000b4291" fo:background-color="#121314"/>
    </style:style>
    <style:style style:name="P4" style:family="paragraph" style:parent-style-name="Standard">
      <style:text-properties officeooo:paragraph-rsid="00081a4e"/>
    </style:style>
    <style:style style:name="P5" style:family="paragraph" style:parent-style-name="Text_20_body">
      <style:text-properties officeooo:paragraph-rsid="00081a4e"/>
    </style:style>
    <style:style style:name="P6" style:family="paragraph" style:parent-style-name="Text_20_body">
      <style:text-properties officeooo:rsid="00081a4e" officeooo:paragraph-rsid="00081a4e"/>
    </style:style>
    <style:style style:name="P7" style:family="paragraph" style:parent-style-name="Standard">
      <style:text-properties officeooo:rsid="00081a4e" officeooo:paragraph-rsid="00081a4e"/>
    </style:style>
    <style:style style:name="P8" style:family="paragraph" style:parent-style-name="Standard">
      <style:text-properties officeooo:rsid="00083310" officeooo:paragraph-rsid="00083310"/>
    </style:style>
    <style:style style:name="P9" style:family="paragraph" style:parent-style-name="Standard">
      <style:text-properties officeooo:rsid="000b4291" officeooo:paragraph-rsid="000b4291"/>
    </style:style>
    <style:style style:name="P10" style:family="paragraph" style:parent-style-name="Standard">
      <style:text-properties officeooo:rsid="000bde0e" officeooo:paragraph-rsid="000bde0e"/>
    </style:style>
    <style:style style:name="P11" style:family="paragraph" style:parent-style-name="Standard">
      <style:text-properties officeooo:rsid="000c7b4a" officeooo:paragraph-rsid="000c7b4a"/>
    </style:style>
    <style:style style:name="P12" style:family="paragraph" style:parent-style-name="Standard">
      <style:paragraph-properties fo:break-before="page"/>
      <style:text-properties officeooo:rsid="000c7b4a" officeooo:paragraph-rsid="000c7b4a"/>
    </style:style>
    <style:style style:name="P13" style:family="paragraph" style:parent-style-name="Standard">
      <style:text-properties officeooo:rsid="000bde0e" officeooo:paragraph-rsid="000bde0e"/>
    </style:style>
    <style:style style:name="P14" style:family="paragraph" style:parent-style-name="Standard">
      <style:text-properties officeooo:rsid="000f3e48" officeooo:paragraph-rsid="000f3e48"/>
    </style:style>
    <style:style style:name="P15" style:family="paragraph" style:parent-style-name="Standard">
      <style:paragraph-properties style:line-height-at-least="0.198in"/>
      <style:text-properties fo:color="#bbbebf" loext:opacity="100%" style:font-name="Droid Sans Mono" fo:font-size="10.5pt" fo:font-weight="normal" fo:background-color="#121314"/>
    </style:style>
    <style:style style:name="P16" style:family="paragraph" style:parent-style-name="Standard">
      <style:text-properties fo:color="#bbbebf" loext:opacity="100%" style:font-name="Droid Sans Mono" fo:font-size="10.5pt" fo:font-weight="normal" officeooo:paragraph-rsid="000f3e48" fo:background-color="#121314"/>
    </style:style>
    <style:style style:name="P17" style:family="paragraph" style:parent-style-name="Standard">
      <style:text-properties officeooo:rsid="000fdc87" officeooo:paragraph-rsid="000fdc87"/>
    </style:style>
    <style:style style:name="P18" style:family="paragraph" style:parent-style-name="Text_20_body">
      <style:text-properties officeooo:paragraph-rsid="000f3e48"/>
    </style:style>
    <style:style style:name="T1" style:family="text">
      <style:text-properties fo:color="#c9d1d9" loext:opacity="100%"/>
    </style:style>
    <style:style style:name="T2" style:family="text">
      <style:text-properties fo:color="#bbbebf" loext:opacity="100%" style:font-name="Droid Sans Mono" fo:font-size="10.5pt" fo:font-weight="normal" fo:background-color="#121314" loext:char-shading-value="0"/>
    </style:style>
    <style:style style:name="T3" style:family="text">
      <style:text-properties fo:color="#a5d6ff" loext:opacity="100%"/>
    </style:style>
    <style:style style:name="T4" style:family="text">
      <style:text-properties fo:color="#d4d4d4" loext:opacity="100%"/>
    </style:style>
    <style:style style:name="T5" style:family="text">
      <style:text-properties fo:color="#d4d4d4" loext:opacity="100%" style:font-name="Droid Sans Mono" fo:font-size="10.5pt" fo:font-weight="normal" fo:background-color="#121314" loext:char-shading-value="0"/>
    </style:style>
    <style:style style:name="T6" style:family="text">
      <style:text-properties fo:color="#ffa657" loext:opacity="100%"/>
    </style:style>
    <style:style style:name="T7" style:family="text">
      <style:text-properties fo:color="#d2a8ff" loext:opacity="100%"/>
    </style:style>
    <style:style style:name="T8" style:family="text">
      <style:text-properties fo:color="#b5cea8" loext:opacity="100%"/>
    </style:style>
    <style:style style:name="T9" style:family="text">
      <style:text-properties fo:color="#b5cea8" loext:opacity="100%" style:font-name="Droid Sans Mono" fo:font-size="10.5pt" fo:font-weight="normal" fo:background-color="#121314" loext:char-shading-value="0"/>
    </style:style>
    <style:style style:name="T10" style:family="text">
      <style:text-properties fo:color="#569cd6" loext:opacity="100%"/>
    </style:style>
    <style:style style:name="T11" style:family="text">
      <style:text-properties officeooo:rsid="00081a4e"/>
    </style:style>
    <style:style style:name="T12" style:family="text">
      <style:text-properties fo:color="#79c0ff" loext:opacity="100%"/>
    </style:style>
    <style:style style:name="T13" style:family="text">
      <style:text-properties fo:color="#79c0ff" loext:opacity="100%" style:font-name="Droid Sans Mono" fo:font-size="10.5pt" fo:font-weight="normal" fo:background-color="#121314" loext:char-shading-value="0"/>
    </style:style>
    <style:style style:name="T14" style:family="text">
      <style:text-properties officeooo:rsid="00083310"/>
    </style:style>
    <style:style style:name="T15" style:family="text">
      <style:text-properties officeooo:rsid="000b4291"/>
    </style:style>
    <style:style style:name="T16" style:family="text">
      <style:text-properties fo:color="#4ec9b0" loext:opacity="100%"/>
    </style:style>
    <style:style style:name="T17" style:family="text">
      <style:text-properties officeooo:rsid="000c7b4a"/>
    </style:style>
    <style:style style:name="T18" style:family="text">
      <style:text-properties officeooo:rsid="000f3e48"/>
    </style:style>
    <style:style style:name="T19" style:family="text">
      <style:text-properties fo:color="#ff7b72" loext:opacity="100%"/>
    </style:style>
    <style:style style:name="T20" style:family="text">
      <style:text-properties fo:color="#c586c0" loext:opacity="100%"/>
    </style:style>
    <style:style style:name="T21" style:family="text">
      <style:text-properties officeooo:rsid="00101f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Returning to the Gazebo wind thing. It's been a few days since I've chatted here so I forgot what we were doing.</text:p>
      <text:p text:style-name="Text_20_body"/>
      <text:p text:style-name="Text_20_body">So far....I have tuned my SITL for a baseline RISE with no neural network which assumes knowledge of q_ddot. Call this controller "no ResNet." The two controllers I will subsequently compare that have ResNets do not know q_ddot. This usually-known feedforward term is instead compensated for with a ResNet. Rather than "trajectory tracking," this problem is called "target tracking." In the two controller, the only difference is whether the ResNet is inside or outside the integral. Only when inside the integral, the previous controller input is fed into the ResNet alongside the usual input. Regardless, both controller use the same update law, in which all weights and biases of the ResNet update concurrently and in real time. </text:p>
      <text:p text:style-name="Text_20_body"/>
      <text:p text:style-name="Text_20_body">Here's what I have done so far…</text:p>
      <text:p text:style-name="P6">PHASE 1</text:p>
      <text:p text:style-name="Text_20_body">Using seed 42 for jax.rando<text:span text:style-name="T11">m and the cost function</text:span></text:p>
      <text:p text:style-name="P4">J=<text:span text:style-name="T11">\intop_{t_0}{t_f}(q_e*t*|e(t)|^2</text:span>+<text:span text:style-name="T11">r_u|u(t)|^2</text:span>)dt</text:p>
      <text:p text:style-name="P4"/>
      <text:p text:style-name="P7">where t_f=60 and the search ranges were</text:p>
      <text:p text:style-name="P4"/>
      <text:p text:style-name="P1"><text:span text:style-name="T1">param_dict</text:span>[<text:span text:style-name="T3">'k1'</text:span>] <text:span text:style-name="T4">=</text:span> <text:span text:style-name="T6">trial</text:span>.<text:span text:style-name="T7">suggest_float</text:span>(<text:span text:style-name="T3">"k1"</text:span>, <text:span text:style-name="T8">0.1</text:span>, <text:span text:style-name="T8">2.0</text:span>)</text:p>
      <text:p text:style-name="P1"><text:span text:style-name="T1">param_dict</text:span>[<text:span text:style-name="T3">'k2'</text:span>] <text:span text:style-name="T4">=</text:span> <text:span text:style-name="T6">trial</text:span>.<text:span text:style-name="T7">suggest_float</text:span>(<text:span text:style-name="T3">"k2"</text:span>, <text:span text:style-name="T8">0.1</text:span>, <text:span text:style-name="T8">2.0</text:span>)</text:p>
      <text:p text:style-name="P1"><text:span text:style-name="T1">param_dict</text:span>[<text:span text:style-name="T3">'k3'</text:span>] <text:span text:style-name="T4">=</text:span> <text:span text:style-name="T6">trial</text:span>.<text:span text:style-name="T7">suggest_float</text:span>(<text:span text:style-name="T3">"k3"</text:span>, <text:span text:style-name="T8">0.1</text:span>, <text:span text:style-name="T8">2.0</text:span>)</text:p>
      <text:p text:style-name="P1"><text:span text:style-name="T1">param_dict</text:span>[<text:span text:style-name="T3">'k_rise'</text:span>] <text:span text:style-name="T4">=</text:span> <text:span text:style-name="T6">trial</text:span>.<text:span text:style-name="T7">suggest_float</text:span>(<text:span text:style-name="T3">"k_rise"</text:span>, <text:span text:style-name="T8">0.0001</text:span>, <text:span text:style-name="T8">0.01</text:span>, <text:span text:style-name="T6">log</text:span><text:span text:style-name="T4">=</text:span><text:span text:style-name="T10">True</text:span>)</text:p>
      <text:p text:style-name="Text_20_body"/>
      <text:p text:style-name="P18"><text:span text:style-name="T11">The desired trajectory was a figure eight with a period of 30 second</text:span><text:span text:style-name="T18">s:</text:span></text:p>
      <text:p text:style-name="P18"/>
      <text:p text:style-name="P16"><text:span text:style-name="T19">def</text:span> <text:span text:style-name="T7">get_desired_state</text:span>(<text:span text:style-name="T1">self</text:span>, <text:span text:style-name="T6">t</text:span>: <text:span text:style-name="T16">float</text:span>) -&gt; <text:span text:style-name="T16">tuple</text:span>[<text:span text:style-name="T16">np</text:span>.<text:span text:style-name="T16">ndarray</text:span>, <text:span text:style-name="T16">np</text:span>.<text:span text:style-name="T16">ndarray</text:span>, <text:span text:style-name="T16">np</text:span>.<text:span text:style-name="T16">ndarray</text:span>]:</text:p>
      <text:p text:style-name="P1"><text:span text:style-name="T1">wx</text:span> <text:span text:style-name="T4">=</text:span> (<text:span text:style-name="T8">4.0</text:span> <text:span text:style-name="T4">*</text:span> <text:span text:style-name="T16">math</text:span>.<text:span text:style-name="T1">pi</text:span>) <text:span text:style-name="T4">/</text:span> <text:span text:style-name="T1">self</text:span>.<text:span text:style-name="T1">T_period</text:span> </text:p>
      <text:p text:style-name="P1"><text:span text:style-name="T1">wy</text:span> <text:span text:style-name="T4">=</text:span> (<text:span text:style-name="T8">2.0</text:span> <text:span text:style-name="T4">*</text:span> <text:span text:style-name="T16">math</text:span>.<text:span text:style-name="T1">pi</text:span>) <text:span text:style-name="T4">/</text:span> <text:span text:style-name="T1">self</text:span>.<text:span text:style-name="T1">T_period</text:span></text:p>
      <text:p text:style-name="P1"><text:span text:style-name="T1">wz</text:span> <text:span text:style-name="T4">=</text:span> (<text:span text:style-name="T8">2.0</text:span> <text:span text:style-name="T4">*</text:span> <text:span text:style-name="T16">math</text:span>.<text:span text:style-name="T1">pi</text:span>) <text:span text:style-name="T4">/</text:span> <text:span text:style-name="T1">self</text:span>.<text:span text:style-name="T1">T_period</text:span></text:p>
      <text:p text:style-name="P1"><text:span text:style-name="T1">zc</text:span> <text:span text:style-name="T4">=</text:span> <text:span text:style-name="T4">-</text:span><text:span text:style-name="T8">4.0</text:span></text:p>
      <text:p text:style-name="P1"><text:span text:style-name="T1">xd</text:span> <text:span text:style-name="T4">=</text:span> <text:span text:style-name="T8">3.0</text:span> <text:span text:style-name="T4">*</text:span> <text:span text:style-name="T16">math</text:span>.<text:span text:style-name="T7">sin</text:span>(<text:span text:style-name="T1">wx</text:span> <text:span text:style-name="T4">*</text:span> <text:span text:style-name="T6">t</text:span>)</text:p>
      <text:p text:style-name="P1"><text:span text:style-name="T1">yd</text:span> <text:span text:style-name="T4">=</text:span> <text:span text:style-name="T8">8.0</text:span> <text:span text:style-name="T4">*</text:span> <text:span text:style-name="T16">math</text:span>.<text:span text:style-name="T7">sin</text:span>(<text:span text:style-name="T1">wy</text:span> <text:span text:style-name="T4">*</text:span> <text:span text:style-name="T6">t</text:span>)</text:p>
      <text:p text:style-name="P1"><text:span text:style-name="T1">zd</text:span> <text:span text:style-name="T4">=</text:span> <text:span text:style-name="T8">0.5</text:span> <text:span text:style-name="T4">*</text:span> <text:span text:style-name="T16">math</text:span>.<text:span text:style-name="T7">sin</text:span>(<text:span text:style-name="T1">wz</text:span> <text:span text:style-name="T4">*</text:span> <text:span text:style-name="T6">t</text:span>) <text:span text:style-name="T4">+</text:span> <text:span text:style-name="T1">zc</text:span></text:p>
      <text:p text:style-name="P1"><text:span text:style-name="T1">vxd</text:span> <text:span text:style-name="T4">=</text:span> <text:span text:style-name="T8">3.0</text:span> <text:span text:style-name="T4">*</text:span> <text:span text:style-name="T1">wx</text:span> <text:span text:style-name="T4">*</text:span> <text:span text:style-name="T16">math</text:span>.<text:span text:style-name="T7">cos</text:span>(<text:span text:style-name="T1">wx</text:span> <text:span text:style-name="T4">*</text:span> <text:span text:style-name="T6">t</text:span>)</text:p>
      <text:p text:style-name="P1"><text:span text:style-name="T1">vyd</text:span> <text:span text:style-name="T4">=</text:span> <text:span text:style-name="T8">8.0</text:span> <text:span text:style-name="T4">*</text:span> <text:span text:style-name="T1">wy</text:span> <text:span text:style-name="T4">*</text:span> <text:span text:style-name="T16">math</text:span>.<text:span text:style-name="T7">cos</text:span>(<text:span text:style-name="T1">wy</text:span> <text:span text:style-name="T4">*</text:span> <text:span text:style-name="T6">t</text:span>)</text:p>
      <text:p text:style-name="P1"><text:span text:style-name="T1">vzd</text:span> <text:span text:style-name="T4">=</text:span> <text:span text:style-name="T8">0.5</text:span> <text:span text:style-name="T4">*</text:span> <text:span text:style-name="T1">wz</text:span> <text:span text:style-name="T4">*</text:span> <text:span text:style-name="T16">math</text:span>.<text:span text:style-name="T7">cos</text:span>(<text:span text:style-name="T1">wz</text:span> <text:span text:style-name="T4">*</text:span> <text:span text:style-name="T6">t</text:span>)</text:p>
      <text:p text:style-name="P1"><text:span text:style-name="T1">axd</text:span> <text:span text:style-name="T4">=</text:span> <text:span text:style-name="T4">-</text:span>(<text:span text:style-name="T1">wx</text:span><text:span text:style-name="T4">**</text:span><text:span text:style-name="T8">2</text:span>) <text:span text:style-name="T4">*</text:span> <text:span text:style-name="T1">xd</text:span></text:p>
      <text:p text:style-name="P1"><text:span text:style-name="T1">ayd</text:span> <text:span text:style-name="T4">=</text:span> <text:span text:style-name="T4">-</text:span>(<text:span text:style-name="T1">wy</text:span><text:span text:style-name="T4">**</text:span><text:span text:style-name="T8">2</text:span>) <text:span text:style-name="T4">*</text:span> <text:span text:style-name="T1">yd</text:span></text:p>
      <text:p text:style-name="P1"><text:span text:style-name="T1">azd</text:span> <text:span text:style-name="T4">=</text:span> <text:span text:style-name="T4">-</text:span>(<text:span text:style-name="T1">wz</text:span><text:span text:style-name="T4">**</text:span><text:span text:style-name="T8">2</text:span>) <text:span text:style-name="T4">*</text:span> (<text:span text:style-name="T1">zd</text:span> <text:span text:style-name="T4">-</text:span> <text:span text:style-name="T1">zc</text:span>)</text:p>
      <text:p text:style-name="P1"><text:soft-page-break/><text:span text:style-name="T20">return</text:span> (</text:p>
      <text:p text:style-name="P1"><text:span text:style-name="T16">np</text:span>.<text:span text:style-name="T7">array</text:span>([<text:span text:style-name="T1">xd</text:span>, <text:span text:style-name="T1">yd</text:span>, <text:span text:style-name="T1">zd</text:span>], <text:span text:style-name="T6">dtype</text:span><text:span text:style-name="T4">=</text:span><text:span text:style-name="T16">np</text:span>.<text:span text:style-name="T16">float64</text:span>),</text:p>
      <text:p text:style-name="P1"><text:span text:style-name="T16">np</text:span>.<text:span text:style-name="T7">array</text:span>([<text:span text:style-name="T1">vxd</text:span>, <text:span text:style-name="T1">vyd</text:span>, <text:span text:style-name="T1">vzd</text:span>], <text:span text:style-name="T6">dtype</text:span><text:span text:style-name="T4">=</text:span><text:span text:style-name="T16">np</text:span>.<text:span text:style-name="T16">float64</text:span>),</text:p>
      <text:p text:style-name="P1"><text:span text:style-name="T16">np</text:span>.<text:span text:style-name="T7">array</text:span>([<text:span text:style-name="T1">axd</text:span>, <text:span text:style-name="T1">ayd</text:span>, <text:span text:style-name="T1">azd</text:span>], <text:span text:style-name="T6">dtype</text:span><text:span text:style-name="T4">=</text:span><text:span text:style-name="T16">np</text:span>.<text:span text:style-name="T16">float64</text:span>)</text:p>
      <text:p text:style-name="P1">)</text:p>
      <text:p text:style-name="P18"/>
      <text:p text:style-name="P18"><text:span text:style-name="T11">Optuna was given</text:span> 100 trials <text:span text:style-name="T11">to find the gains in these ranges that minimize this cost. In each, the initial condition was always</text:span></text:p>
      <text:p text:style-name="P5"><text:span text:style-name="T13">FIXED_X</text:span><text:span text:style-name="T2"> </text:span><text:span text:style-name="T5">=</text:span><text:span text:style-name="T2"> </text:span><text:span text:style-name="T9">0.70</text:span></text:p>
      <text:p text:style-name="P1"><text:span text:style-name="T12">FIXED_Y</text:span> <text:span text:style-name="T4">=</text:span> <text:span text:style-name="T4">-</text:span><text:span text:style-name="T8">2.37</text:span></text:p>
      <text:p text:style-name="P1"><text:span text:style-name="T12">TARGET_Z</text:span> <text:span text:style-name="T4">=</text:span> <text:span text:style-name="T4">-</text:span><text:span text:style-name="T8">3.0</text:span></text:p>
      <text:p text:style-name="P1"/>
      <text:p text:style-name="Standard">where the <text:span text:style-name="T11">z-value is chosen by letting the quad copter first ascend to that altitude (negative z is up) before activating the controller. Th</text:span><text:span text:style-name="T14">e x-y portion of the</text:span><text:span text:style-name="T11"> initial </text:span><text:span text:style-name="T14">condition</text:span><text:span text:style-name="T11"> was randomly selected (once at the beginning, not every flight) from a 5 by 5 meter square centered at the origin. </text:span>If the quadcopter violates <text:span text:style-name="T11">a</text:span> defined spatial safety boundar<text:span text:style-name="T11">y</text:span> at some time t_fail before reaching t_<text:span text:style-name="T11">f</text:span>, the integration stops and a massive scalar penalty is added to whatever cost has accumulated up to that point:</text:p>
      <text:p text:style-name="Standard">J_fail=J(t_fail)+w_fail(t_<text:span text:style-name="T11">f</text:span>−t_fai<text:span text:style-name="T11">l)^2</text:span></text:p>
      <text:p text:style-name="Standard"/>
      <text:p text:style-name="P8">where w_fail = 1000.</text:p>
      <text:p text:style-name="P8"/>
      <text:p text:style-name="P9">PHASE 2</text:p>
      <text:p text:style-name="P11">With the same initial condition and using the initial condition function from my 1.2.0 ResNet library, </text:p>
      <text:p text:style-name="P9"/>
      <text:p text:style-name="P9">As of June 16, I ran both ResNet controllers with the search spaces:</text:p>
      <text:p text:style-name="P9"/>
      <text:p text:style-name="P3"><text:span text:style-name="T1">param_dict</text:span>[<text:span text:style-name="T3">'gamma'</text:span>] <text:span text:style-name="T4">=</text:span> <text:span text:style-name="T16">float</text:span>(<text:span text:style-name="T6">trial</text:span>.<text:span text:style-name="T7">suggest_float</text:span>(<text:span text:style-name="T3">"gamma"</text:span>, <text:span text:style-name="T8">0.5</text:span>, <text:span text:style-name="T8">50.0</text:span>))</text:p>
      <text:p text:style-name="P1"><text:span text:style-name="T1">param_dict</text:span>[<text:span text:style-name="T3">'sigma_mod'</text:span>] <text:span text:style-name="T4">=</text:span> <text:span text:style-name="T16">float</text:span>(<text:span text:style-name="T6">trial</text:span>.<text:span text:style-name="T7">suggest_float</text:span>(<text:span text:style-name="T3">"sigma_mod"</text:span>, <text:span text:style-name="T8">0.001</text:span>, <text:span text:style-name="T8">1.0</text:span>, <text:span text:style-name="T6">log</text:span><text:span text:style-name="T4">=</text:span><text:span text:style-name="T10">True</text:span>))</text:p>
      <text:p text:style-name="P1"><text:span text:style-name="T1">k_0</text:span> <text:span text:style-name="T4">=</text:span> <text:span text:style-name="T6">trial</text:span>.<text:span text:style-name="T7">suggest_categorical</text:span>(<text:span text:style-name="T3">"k_0"</text:span>, [<text:span text:style-name="T8">1</text:span>, <text:span text:style-name="T8">2</text:span>, <text:span text:style-name="T8">4</text:span>, <text:span text:style-name="T8">8</text:span>])</text:p>
      <text:p text:style-name="P1"><text:span text:style-name="T1">k_i</text:span> <text:span text:style-name="T4">=</text:span> <text:span text:style-name="T6">trial</text:span>.<text:span text:style-name="T7">suggest_categorical</text:span>(<text:span text:style-name="T3">"k_i"</text:span>, [<text:span text:style-name="T8">1</text:span>, <text:span text:style-name="T8">2</text:span>, <text:span text:style-name="T8">4</text:span>, <text:span text:style-name="T8">8</text:span>])</text:p>
      <text:p text:style-name="P1"><text:span text:style-name="T1">theta_bar_scale</text:span> <text:span text:style-name="T4">=</text:span> <text:span text:style-name="T6">trial</text:span>.<text:span text:style-name="T7">suggest_float</text:span>(<text:span text:style-name="T3">"theta_bar_scale"</text:span>, <text:span text:style-name="T8">0.001</text:span>, <text:span text:style-name="T8">1.0</text:span>, <text:span text:style-name="T6">log</text:span><text:span text:style-name="T4">=</text:span><text:span text:style-name="T10">True</text:span>)</text:p>
      <text:p text:style-name="P1"><text:span text:style-name="T1">b</text:span> <text:span text:style-name="T4">=</text:span> <text:span text:style-name="T8">1</text:span></text:p>
      <text:p text:style-name="P1"><text:span text:style-name="T1">hidden_width</text:span> <text:span text:style-name="T4">=</text:span> <text:span text:style-name="T8">16</text:span></text:p>
      <text:p text:style-name="P1"/>
      <text:p text:style-name="Standard">I have generated database using the <text:span text:style-name="T15">above</text:span> gains. <text:span text:style-name="T15">Each were run 100 times.</text:span></text:p>
      <text:p text:style-name="Standard"/>
      <text:p text:style-name="P10">For developed (ResNet inside the integral), the best cost was 107.5518 with gamma = 22.3669, sigma_mod = 0.76541, k_0 = 2, k_i =2, theta_bar_scale: 0.00132766</text:p>
      <text:p text:style-name="P10"/>
      <text:p text:style-name="P10">For the baseline (ResNet outside the integral), the best cost was 137.9704 with gamma = 37.66, sigma_m<text:span text:style-name="T17">o</text:span>d = 0.001197, k_0 = 1, k_i =8, theta_bar: 1337.21 (Scale: 0.5749)</text:p>
      <text:p text:style-name="P10"/>
      <text:p text:style-name="P14">PHASE 1 (TAKE 2)</text:p>
      <text:p text:style-name="P14">On June 17, I ran 501 trials of Phase 1 again from scratch. The best ITAE cost was 160.8355 and the best parameters were</text:p>
      <text:p text:style-name="P14"><text:soft-page-break/>Best Params: {'k1': 1.9998108856232995, 'k2': 0.6529643057605065, 'k3': 0.7406820227437091, 'k_rise': 0.003695960415369938}</text:p>
      <text:p text:style-name="P14">k1=2, k2=0.65, k3=0.74,k_rise=0.0037.</text:p>
      <text:p text:style-name="P14"/>
      <text:p text:style-name="P17">I changed the desired trajectory to something more interesting. I am now running 1000 trials (which stop early if the cost hasn’t improved in 100 trials). <text:span text:style-name="T21">I also remove the symmetric from k_2 and k_3.</text:span></text:p>
      <text:p text:style-name="P10"/>
      <text:p text:style-name="P11"/>
      <text:p text:style-name="P12"/>
      <text:p text:style-name="P11"/>
      <text:p text:style-name="P10"/>
      <text:p text:style-name="P9"/>
      <text:p text:style-name="Standard"/>
      <text:p text:style-name="P2"/>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5T08:58:59.506469531</meta:creation-date>
    <dc:date>2026-06-17T19:47:30.613307452</dc:date>
    <meta:editing-duration>PT8H12M33S</meta:editing-duration>
    <meta:editing-cycles>6</meta:editing-cycles>
    <meta:generator>LibreOffice/7.3.7.2$Linux_X86_64 LibreOffice_project/30$Build-2</meta:generator>
    <meta:document-statistic meta:table-count="0" meta:image-count="0" meta:object-count="0" meta:page-count="4" meta:paragraph-count="56" meta:word-count="646" meta:character-count="4082" meta:non-whitespace-character-count="3489"/>
  </office:meta>
</office:document-meta>
</file>