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Mono" svg:font-family="'Droid Sans Mono', monospac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style:line-height-at-least="0.198in"/>
      <style:text-properties fo:color="#bbbebf" loext:opacity="100%" style:font-name="Droid Sans Mono" fo:font-size="10.5pt" fo:font-weight="normal" fo:background-color="#121314"/>
    </style:style>
    <style:style style:name="P2" style:family="paragraph" style:parent-style-name="Text_20_body">
      <style:text-properties fo:color="#bbbebf" loext:opacity="100%" style:font-name="Droid Sans Mono" fo:font-size="10.5pt" fo:font-weight="normal" officeooo:rsid="00081a4e" fo:background-color="#121314"/>
    </style:style>
    <style:style style:name="P3" style:family="paragraph" style:parent-style-name="Standard">
      <style:text-properties fo:color="#bbbebf" loext:opacity="100%" style:font-name="Droid Sans Mono" fo:font-size="10.5pt" fo:font-weight="normal" officeooo:rsid="000b4291" officeooo:paragraph-rsid="000b4291" fo:background-color="#121314"/>
    </style:style>
    <style:style style:name="P4" style:family="paragraph" style:parent-style-name="Standard">
      <style:text-properties fo:color="#bbbebf" loext:opacity="100%" style:font-name="Droid Sans Mono" fo:font-size="10.5pt" fo:font-weight="normal" officeooo:paragraph-rsid="000f3e48" fo:background-color="#121314"/>
    </style:style>
    <style:style style:name="P5" style:family="paragraph" style:parent-style-name="Standard">
      <style:text-properties fo:color="#bbbebf" loext:opacity="100%" style:font-name="Droid Sans Mono" fo:font-size="10.5pt" fo:font-weight="normal" officeooo:rsid="0012c6da" officeooo:paragraph-rsid="0012c6da" fo:background-color="#121314"/>
    </style:style>
    <style:style style:name="P6" style:family="paragraph" style:parent-style-name="Standard">
      <style:text-properties fo:color="#bbbebf" loext:opacity="100%" style:font-name="Droid Sans Mono" fo:font-size="10.5pt" fo:font-weight="normal" officeooo:paragraph-rsid="00149ca8" fo:background-color="#121314"/>
    </style:style>
    <style:style style:name="P7" style:family="paragraph" style:parent-style-name="Standard">
      <style:text-properties fo:color="#bbbebf" loext:opacity="100%" style:font-name="Droid Sans Mono" fo:font-size="10.5pt" fo:font-weight="normal" officeooo:rsid="001bbfe1" officeooo:paragraph-rsid="001bbfe1" fo:background-color="#121314"/>
    </style:style>
    <style:style style:name="P8" style:family="paragraph" style:parent-style-name="Standard">
      <style:text-properties officeooo:paragraph-rsid="00081a4e"/>
    </style:style>
    <style:style style:name="P9" style:family="paragraph" style:parent-style-name="Text_20_body">
      <style:text-properties officeooo:paragraph-rsid="00081a4e"/>
    </style:style>
    <style:style style:name="P10" style:family="paragraph" style:parent-style-name="Text_20_body">
      <style:text-properties officeooo:rsid="00081a4e" officeooo:paragraph-rsid="00081a4e"/>
    </style:style>
    <style:style style:name="P11" style:family="paragraph" style:parent-style-name="Standard">
      <style:text-properties officeooo:rsid="00081a4e" officeooo:paragraph-rsid="00081a4e"/>
    </style:style>
    <style:style style:name="P12" style:family="paragraph" style:parent-style-name="Standard">
      <style:text-properties officeooo:rsid="00083310" officeooo:paragraph-rsid="00083310"/>
    </style:style>
    <style:style style:name="P13" style:family="paragraph" style:parent-style-name="Standard">
      <style:text-properties officeooo:rsid="000b4291" officeooo:paragraph-rsid="000b4291"/>
    </style:style>
    <style:style style:name="P14" style:family="paragraph" style:parent-style-name="Standard">
      <style:text-properties officeooo:rsid="000bde0e" officeooo:paragraph-rsid="000bde0e"/>
    </style:style>
    <style:style style:name="P15" style:family="paragraph" style:parent-style-name="Standard">
      <style:paragraph-properties style:line-height-at-least="0.198in"/>
      <style:text-properties officeooo:rsid="000bde0e"/>
    </style:style>
    <style:style style:name="P16" style:family="paragraph" style:parent-style-name="Standard">
      <style:text-properties officeooo:rsid="000c7b4a" officeooo:paragraph-rsid="000c7b4a"/>
    </style:style>
    <style:style style:name="P17" style:family="paragraph" style:parent-style-name="Standard">
      <style:paragraph-properties fo:break-before="page"/>
      <style:text-properties officeooo:rsid="000c7b4a" officeooo:paragraph-rsid="000c7b4a"/>
    </style:style>
    <style:style style:name="P18" style:family="paragraph" style:parent-style-name="Standard">
      <style:text-properties officeooo:rsid="000f3e48" officeooo:paragraph-rsid="000f3e48"/>
    </style:style>
    <style:style style:name="P19" style:family="paragraph" style:parent-style-name="Text_20_body">
      <style:text-properties officeooo:paragraph-rsid="000f3e48"/>
    </style:style>
    <style:style style:name="P20" style:family="paragraph" style:parent-style-name="Standard">
      <style:text-properties officeooo:rsid="000fdc87" officeooo:paragraph-rsid="000fdc87"/>
    </style:style>
    <style:style style:name="P21" style:family="paragraph" style:parent-style-name="Standard">
      <style:text-properties officeooo:rsid="0012c6da" officeooo:paragraph-rsid="0012c6da"/>
    </style:style>
    <style:style style:name="P22" style:family="paragraph" style:parent-style-name="Standard">
      <style:text-properties officeooo:rsid="00149ca8" officeooo:paragraph-rsid="00149ca8"/>
    </style:style>
    <style:style style:name="P23" style:family="paragraph" style:parent-style-name="Standard">
      <style:paragraph-properties style:line-height-at-least="0.198in"/>
      <style:text-properties officeooo:rsid="00149ca8" officeooo:paragraph-rsid="001bbfe1"/>
    </style:style>
    <style:style style:name="P24" style:family="paragraph" style:parent-style-name="Standard">
      <style:paragraph-properties style:line-height-at-least="0.198in"/>
      <style:text-properties officeooo:rsid="001a3293" officeooo:paragraph-rsid="001a3293"/>
    </style:style>
    <style:style style:name="P25" style:family="paragraph" style:parent-style-name="Standard">
      <style:paragraph-properties style:line-height-at-least="0.198in"/>
      <style:text-properties officeooo:rsid="001bbfe1" officeooo:paragraph-rsid="001bbfe1"/>
    </style:style>
    <style:style style:name="P26" style:family="paragraph" style:parent-style-name="Standard">
      <style:text-properties officeooo:rsid="001bbfe1" officeooo:paragraph-rsid="001bbfe1"/>
    </style:style>
    <style:style style:name="P27" style:family="paragraph" style:parent-style-name="Standard">
      <style:text-properties officeooo:rsid="001efd03" officeooo:paragraph-rsid="001efd03"/>
    </style:style>
    <style:style style:name="P28" style:family="paragraph" style:parent-style-name="Standard">
      <style:text-properties officeooo:rsid="0024d00d" officeooo:paragraph-rsid="0024d00d"/>
    </style:style>
    <style:style style:name="P29" style:family="paragraph" style:parent-style-name="Standard">
      <style:text-properties officeooo:rsid="002588a5" officeooo:paragraph-rsid="002588a5"/>
    </style:style>
    <style:style style:name="P30" style:family="paragraph" style:parent-style-name="Standard">
      <style:text-properties officeooo:rsid="002588a5" officeooo:paragraph-rsid="002868c1"/>
    </style:style>
    <style:style style:name="P31" style:family="paragraph" style:parent-style-name="Standard">
      <style:text-properties officeooo:rsid="002868c1" officeooo:paragraph-rsid="002868c1"/>
    </style:style>
    <style:style style:name="P32" style:family="paragraph" style:parent-style-name="Standard">
      <style:paragraph-properties style:line-height-at-least="0.198in"/>
      <style:text-properties fo:color="#bbbebf" loext:opacity="100%" style:font-name="Droid Sans Mono" fo:font-size="10.5pt" fo:font-weight="normal" fo:background-color="#121314"/>
    </style:style>
    <style:style style:name="P33" style:family="paragraph" style:parent-style-name="Standard">
      <style:paragraph-properties style:line-height-at-least="0.198in"/>
      <style:text-properties fo:color="#bbbebf" loext:opacity="100%" style:font-name="Droid Sans Mono" fo:font-size="10.5pt" fo:font-weight="normal" officeooo:paragraph-rsid="002868c1" fo:background-color="#121314"/>
    </style:style>
    <style:style style:name="P34" style:family="paragraph" style:parent-style-name="Standard">
      <style:text-properties fo:color="#bbbebf" loext:opacity="100%" style:font-name="Droid Sans Mono" fo:font-size="10.5pt" fo:font-weight="normal" officeooo:rsid="002868c1" officeooo:paragraph-rsid="002ba38c" fo:background-color="#121314"/>
    </style:style>
    <style:style style:name="P35" style:family="paragraph" style:parent-style-name="Standard">
      <style:paragraph-properties style:line-height-at-least="0.198in"/>
    </style:style>
    <style:style style:name="P36" style:family="paragraph" style:parent-style-name="Standard">
      <style:text-properties officeooo:rsid="002e7e67" officeooo:paragraph-rsid="002e7e67"/>
    </style:style>
    <style:style style:name="P37" style:family="paragraph" style:parent-style-name="Standard">
      <style:text-properties officeooo:paragraph-rsid="00348d72"/>
    </style:style>
    <style:style style:name="P38" style:family="paragraph" style:parent-style-name="Standard">
      <style:text-properties officeooo:paragraph-rsid="00379a6f"/>
    </style:style>
    <style:style style:name="T1" style:family="text">
      <style:text-properties fo:color="#c9d1d9" loext:opacity="100%"/>
    </style:style>
    <style:style style:name="T2" style:family="text">
      <style:text-properties fo:color="#bbbebf" loext:opacity="100%" style:font-name="Droid Sans Mono" fo:font-size="10.5pt" fo:font-weight="normal" fo:background-color="#121314" loext:char-shading-value="0"/>
    </style:style>
    <style:style style:name="T3" style:family="text">
      <style:text-properties fo:color="#a5d6ff" loext:opacity="100%"/>
    </style:style>
    <style:style style:name="T4" style:family="text">
      <style:text-properties fo:color="#a5d6ff" loext:opacity="100%" officeooo:rsid="002868c1"/>
    </style:style>
    <style:style style:name="T5" style:family="text">
      <style:text-properties fo:color="#a5d6ff" loext:opacity="100%" officeooo:rsid="002ba38c"/>
    </style:style>
    <style:style style:name="T6" style:family="text">
      <style:text-properties fo:color="#d4d4d4" loext:opacity="100%"/>
    </style:style>
    <style:style style:name="T7" style:family="text">
      <style:text-properties fo:color="#d4d4d4" loext:opacity="100%" style:font-name="Droid Sans Mono" fo:font-size="10.5pt" fo:font-weight="normal" fo:background-color="#121314" loext:char-shading-value="0"/>
    </style:style>
    <style:style style:name="T8" style:family="text">
      <style:text-properties fo:color="#ffa657" loext:opacity="100%"/>
    </style:style>
    <style:style style:name="T9" style:family="text">
      <style:text-properties fo:color="#ffa657" loext:opacity="100%" officeooo:rsid="002868c1"/>
    </style:style>
    <style:style style:name="T10" style:family="text">
      <style:text-properties fo:color="#d2a8ff" loext:opacity="100%"/>
    </style:style>
    <style:style style:name="T11" style:family="text">
      <style:text-properties fo:color="#d2a8ff" loext:opacity="100%" officeooo:rsid="002868c1"/>
    </style:style>
    <style:style style:name="T12" style:family="text">
      <style:text-properties fo:color="#b5cea8" loext:opacity="100%"/>
    </style:style>
    <style:style style:name="T13" style:family="text">
      <style:text-properties fo:color="#b5cea8" loext:opacity="100%" style:font-name="Droid Sans Mono" fo:font-size="10.5pt" fo:font-weight="normal" fo:background-color="#121314" loext:char-shading-value="0"/>
    </style:style>
    <style:style style:name="T14" style:family="text">
      <style:text-properties fo:color="#b5cea8" loext:opacity="100%" style:font-name="Droid Sans Mono" fo:font-size="10.5pt" fo:font-weight="normal" officeooo:rsid="00348d72" fo:background-color="#121314" loext:char-shading-value="0"/>
    </style:style>
    <style:style style:name="T15" style:family="text">
      <style:text-properties fo:color="#b5cea8" loext:opacity="100%" officeooo:rsid="002868c1"/>
    </style:style>
    <style:style style:name="T16" style:family="text">
      <style:text-properties fo:color="#b5cea8" loext:opacity="100%" officeooo:rsid="002ad092"/>
    </style:style>
    <style:style style:name="T17" style:family="text">
      <style:text-properties fo:color="#b5cea8" loext:opacity="100%" officeooo:rsid="002d77d4"/>
    </style:style>
    <style:style style:name="T18" style:family="text">
      <style:text-properties fo:color="#569cd6" loext:opacity="100%"/>
    </style:style>
    <style:style style:name="T19" style:family="text">
      <style:text-properties officeooo:rsid="00081a4e"/>
    </style:style>
    <style:style style:name="T20" style:family="text">
      <style:text-properties fo:color="#79c0ff" loext:opacity="100%"/>
    </style:style>
    <style:style style:name="T21" style:family="text">
      <style:text-properties fo:color="#79c0ff" loext:opacity="100%" style:font-name="Droid Sans Mono" fo:font-size="10.5pt" fo:font-weight="normal" fo:background-color="#121314" loext:char-shading-value="0"/>
    </style:style>
    <style:style style:name="T22" style:family="text">
      <style:text-properties officeooo:rsid="00083310"/>
    </style:style>
    <style:style style:name="T23" style:family="text">
      <style:text-properties officeooo:rsid="000b4291"/>
    </style:style>
    <style:style style:name="T24" style:family="text">
      <style:text-properties fo:color="#4ec9b0" loext:opacity="100%"/>
    </style:style>
    <style:style style:name="T25" style:family="text">
      <style:text-properties officeooo:rsid="000c7b4a"/>
    </style:style>
    <style:style style:name="T26" style:family="text">
      <style:text-properties officeooo:rsid="000f3e48"/>
    </style:style>
    <style:style style:name="T27" style:family="text">
      <style:text-properties fo:color="#ff7b72" loext:opacity="100%"/>
    </style:style>
    <style:style style:name="T28" style:family="text">
      <style:text-properties fo:color="#c586c0" loext:opacity="100%"/>
    </style:style>
    <style:style style:name="T29" style:family="text">
      <style:text-properties officeooo:rsid="00101fc5"/>
    </style:style>
    <style:style style:name="T30" style:family="text">
      <style:text-properties officeooo:rsid="0012c6da"/>
    </style:style>
    <style:style style:name="T31" style:family="text">
      <style:text-properties fo:color="#8b949e" loext:opacity="100%"/>
    </style:style>
    <style:style style:name="T32" style:family="text">
      <style:text-properties officeooo:rsid="001516bf"/>
    </style:style>
    <style:style style:name="T33" style:family="text">
      <style:text-properties officeooo:rsid="001ab590"/>
    </style:style>
    <style:style style:name="T34" style:family="text">
      <style:text-properties officeooo:rsid="001bbfe1"/>
    </style:style>
    <style:style style:name="T35"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36" style:family="text">
      <style:text-properties officeooo:rsid="001eb156"/>
    </style:style>
    <style:style style:name="T37" style:family="text">
      <style:text-properties officeooo:rsid="0021b155"/>
    </style:style>
    <style:style style:name="T38" style:family="text">
      <style:text-properties officeooo:rsid="0021cc47"/>
    </style:style>
    <style:style style:name="T39" style:family="text">
      <style:text-properties officeooo:rsid="0023483b"/>
    </style:style>
    <style:style style:name="T40" style:family="text">
      <style:text-properties officeooo:rsid="00282bcf"/>
    </style:style>
    <style:style style:name="T41" style:family="text">
      <style:text-properties officeooo:rsid="002868c1"/>
    </style:style>
    <style:style style:name="T42" style:family="text">
      <style:text-properties officeooo:rsid="002e7e67"/>
    </style:style>
    <style:style style:name="T43" style:family="text">
      <style:text-properties officeooo:rsid="00310491"/>
    </style:style>
    <style:style style:name="T44" style:family="text">
      <style:text-properties officeooo:rsid="0032aa58"/>
    </style:style>
    <style:style style:name="T45" style:family="text">
      <style:text-properties officeooo:rsid="00348d72"/>
    </style:style>
    <style:style style:name="T46" style:family="text">
      <style:text-properties officeooo:rsid="00379a6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So far....I have tuned my SITL for a baseline RISE with no neural network which assumes knowledge of q_ddot. Call this controller "no ResNet." The two controllers I will subsequently compare that have ResNets do not know q_ddot. This usually-known feedforward term is instead compensated for with a ResNet. Rather than "trajectory tracking," this problem is called "target tracking." In the two controller, the only difference is whether the ResNet is inside or outside the integral. Only when inside the integral, the previous controller input is fed into the ResNet alongside the usual input. Regardless, both controller use the same update law, in which all weights and biases of the ResNet update concurrently and in real time. </text:p>
      <text:p text:style-name="Text_20_body"/>
      <text:p text:style-name="Text_20_body">Here's what I have done so far…</text:p>
      <text:p text:style-name="P10">PHASE 1</text:p>
      <text:p text:style-name="Text_20_body">Using seed 42 for jax.rando<text:span text:style-name="T19">m and the cost function</text:span></text:p>
      <text:p text:style-name="P8">J=<text:span text:style-name="T19">\intop_{t_0}{t_f}(q_e*t*|e(t)|^2</text:span>+<text:span text:style-name="T19">r_u|u(t)|^2</text:span>)dt</text:p>
      <text:p text:style-name="P8"/>
      <text:p text:style-name="P11">where t_f=60 and the search ranges were</text:p>
      <text:p text:style-name="P8"/>
      <text:p text:style-name="P1"><text:span text:style-name="T1">param_dict</text:span>[<text:span text:style-name="T3">'k1'</text:span>] <text:span text:style-name="T6">=</text:span> <text:span text:style-name="T8">trial</text:span>.<text:span text:style-name="T10">suggest_float</text:span>(<text:span text:style-name="T3">"k1"</text:span>, <text:span text:style-name="T12">0.1</text:span>, <text:span text:style-name="T12">2.0</text:span>)</text:p>
      <text:p text:style-name="P1"><text:span text:style-name="T1">param_dict</text:span>[<text:span text:style-name="T3">'k2'</text:span>] <text:span text:style-name="T6">=</text:span> <text:span text:style-name="T8">trial</text:span>.<text:span text:style-name="T10">suggest_float</text:span>(<text:span text:style-name="T3">"k2"</text:span>, <text:span text:style-name="T12">0.1</text:span>, <text:span text:style-name="T12">2.0</text:span>)</text:p>
      <text:p text:style-name="P1"><text:span text:style-name="T1">param_dict</text:span>[<text:span text:style-name="T3">'k3'</text:span>] <text:span text:style-name="T6">=</text:span> <text:span text:style-name="T8">trial</text:span>.<text:span text:style-name="T10">suggest_float</text:span>(<text:span text:style-name="T3">"k3"</text:span>, <text:span text:style-name="T12">0.1</text:span>, <text:span text:style-name="T12">2.0</text:span>)</text:p>
      <text:p text:style-name="P1"><text:span text:style-name="T1">param_dict</text:span>[<text:span text:style-name="T3">'k_rise'</text:span>] <text:span text:style-name="T6">=</text:span> <text:span text:style-name="T8">trial</text:span>.<text:span text:style-name="T10">suggest_float</text:span>(<text:span text:style-name="T3">"k_rise"</text:span>, <text:span text:style-name="T12">0.0001</text:span>, <text:span text:style-name="T12">0.01</text:span>, <text:span text:style-name="T8">log</text:span><text:span text:style-name="T6">=</text:span><text:span text:style-name="T18">True</text:span>)</text:p>
      <text:p text:style-name="Text_20_body"/>
      <text:p text:style-name="P19"><text:span text:style-name="T19">The desired trajectory was a figure eight with a period of 30 second</text:span><text:span text:style-name="T26">s:</text:span></text:p>
      <text:p text:style-name="P19"/>
      <text:p text:style-name="P4"><text:span text:style-name="T27">def</text:span> <text:span text:style-name="T10">get_desired_state</text:span>(<text:span text:style-name="T1">self</text:span>, <text:span text:style-name="T8">t</text:span>: <text:span text:style-name="T24">float</text:span>) -&gt; <text:span text:style-name="T24">tuple</text:span>[<text:span text:style-name="T24">np</text:span>.<text:span text:style-name="T24">ndarray</text:span>, <text:span text:style-name="T24">np</text:span>.<text:span text:style-name="T24">ndarray</text:span>, <text:span text:style-name="T24">np</text:span>.<text:span text:style-name="T24">ndarray</text:span>]:</text:p>
      <text:p text:style-name="P1"><text:span text:style-name="T1">wx</text:span> <text:span text:style-name="T6">=</text:span> (<text:span text:style-name="T12">4.0</text:span> <text:span text:style-name="T6">*</text:span> <text:span text:style-name="T24">math</text:span>.<text:span text:style-name="T1">pi</text:span>) <text:span text:style-name="T6">/</text:span> <text:span text:style-name="T1">self</text:span>.<text:span text:style-name="T1">T_period</text:span> </text:p>
      <text:p text:style-name="P1"><text:span text:style-name="T1">wy</text:span> <text:span text:style-name="T6">=</text:span> (<text:span text:style-name="T12">2.0</text:span> <text:span text:style-name="T6">*</text:span> <text:span text:style-name="T24">math</text:span>.<text:span text:style-name="T1">pi</text:span>) <text:span text:style-name="T6">/</text:span> <text:span text:style-name="T1">self</text:span>.<text:span text:style-name="T1">T_period</text:span></text:p>
      <text:p text:style-name="P1"><text:span text:style-name="T1">wz</text:span> <text:span text:style-name="T6">=</text:span> (<text:span text:style-name="T12">2.0</text:span> <text:span text:style-name="T6">*</text:span> <text:span text:style-name="T24">math</text:span>.<text:span text:style-name="T1">pi</text:span>) <text:span text:style-name="T6">/</text:span> <text:span text:style-name="T1">self</text:span>.<text:span text:style-name="T1">T_period</text:span></text:p>
      <text:p text:style-name="P1"><text:span text:style-name="T1">zc</text:span> <text:span text:style-name="T6">=</text:span> <text:span text:style-name="T6">-</text:span><text:span text:style-name="T12">4.0</text:span></text:p>
      <text:p text:style-name="P1"><text:span text:style-name="T1">xd</text:span> <text:span text:style-name="T6">=</text:span> <text:span text:style-name="T12">3.0</text:span> <text:span text:style-name="T6">*</text:span> <text:span text:style-name="T24">math</text:span>.<text:span text:style-name="T10">sin</text:span>(<text:span text:style-name="T1">wx</text:span> <text:span text:style-name="T6">*</text:span> <text:span text:style-name="T8">t</text:span>)</text:p>
      <text:p text:style-name="P1"><text:span text:style-name="T1">yd</text:span> <text:span text:style-name="T6">=</text:span> <text:span text:style-name="T12">8.0</text:span> <text:span text:style-name="T6">*</text:span> <text:span text:style-name="T24">math</text:span>.<text:span text:style-name="T10">sin</text:span>(<text:span text:style-name="T1">wy</text:span> <text:span text:style-name="T6">*</text:span> <text:span text:style-name="T8">t</text:span>)</text:p>
      <text:p text:style-name="P1"><text:span text:style-name="T1">zd</text:span> <text:span text:style-name="T6">=</text:span> <text:span text:style-name="T12">0.5</text:span> <text:span text:style-name="T6">*</text:span> <text:span text:style-name="T24">math</text:span>.<text:span text:style-name="T10">sin</text:span>(<text:span text:style-name="T1">wz</text:span> <text:span text:style-name="T6">*</text:span> <text:span text:style-name="T8">t</text:span>) <text:span text:style-name="T6">+</text:span> <text:span text:style-name="T1">zc</text:span></text:p>
      <text:p text:style-name="P1"><text:span text:style-name="T1">vxd</text:span> <text:span text:style-name="T6">=</text:span> <text:span text:style-name="T12">3.0</text:span> <text:span text:style-name="T6">*</text:span> <text:span text:style-name="T1">wx</text:span> <text:span text:style-name="T6">*</text:span> <text:span text:style-name="T24">math</text:span>.<text:span text:style-name="T10">cos</text:span>(<text:span text:style-name="T1">wx</text:span> <text:span text:style-name="T6">*</text:span> <text:span text:style-name="T8">t</text:span>)</text:p>
      <text:p text:style-name="P1"><text:span text:style-name="T1">vyd</text:span> <text:span text:style-name="T6">=</text:span> <text:span text:style-name="T12">8.0</text:span> <text:span text:style-name="T6">*</text:span> <text:span text:style-name="T1">wy</text:span> <text:span text:style-name="T6">*</text:span> <text:span text:style-name="T24">math</text:span>.<text:span text:style-name="T10">cos</text:span>(<text:span text:style-name="T1">wy</text:span> <text:span text:style-name="T6">*</text:span> <text:span text:style-name="T8">t</text:span>)</text:p>
      <text:p text:style-name="P1"><text:span text:style-name="T1">vzd</text:span> <text:span text:style-name="T6">=</text:span> <text:span text:style-name="T12">0.5</text:span> <text:span text:style-name="T6">*</text:span> <text:span text:style-name="T1">wz</text:span> <text:span text:style-name="T6">*</text:span> <text:span text:style-name="T24">math</text:span>.<text:span text:style-name="T10">cos</text:span>(<text:span text:style-name="T1">wz</text:span> <text:span text:style-name="T6">*</text:span> <text:span text:style-name="T8">t</text:span>)</text:p>
      <text:p text:style-name="P1"><text:span text:style-name="T1">axd</text:span> <text:span text:style-name="T6">=</text:span> <text:span text:style-name="T6">-</text:span>(<text:span text:style-name="T1">wx</text:span><text:span text:style-name="T6">**</text:span><text:span text:style-name="T12">2</text:span>) <text:span text:style-name="T6">*</text:span> <text:span text:style-name="T1">xd</text:span></text:p>
      <text:p text:style-name="P1"><text:span text:style-name="T1">ayd</text:span> <text:span text:style-name="T6">=</text:span> <text:span text:style-name="T6">-</text:span>(<text:span text:style-name="T1">wy</text:span><text:span text:style-name="T6">**</text:span><text:span text:style-name="T12">2</text:span>) <text:span text:style-name="T6">*</text:span> <text:span text:style-name="T1">yd</text:span></text:p>
      <text:p text:style-name="P1"><text:span text:style-name="T1">azd</text:span> <text:span text:style-name="T6">=</text:span> <text:span text:style-name="T6">-</text:span>(<text:span text:style-name="T1">wz</text:span><text:span text:style-name="T6">**</text:span><text:span text:style-name="T12">2</text:span>) <text:span text:style-name="T6">*</text:span> (<text:span text:style-name="T1">zd</text:span> <text:span text:style-name="T6">-</text:span> <text:span text:style-name="T1">zc</text:span>)</text:p>
      <text:p text:style-name="P1"><text:span text:style-name="T28">return</text:span> (</text:p>
      <text:p text:style-name="P1"><text:span text:style-name="T24">np</text:span>.<text:span text:style-name="T10">array</text:span>([<text:span text:style-name="T1">xd</text:span>, <text:span text:style-name="T1">yd</text:span>, <text:span text:style-name="T1">zd</text:span>], <text:span text:style-name="T8">dtype</text:span><text:span text:style-name="T6">=</text:span><text:span text:style-name="T24">np</text:span>.<text:span text:style-name="T24">float64</text:span>),</text:p>
      <text:p text:style-name="P1"><text:span text:style-name="T24">np</text:span>.<text:span text:style-name="T10">array</text:span>([<text:span text:style-name="T1">vxd</text:span>, <text:span text:style-name="T1">vyd</text:span>, <text:span text:style-name="T1">vzd</text:span>], <text:span text:style-name="T8">dtype</text:span><text:span text:style-name="T6">=</text:span><text:span text:style-name="T24">np</text:span>.<text:span text:style-name="T24">float64</text:span>),</text:p>
      <text:p text:style-name="P1"><text:span text:style-name="T24">np</text:span>.<text:span text:style-name="T10">array</text:span>([<text:span text:style-name="T1">axd</text:span>, <text:span text:style-name="T1">ayd</text:span>, <text:span text:style-name="T1">azd</text:span>], <text:span text:style-name="T8">dtype</text:span><text:span text:style-name="T6">=</text:span><text:span text:style-name="T24">np</text:span>.<text:span text:style-name="T24">float64</text:span>)</text:p>
      <text:p text:style-name="P1">)</text:p>
      <text:p text:style-name="P19"><text:soft-page-break/></text:p>
      <text:p text:style-name="P19"><text:span text:style-name="T19">Optuna was given</text:span> 100 trials <text:span text:style-name="T19">to find the gains in these ranges that minimize this cost. In each, the initial condition was always</text:span></text:p>
      <text:p text:style-name="P9"><text:span text:style-name="T21">FIXED_X</text:span><text:span text:style-name="T2"> </text:span><text:span text:style-name="T7">=</text:span><text:span text:style-name="T2"> </text:span><text:span text:style-name="T13">0.70</text:span></text:p>
      <text:p text:style-name="P1"><text:span text:style-name="T20">FIXED_Y</text:span> <text:span text:style-name="T6">=</text:span> <text:span text:style-name="T6">-</text:span><text:span text:style-name="T12">2.37</text:span></text:p>
      <text:p text:style-name="P1"><text:span text:style-name="T20">TARGET_Z</text:span> <text:span text:style-name="T6">=</text:span> <text:span text:style-name="T6">-</text:span><text:span text:style-name="T12">3.0</text:span></text:p>
      <text:p text:style-name="P1"/>
      <text:p text:style-name="Standard">where the <text:span text:style-name="T19">z-value is chosen by letting the quad copter first ascend to that altitude (negative z is up) before activating the controller. Th</text:span><text:span text:style-name="T22">e x-y portion of the</text:span><text:span text:style-name="T19"> initial </text:span><text:span text:style-name="T22">condition</text:span><text:span text:style-name="T19"> was randomly selected (once at the beginning, not every flight) from a 5 by 5 meter square centered at the origin. </text:span>If the quadcopter violates <text:span text:style-name="T19">a</text:span> defined spatial safety boundar<text:span text:style-name="T19">y</text:span> at some time t_fail before reaching t_<text:span text:style-name="T19">f</text:span>, the integration stops and a massive scalar penalty is added to whatever cost has accumulated up to that point:</text:p>
      <text:p text:style-name="Standard">J_fail=J(t_fail)+w_fail(t_<text:span text:style-name="T19">f</text:span>−t_fai<text:span text:style-name="T19">l)^2</text:span></text:p>
      <text:p text:style-name="Standard"/>
      <text:p text:style-name="P12">where w_fail = 1000.</text:p>
      <text:p text:style-name="P12"/>
      <text:p text:style-name="P13">PHASE 2</text:p>
      <text:p text:style-name="P16">With the same initial condition and using the initial condition function from my 1.2.0 ResNet library, </text:p>
      <text:p text:style-name="P13"/>
      <text:p text:style-name="P13">As of June 16, I ran both ResNet controllers with the search spaces:</text:p>
      <text:p text:style-name="P13"/>
      <text:p text:style-name="P3"><text:span text:style-name="T1">param_dict</text:span>[<text:span text:style-name="T3">'gamma'</text:span>] <text:span text:style-name="T6">=</text:span> <text:span text:style-name="T24">float</text:span>(<text:span text:style-name="T8">trial</text:span>.<text:span text:style-name="T10">suggest_float</text:span>(<text:span text:style-name="T3">"gamma"</text:span>, <text:span text:style-name="T12">0.5</text:span>, <text:span text:style-name="T12">50.0</text:span>))</text:p>
      <text:p text:style-name="P1"><text:span text:style-name="T1">param_dict</text:span>[<text:span text:style-name="T3">'sigma_mod'</text:span>] <text:span text:style-name="T6">=</text:span> <text:span text:style-name="T24">float</text:span>(<text:span text:style-name="T8">trial</text:span>.<text:span text:style-name="T10">suggest_float</text:span>(<text:span text:style-name="T3">"sigma_mod"</text:span>, <text:span text:style-name="T12">0.001</text:span>, <text:span text:style-name="T12">1.0</text:span>, <text:span text:style-name="T8">log</text:span><text:span text:style-name="T6">=</text:span><text:span text:style-name="T18">True</text:span>))</text:p>
      <text:p text:style-name="P1"><text:span text:style-name="T1">k_0</text:span> <text:span text:style-name="T6">=</text:span> <text:span text:style-name="T8">trial</text:span>.<text:span text:style-name="T10">suggest_categorical</text:span>(<text:span text:style-name="T3">"k_0"</text:span>, [<text:span text:style-name="T12">1</text:span>, <text:span text:style-name="T12">2</text:span>, <text:span text:style-name="T12">4</text:span>, <text:span text:style-name="T12">8</text:span>])</text:p>
      <text:p text:style-name="P1"><text:span text:style-name="T1">k_i</text:span> <text:span text:style-name="T6">=</text:span> <text:span text:style-name="T8">trial</text:span>.<text:span text:style-name="T10">suggest_categorical</text:span>(<text:span text:style-name="T3">"k_i"</text:span>, [<text:span text:style-name="T12">1</text:span>, <text:span text:style-name="T12">2</text:span>, <text:span text:style-name="T12">4</text:span>, <text:span text:style-name="T12">8</text:span>])</text:p>
      <text:p text:style-name="P1"><text:span text:style-name="T1">theta_bar_scale</text:span> <text:span text:style-name="T6">=</text:span> <text:span text:style-name="T8">trial</text:span>.<text:span text:style-name="T10">suggest_float</text:span>(<text:span text:style-name="T3">"theta_bar_scale"</text:span>, <text:span text:style-name="T12">0.001</text:span>, <text:span text:style-name="T12">1.0</text:span>, <text:span text:style-name="T8">log</text:span><text:span text:style-name="T6">=</text:span><text:span text:style-name="T18">True</text:span>)</text:p>
      <text:p text:style-name="P1"><text:span text:style-name="T1">b</text:span> <text:span text:style-name="T6">=</text:span> <text:span text:style-name="T12">1</text:span></text:p>
      <text:p text:style-name="P1"><text:span text:style-name="T1">hidden_width</text:span> <text:span text:style-name="T6">=</text:span> <text:span text:style-name="T12">16</text:span></text:p>
      <text:p text:style-name="P1"/>
      <text:p text:style-name="Standard">I have generated database using the <text:span text:style-name="T23">above</text:span> gains. <text:span text:style-name="T23">Each were run 100 times.</text:span></text:p>
      <text:p text:style-name="Standard"/>
      <text:p text:style-name="P14">For developed (ResNet inside the integral), the best cost was 107.5518 with gamma = 22.3669, sigma_mod = 0.76541, k_0 = 2, k_i =2, theta_bar_scale: 0.00132766</text:p>
      <text:p text:style-name="P14"/>
      <text:p text:style-name="P14">For the baseline (ResNet outside the integral), the best cost was 137.9704 with gamma = 37.66, sigma_m<text:span text:style-name="T25">o</text:span>d = 0.001197, k_0 = 1, k_i =8, theta_bar: 1337.21 (Scale: 0.5749)</text:p>
      <text:p text:style-name="P14"/>
      <text:p text:style-name="P18">PHASE 1 (TAKE 2)</text:p>
      <text:p text:style-name="P18">On June 17, I ran 501 trials of Phase 1 again from scratch. The best ITAE cost was 160.8355 and the best parameters were</text:p>
      <text:p text:style-name="P18">Best Params: {'k1': 1.9998108856232995, 'k2': 0.6529643057605065, 'k3': 0.7406820227437091, 'k_rise': 0.003695960415369938}</text:p>
      <text:p text:style-name="P18">k1=2, k2=0.65, k3=0.74,k_rise=0.0037.</text:p>
      <text:p text:style-name="P18"/>
      <text:p text:style-name="P20"><text:span text:style-name="T35">I changed the desired trajectory </text:span>to something more interesting. I am now running 1000 trials (which stop early if the cost hasn’t improved in 100 trials). <text:span text:style-name="T29">I also remove</text:span><text:span text:style-name="T30">d</text:span><text:span text:style-name="T29"> the symmetr</text:span><text:span text:style-name="T30">y </text:span><text:span text:style-name="T29">from k_2 and k_3.</text:span></text:p>
      <text:p text:style-name="P20"><text:soft-page-break/></text:p>
      <text:p text:style-name="P21">PHASE 1 (TAKE 3)</text:p>
      <text:p text:style-name="P21">It converged at trial 204. Best cost was trial 102 with value: 143.9321 and parameters: {'k1': 3.3262179738426725, 'k2': 0.2918707785937102, 'k3': 0.432471391222489, 'k_rise': 0.0496335953575354}. RMS Tracking error was .5834</text:p>
      <text:p text:style-name="P21"/>
      <text:p text:style-name="P5"><text:span text:style-name="T1">param_dict</text:span>[<text:span text:style-name="T3">'k1'</text:span>] <text:span text:style-name="T6">=</text:span> <text:span text:style-name="T8">trial</text:span>.<text:span text:style-name="T10">suggest_float</text:span>(<text:span text:style-name="T3">"k1"</text:span>, <text:span text:style-name="T12">1.0</text:span>, <text:span text:style-name="T12">8.0</text:span>)</text:p>
      <text:p text:style-name="P1"><text:span text:style-name="T1">param_dict</text:span>[<text:span text:style-name="T3">'k2'</text:span>] <text:span text:style-name="T6">=</text:span> <text:span text:style-name="T8">trial</text:span>.<text:span text:style-name="T10">suggest_float</text:span>(<text:span text:style-name="T3">"k2"</text:span>, <text:span text:style-name="T12">0.1</text:span>, <text:span text:style-name="T12">5.0</text:span>)</text:p>
      <text:p text:style-name="P1"><text:span text:style-name="T1">param_dict</text:span>[<text:span text:style-name="T3">'k3'</text:span>] <text:span text:style-name="T6">=</text:span> <text:span text:style-name="T8">trial</text:span>.<text:span text:style-name="T10">suggest_float</text:span>(<text:span text:style-name="T3">"k3"</text:span>, <text:span text:style-name="T1">param_dict</text:span>[<text:span text:style-name="T3">'k2'</text:span>], <text:span text:style-name="T12">5.0</text:span>) <text:span text:style-name="T31"># BREAK SYMMETRY: Force k3's lower bound to be k2</text:span></text:p>
      <text:p text:style-name="P1"><text:span text:style-name="T1">param_dict</text:span>[<text:span text:style-name="T3">'k_rise'</text:span>] <text:span text:style-name="T6">=</text:span> <text:span text:style-name="T8">trial</text:span>.<text:span text:style-name="T10">suggest_float</text:span>(<text:span text:style-name="T3">"k_rise"</text:span>, <text:span text:style-name="T12">0.0001</text:span>, <text:span text:style-name="T12">0.05</text:span>, <text:span text:style-name="T8">log</text:span><text:span text:style-name="T6">=</text:span><text:span text:style-name="T18">True</text:span>)</text:p>
      <text:p text:style-name="P21"/>
      <text:p text:style-name="P21"/>
      <text:p text:style-name="P22">Unfortunately k_rise was quite close to the limit so we have to rerun.</text:p>
      <text:p text:style-name="P21"/>
      <text:p text:style-name="P22">PHASE <text:span text:style-name="T32">1 (TAKE 4)</text:span></text:p>
      <text:p text:style-name="P6"><text:span text:style-name="T1">param_dict</text:span>[<text:span text:style-name="T3">'k1'</text:span>] <text:span text:style-name="T6">=</text:span> <text:span text:style-name="T8">trial</text:span>.<text:span text:style-name="T10">suggest_float</text:span>(<text:span text:style-name="T3">"k1"</text:span>, <text:span text:style-name="T12">1.0</text:span>, <text:span text:style-name="T12">8.0</text:span>)</text:p>
      <text:p text:style-name="P1"><text:span text:style-name="T1">param_dict</text:span>[<text:span text:style-name="T3">'k2'</text:span>] <text:span text:style-name="T6">=</text:span> <text:span text:style-name="T8">trial</text:span>.<text:span text:style-name="T10">suggest_float</text:span>(<text:span text:style-name="T3">"k2"</text:span>, <text:span text:style-name="T12">0.1</text:span>, <text:span text:style-name="T12">1.0</text:span>)</text:p>
      <text:p text:style-name="P1"><text:span text:style-name="T1">param_dict</text:span>[<text:span text:style-name="T3">'k3'</text:span>] <text:span text:style-name="T6">=</text:span> <text:span text:style-name="T8">trial</text:span>.<text:span text:style-name="T10">suggest_float</text:span>(<text:span text:style-name="T3">"k3"</text:span>, <text:span text:style-name="T1">param_dict</text:span>[<text:span text:style-name="T3">'k2'</text:span>], <text:span text:style-name="T12">1.0</text:span>) <text:span text:style-name="T31"># BREAK SYMMETRY: Force k3's lower bound to be k2</text:span></text:p>
      <text:p text:style-name="P1"><text:span text:style-name="T1">param_dict</text:span>[<text:span text:style-name="T3">'k_rise'</text:span>] <text:span text:style-name="T6">=</text:span> <text:span text:style-name="T8">trial</text:span>.<text:span text:style-name="T10">suggest_float</text:span>(<text:span text:style-name="T3">"k_rise"</text:span>, <text:span text:style-name="T12">0.001</text:span>, <text:span text:style-name="T12">10.0</text:span>, <text:span text:style-name="T8">log</text:span><text:span text:style-name="T6">=</text:span><text:span text:style-name="T18">True</text:span>)</text:p>
      <text:p text:style-name="P1"/>
      <text:p text:style-name="P15">========================================</text:p>
      <text:p text:style-name="P15">🏆 ABSOLUTE BEST TRIAL 🏆</text:p>
      <text:p text:style-name="P15">========================================</text:p>
      <text:p text:style-name="P15">Trial Number : 479</text:p>
      <text:p text:style-name="P15">ITAE Cost <text:s text:c="3"/>: 45.3812</text:p>
      <text:p text:style-name="P15">Parameters <text:s text:c="2"/>:</text:p>
      <text:p text:style-name="P15"><text:s text:c="4"/>k1: 1.0023023754462224</text:p>
      <text:p text:style-name="P15"><text:s text:c="4"/>k2: 0.47303088708289664</text:p>
      <text:p text:style-name="P15"><text:s text:c="4"/>k3: 0.4876260355061123</text:p>
      <text:p text:style-name="P15"><text:s text:c="4"/>k_rise: 0.08491915751268746</text:p>
      <text:p text:style-name="P15"/>
      <text:p text:style-name="P15">=================================================================</text:p>
      <text:p text:style-name="P15">Rank <text:s text:c="2"/>| Trial <text:s text:c="2"/>| Cost <text:s text:c="5"/>| k1 <text:s text:c="5"/>| k2 <text:s text:c="5"/>| k3 <text:s text:c="5"/>| k_rise <text:s text:c="2"/></text:p>
      <text:p text:style-name="P15">-----------------------------------------------------------------</text:p>
      <text:p text:style-name="P15">1 <text:s text:c="5"/>| 479 <text:s text:c="4"/>| 45.4 <text:s text:c="5"/>| 1 <text:s text:c="6"/>| 0.473 <text:s text:c="2"/>| 0.488 <text:s text:c="2"/>| 0.0849 <text:s text:c="2"/></text:p>
      <text:p text:style-name="P15">2 <text:s text:c="5"/>| 553 <text:s text:c="4"/>| 45.5 <text:s text:c="5"/>| 1.01 <text:s text:c="3"/>| 0.474 <text:s text:c="2"/>| 0.488 <text:s text:c="2"/>| 0.0957 <text:s text:c="2"/></text:p>
      <text:p text:style-name="P15">3 <text:s text:c="5"/>| 540 <text:s text:c="4"/>| 45.5 <text:s text:c="5"/>| 1 <text:s text:c="6"/>| 0.471 <text:s text:c="2"/>| 0.485 <text:s text:c="2"/>| 0.116 <text:s text:c="3"/></text:p>
      <text:p text:style-name="P15">4 <text:s text:c="5"/>| 403 <text:s text:c="4"/>| 45.6 <text:s text:c="5"/>| 1.01 <text:s text:c="3"/>| 0.468 <text:s text:c="2"/>| 0.487 <text:s text:c="2"/>| 0.109 <text:s text:c="3"/></text:p>
      <text:p text:style-name="P15">5 <text:s text:c="5"/>| 411 <text:s text:c="4"/>| 45.7 <text:s text:c="5"/>| 1 <text:s text:c="6"/>| 0.472 <text:s text:c="2"/>| 0.489 <text:s text:c="2"/>| 0.111 <text:s text:c="3"/></text:p>
      <text:p text:style-name="P15">6 <text:s text:c="5"/>| 400 <text:s text:c="4"/>| 45.7 <text:s text:c="5"/>| 1.01 <text:s text:c="3"/>| 0.467 <text:s text:c="2"/>| 0.484 <text:s text:c="2"/>| 0.112 <text:s text:c="3"/></text:p>
      <text:p text:style-name="P15">7 <text:s text:c="5"/>| 549 <text:s text:c="4"/>| 45.8 <text:s text:c="5"/>| 1 <text:s text:c="6"/>| 0.481 <text:s text:c="2"/>| 0.494 <text:s text:c="2"/>| 0.0955 <text:s text:c="2"/></text:p>
      <text:p text:style-name="P15">8 <text:s text:c="5"/>| 424 <text:s text:c="4"/>| 45.8 <text:s text:c="5"/>| 1.01 <text:s text:c="3"/>| 0.483 <text:s text:c="2"/>| 0.513 <text:s text:c="2"/>| 0.103 <text:s text:c="3"/></text:p>
      <text:p text:style-name="P15">9 <text:s text:c="5"/>| 634 <text:s text:c="4"/>| 45.8 <text:s text:c="5"/>| 1.01 <text:s text:c="3"/>| 0.51 <text:s text:c="3"/>| 0.519 <text:s text:c="2"/>| 0.0801 <text:s text:c="2"/></text:p>
      <text:p text:style-name="P15">10 <text:s text:c="4"/>| 409 <text:s text:c="4"/>| 45.9 <text:s text:c="5"/>| 1 <text:s text:c="6"/>| 0.475 <text:s text:c="2"/>| 0.489 <text:s text:c="2"/>| 0.114 <text:s text:c="3"/></text:p>
      <text:p text:style-name="P15">11 <text:s text:c="4"/>| 407 <text:s text:c="4"/>| 46 <text:s text:c="7"/>| 1 <text:s text:c="6"/>| 0.473 <text:s text:c="2"/>| 0.489 <text:s text:c="2"/>| 0.115 <text:s text:c="3"/></text:p>
      <text:p text:style-name="P15">12 <text:s text:c="4"/>| 467 <text:s text:c="4"/>| 46.1 <text:s text:c="5"/>| 1.01 <text:s text:c="3"/>| 0.46 <text:s text:c="3"/>| 0.475 <text:s text:c="2"/>| 0.101 <text:s text:c="3"/></text:p>
      <text:p text:style-name="P15"><text:soft-page-break/>13 <text:s text:c="4"/>| 438 <text:s text:c="4"/>| 46.1 <text:s text:c="5"/>| 1 <text:s text:c="6"/>| 0.466 <text:s text:c="2"/>| 0.48 <text:s text:c="3"/>| 0.0924 <text:s text:c="2"/></text:p>
      <text:p text:style-name="P15">14 <text:s text:c="4"/>| 401 <text:s text:c="4"/>| 46.1 <text:s text:c="5"/>| 1.03 <text:s text:c="3"/>| 0.465 <text:s text:c="2"/>| 0.482 <text:s text:c="2"/>| 0.115 <text:s text:c="3"/></text:p>
      <text:p text:style-name="P15">15 <text:s text:c="4"/>| 574 <text:s text:c="4"/>| 46.1 <text:s text:c="5"/>| 1 <text:s text:c="6"/>| 0.472 <text:s text:c="2"/>| 0.49 <text:s text:c="3"/>| 0.096 <text:s text:c="3"/></text:p>
      <text:p text:style-name="P15">=================================================================</text:p>
      <text:p text:style-name="P15"/>
      <text:p text:style-name="P24">It ran for 679 trials. <text:span text:style-name="T33">1000 limited. Stops after 200 if best one doesn’t improve.</text:span></text:p>
      <text:p text:style-name="P24"/>
      <text:p text:style-name="P23">PHASE <text:span text:style-name="T32">1 (TAKE </text:span><text:span text:style-name="T34">5</text:span><text:span text:style-name="T32">)</text:span></text:p>
      <text:p text:style-name="P25">Changing to 500 trials limit. Stop after <text:span text:style-name="T36">50</text:span></text:p>
      <text:p text:style-name="P26">New search space is</text:p>
      <text:p text:style-name="P26"/>
      <text:p text:style-name="P7"><text:span text:style-name="T1">param_dict</text:span>[<text:span text:style-name="T3">'k1'</text:span>] <text:span text:style-name="T6">=</text:span> <text:span text:style-name="T8">trial</text:span>.<text:span text:style-name="T10">suggest_float</text:span>(<text:span text:style-name="T3">"k1"</text:span>, <text:span text:style-name="T12">0.1</text:span>, <text:span text:style-name="T12">3.0</text:span>)</text:p>
      <text:p text:style-name="P1"><text:span text:style-name="T1">param_dict</text:span>[<text:span text:style-name="T3">'k2'</text:span>] <text:span text:style-name="T6">=</text:span> <text:span text:style-name="T8">trial</text:span>.<text:span text:style-name="T10">suggest_float</text:span>(<text:span text:style-name="T3">"k2"</text:span>, <text:span text:style-name="T12">0.1</text:span>, <text:span text:style-name="T12">2.0</text:span>)</text:p>
      <text:p text:style-name="P1"><text:span text:style-name="T1">param_dict</text:span>[<text:span text:style-name="T3">'k3'</text:span>] <text:span text:style-name="T6">=</text:span> <text:span text:style-name="T8">trial</text:span>.<text:span text:style-name="T10">suggest_float</text:span>(<text:span text:style-name="T3">"k3"</text:span>, <text:span text:style-name="T1">param_dict</text:span>[<text:span text:style-name="T3">'k2'</text:span>], <text:span text:style-name="T12">2.0</text:span>) <text:span text:style-name="T31"># BREAK SYMMETRY: Force k3's lower bound to be k2</text:span></text:p>
      <text:p text:style-name="P1"><text:span text:style-name="T1">param_dict</text:span>[<text:span text:style-name="T3">'k_rise'</text:span>] <text:span text:style-name="T6">=</text:span> <text:span text:style-name="T8">trial</text:span>.<text:span text:style-name="T10">suggest_float</text:span>(<text:span text:style-name="T3">"k_rise"</text:span>, <text:span text:style-name="T12">0.01</text:span>, <text:span text:style-name="T12">10.0</text:span>, <text:span text:style-name="T8">log</text:span><text:span text:style-name="T6">=</text:span><text:span text:style-name="T18">True</text:span>)</text:p>
      <text:p text:style-name="P1"/>
      <text:p text:style-name="P1">max@MAX-MINT ~/voxl-px4-sitl % python3 get_best_results.py <text:s/></text:p>
      <text:p text:style-name="P1">[*] Loading study 'phase1_noresnet_baseline_tuning' from sqlite:///phase1_tuning.db...</text:p>
      <text:p text:style-name="P1"/>
      <text:p text:style-name="Standard">========================================</text:p>
      <text:p text:style-name="Standard">🏆 ABSOLUTE BEST TRIAL 🏆</text:p>
      <text:p text:style-name="Standard">========================================</text:p>
      <text:p text:style-name="Standard">Trial Number : 185</text:p>
      <text:p text:style-name="Standard">ITAE Cost <text:s text:c="3"/>: 30.8519</text:p>
      <text:p text:style-name="Standard">Parameters <text:s text:c="2"/>:</text:p>
      <text:p text:style-name="Standard"><text:s text:c="4"/>k1: 0.10913267859628516</text:p>
      <text:p text:style-name="Standard"><text:s text:c="4"/>k2: 0.13761499548551756</text:p>
      <text:p text:style-name="Standard"><text:s text:c="4"/>k3: 1.4336390819140765</text:p>
      <text:p text:style-name="Standard"><text:s text:c="4"/>k_rise: 0.1396532575197369</text:p>
      <text:p text:style-name="Standard"/>
      <text:p text:style-name="Standard">=================================================================</text:p>
      <text:p text:style-name="Standard">Rank <text:s text:c="2"/>| Trial <text:s text:c="2"/>| Cost <text:s text:c="5"/>| k1 <text:s text:c="5"/>| k2 <text:s text:c="5"/>| k3 <text:s text:c="5"/>| k_rise <text:s text:c="2"/></text:p>
      <text:p text:style-name="Standard">-----------------------------------------------------------------</text:p>
      <text:p text:style-name="Standard">1 <text:s text:c="5"/>| 185 <text:s text:c="4"/>| 30.9 <text:s text:c="5"/>| 0.109 <text:s text:c="2"/>| 0.138 <text:s text:c="2"/>| 1.43 <text:s text:c="3"/>| 0.14 <text:s text:c="4"/></text:p>
      <text:p text:style-name="Standard">2 <text:s text:c="5"/>| 114 <text:s text:c="4"/>| 30.9 <text:s text:c="5"/>| 0.108 <text:s text:c="2"/>| 0.239 <text:s text:c="2"/>| 1.35 <text:s text:c="3"/>| 0.143 <text:s text:c="3"/></text:p>
      <text:p text:style-name="Standard">3 <text:s text:c="5"/>| 182 <text:s text:c="4"/>| 31.7 <text:s text:c="5"/>| 0.153 <text:s text:c="2"/>| 0.167 <text:s text:c="2"/>| 1.43 <text:s text:c="3"/>| 0.139 <text:s text:c="3"/></text:p>
      <text:p text:style-name="Standard">4 <text:s text:c="5"/>| 215 <text:s text:c="4"/>| 31.7 <text:s text:c="5"/>| 0.109 <text:s text:c="2"/>| 0.169 <text:s text:c="2"/>| 1.39 <text:s text:c="3"/>| 0.152 <text:s text:c="3"/></text:p>
      <text:p text:style-name="Standard">5 <text:s text:c="5"/>| 142 <text:s text:c="4"/>| 31.7 <text:s text:c="5"/>| 0.152 <text:s text:c="2"/>| 0.176 <text:s text:c="2"/>| 1.41 <text:s text:c="3"/>| 0.193 <text:s text:c="3"/></text:p>
      <text:p text:style-name="Standard">6 <text:s text:c="5"/>| 186 <text:s text:c="4"/>| 31.8 <text:s text:c="5"/>| 0.1 <text:s text:c="4"/>| 0.133 <text:s text:c="2"/>| 1.5 <text:s text:c="4"/>| 0.132 <text:s text:c="3"/></text:p>
      <text:p text:style-name="Standard">7 <text:s text:c="5"/>| 146 <text:s text:c="4"/>| 31.8 <text:s text:c="5"/>| 0.137 <text:s text:c="2"/>| 0.144 <text:s text:c="2"/>| 1.38 <text:s text:c="3"/>| 0.135 <text:s text:c="3"/></text:p>
      <text:p text:style-name="Standard">8 <text:s text:c="5"/>| 164 <text:s text:c="4"/>| 31.9 <text:s text:c="5"/>| 0.144 <text:s text:c="2"/>| 0.213 <text:s text:c="2"/>| 1.43 <text:s text:c="3"/>| 0.213 <text:s text:c="3"/></text:p>
      <text:p text:style-name="Standard">9 <text:s text:c="5"/>| 235 <text:s text:c="4"/>| 32 <text:s text:c="7"/>| 0.159 <text:s text:c="2"/>| 0.135 <text:s text:c="2"/>| 1.49 <text:s text:c="3"/>| 0.171 <text:s text:c="3"/></text:p>
      <text:p text:style-name="Standard">10 <text:s text:c="4"/>| 222 <text:s text:c="4"/>| 32.1 <text:s text:c="5"/>| 0.193 <text:s text:c="2"/>| 0.131 <text:s text:c="2"/>| 1.49 <text:s text:c="3"/>| 0.211 <text:s text:c="3"/></text:p>
      <text:p text:style-name="Standard">11 <text:s text:c="4"/>| 233 <text:s text:c="4"/>| 32.2 <text:s text:c="5"/>| 0.1 <text:s text:c="4"/>| 0.217 <text:s text:c="2"/>| 1.42 <text:s text:c="3"/>| 0.176 <text:s text:c="3"/></text:p>
      <text:p text:style-name="Standard">12 <text:s text:c="4"/>| 196 <text:s text:c="4"/>| 32.2 <text:s text:c="5"/>| 0.109 <text:s text:c="2"/>| 0.158 <text:s text:c="2"/>| 1.45 <text:s text:c="3"/>| 0.198 <text:s text:c="3"/></text:p>
      <text:p text:style-name="Standard">13 <text:s text:c="4"/>| 204 <text:s text:c="4"/>| 32.3 <text:s text:c="5"/>| 0.148 <text:s text:c="2"/>| 0.13 <text:s text:c="3"/>| 1.38 <text:s text:c="3"/>| 0.122 <text:s text:c="3"/></text:p>
      <text:p text:style-name="Standard">14 <text:s text:c="4"/>| 227 <text:s text:c="4"/>| 32.3 <text:s text:c="5"/>| 0.103 <text:s text:c="2"/>| 0.166 <text:s text:c="2"/>| 1.48 <text:s text:c="3"/>| 0.145 <text:s text:c="3"/></text:p>
      <text:p text:style-name="Standard"><text:soft-page-break/>15 <text:s text:c="4"/>| 203 <text:s text:c="4"/>| 32.4 <text:s text:c="5"/>| 0.103 <text:s text:c="2"/>| 0.138 <text:s text:c="2"/>| 1.38 <text:s text:c="3"/>| 0.119 <text:s text:c="3"/></text:p>
      <text:p text:style-name="Standard">=================================================================</text:p>
      <text:p text:style-name="P26"/>
      <text:p text:style-name="P27">PHASE 1 (Take 6)</text:p>
      <text:p text:style-name="P27"/>
      <text:p text:style-name="P28">I shortened to 500 trials with a cutoff of 50. It finished in 206 trials.</text:p>
      <text:p text:style-name="P27"/>
      <text:p text:style-name="P27">param_dict['k1'] = trial.suggest_float("k1", 0.0<text:span text:style-name="T38">0</text:span>1, 2.0, log=True)</text:p>
      <text:p text:style-name="P27">param_dict['k2'] = trial.suggest_float("k2", 0.0<text:span text:style-name="T38">0</text:span>1, <text:span text:style-name="T37">5</text:span>.0, log=True)</text:p>
      <text:p text:style-name="P27">param_dict['k3'] = trial.suggest_float("k3", param_dict['k2'], <text:span text:style-name="T37">5</text:span>.0) </text:p>
      <text:p text:style-name="P27">param_dict['k_rise'] = trial.suggest_float("k_rise", 0.01, <text:span text:style-name="T39">2</text:span>.0, log=True)</text:p>
      <text:p text:style-name="P27"/>
      <text:p text:style-name="P27">=================================================================</text:p>
      <text:p text:style-name="P27">Rank <text:s text:c="2"/>| Trial <text:s text:c="2"/>| Cost <text:s text:c="5"/>| k1 <text:s text:c="5"/>| k2 <text:s text:c="5"/>| k3 <text:s text:c="5"/>| k_rise <text:s text:c="2"/></text:p>
      <text:p text:style-name="P27">-----------------------------------------------------------------</text:p>
      <text:p text:style-name="P27">1 <text:s text:c="5"/>| 156 <text:s text:c="4"/>| 31.4 <text:s text:c="5"/>| 0.0906 <text:s/>| 0.15 <text:s text:c="3"/>| 1.42 <text:s text:c="3"/>| 0.141 <text:s text:c="3"/></text:p>
      <text:p text:style-name="P27">2 <text:s text:c="5"/>| 179 <text:s text:c="4"/>| 31.5 <text:s text:c="5"/>| 0.125 <text:s text:c="2"/>| 0.0763 <text:s/>| 1.53 <text:s text:c="3"/>| 0.145 <text:s text:c="3"/></text:p>
      <text:p text:style-name="P27">3 <text:s text:c="5"/>| 177 <text:s text:c="4"/>| 31.6 <text:s text:c="5"/>| 0.135 <text:s text:c="2"/>| 0.0942 <text:s/>| 1.37 <text:s text:c="3"/>| 0.152 <text:s text:c="3"/></text:p>
      <text:p text:style-name="P27">4 <text:s text:c="5"/>| 155 <text:s text:c="4"/>| 31.6 <text:s text:c="5"/>| 0.11 <text:s text:c="3"/>| 0.165 <text:s text:c="2"/>| 1.33 <text:s text:c="3"/>| 0.172 <text:s text:c="3"/></text:p>
      <text:p text:style-name="P27">5 <text:s text:c="5"/>| 185 <text:s text:c="4"/>| 31.9 <text:s text:c="5"/>| 0.162 <text:s text:c="2"/>| 0.0494 <text:s/>| 1.52 <text:s text:c="3"/>| 0.14 <text:s text:c="4"/></text:p>
      <text:p text:style-name="P27">6 <text:s text:c="5"/>| 165 <text:s text:c="4"/>| 32.1 <text:s text:c="5"/>| 0.126 <text:s text:c="2"/>| 0.215 <text:s text:c="2"/>| 1.46 <text:s text:c="3"/>| 0.188 <text:s text:c="3"/></text:p>
      <text:p text:style-name="P27">7 <text:s text:c="5"/>| 205 <text:s text:c="4"/>| 32.2 <text:s text:c="5"/>| 0.13 <text:s text:c="3"/>| 0.0415 <text:s/>| 1.61 <text:s text:c="3"/>| 0.156 <text:s text:c="3"/></text:p>
      <text:p text:style-name="P27">8 <text:s text:c="5"/>| 110 <text:s text:c="4"/>| 32.3 <text:s text:c="5"/>| 0.108 <text:s text:c="2"/>| 0.182 <text:s text:c="2"/>| 1.44 <text:s text:c="3"/>| 0.182 <text:s text:c="3"/></text:p>
      <text:p text:style-name="P27">9 <text:s text:c="5"/>| 206 <text:s text:c="4"/>| 32.3 <text:s text:c="5"/>| 0.0956 <text:s/>| 0.0386 <text:s/>| 1.38 <text:s text:c="3"/>| 0.148 <text:s text:c="3"/></text:p>
      <text:p text:style-name="P27">10 <text:s text:c="4"/>| 113 <text:s text:c="4"/>| 32.3 <text:s text:c="5"/>| 0.231 <text:s text:c="2"/>| 0.00822 | 1.39 <text:s text:c="3"/>| 0.183 <text:s text:c="3"/></text:p>
      <text:p text:style-name="P27">11 <text:s text:c="4"/>| 176 <text:s text:c="4"/>| 32.5 <text:s text:c="5"/>| 0.14 <text:s text:c="3"/>| 0.134 <text:s text:c="2"/>| 1.34 <text:s text:c="3"/>| 0.189 <text:s text:c="3"/></text:p>
      <text:p text:style-name="P27">12 <text:s text:c="4"/>| 180 <text:s text:c="4"/>| 32.6 <text:s text:c="5"/>| 0.134 <text:s text:c="2"/>| 0.0706 <text:s/>| 1.64 <text:s text:c="3"/>| 0.135 <text:s text:c="3"/></text:p>
      <text:p text:style-name="P27">13 <text:s text:c="4"/>| 203 <text:s text:c="4"/>| 32.6 <text:s text:c="5"/>| 0.126 <text:s text:c="2"/>| 0.0374 <text:s/>| 1.5 <text:s text:c="4"/>| 0.175 <text:s text:c="3"/></text:p>
      <text:p text:style-name="P27">14 <text:s text:c="4"/>| 181 <text:s text:c="4"/>| 32.6 <text:s text:c="5"/>| 0.137 <text:s text:c="2"/>| 0.0503 <text:s/>| 1.62 <text:s text:c="3"/>| 0.144 <text:s text:c="3"/></text:p>
      <text:p text:style-name="P27">15 <text:s text:c="4"/>| 178 <text:s text:c="4"/>| 32.6 <text:s text:c="5"/>| 0.135 <text:s text:c="2"/>| 0.138 <text:s text:c="2"/>| 1.48 <text:s text:c="3"/>| 0.154 <text:s text:c="3"/></text:p>
      <text:p text:style-name="P27">=================================================================</text:p>
      <text:p text:style-name="P27"/>
      <text:p text:style-name="P28">Select. <text:s/>K_1 = 0.09, k2= 0.15, k3= 1.4, k_Rise=0.14</text:p>
      <text:p text:style-name="P28"/>
      <text:p text:style-name="P29">PHASE 2 (Take 2)</text:p>
      <text:p text:style-name="P29"/>
      <text:p text:style-name="P29">max@MAX-MINT ~/voxl-px4-sitl % python3 get_best_results.py developed</text:p>
      <text:p text:style-name="P29">[*] Loading study 'phase2_developed_optimization' from sqlite:///phase2_developed.db...</text:p>
      <text:p text:style-name="P29"/>
      <text:p text:style-name="P29">========================================</text:p>
      <text:p text:style-name="P29">🏆 BEST TRIAL 🏆</text:p>
      <text:p text:style-name="P29">========================================</text:p>
      <text:p text:style-name="P29">Trial Number : 86</text:p>
      <text:p text:style-name="P29">ITAE Cost <text:s text:c="3"/>: 161.1521</text:p>
      <text:p text:style-name="P29">Parameters <text:s text:c="2"/>:</text:p>
      <text:p text:style-name="P29"><text:s text:c="4"/>hidden_width: 16</text:p>
      <text:p text:style-name="P29"><text:s text:c="4"/>gamma: 23.780655567965937</text:p>
      <text:p text:style-name="P29"><text:s text:c="4"/>sigma_mod: 2.0029218323002667</text:p>
      <text:p text:style-name="P29"/>
      <text:p text:style-name="P29"><text:soft-page-break/>=====================================================================</text:p>
      <text:p text:style-name="P29">Rank <text:s text:c="2"/>| Trial <text:s text:c="2"/>| Cost <text:s text:c="5"/>| hidden_width | gamma <text:s text:c="5"/>| sigma_mod </text:p>
      <text:p text:style-name="P29">---------------------------------------------------------------------</text:p>
      <text:p text:style-name="P29">1 <text:s text:c="5"/>| 86 <text:s text:c="5"/>| 161 <text:s text:c="6"/>| 16 <text:s text:c="8"/>| 23.8 <text:s text:c="6"/>| 2 <text:s text:c="8"/></text:p>
      <text:p text:style-name="P29">2 <text:s text:c="5"/>| 133 <text:s text:c="4"/>| 173 <text:s text:c="6"/>| 16 <text:s text:c="8"/>| 15.2 <text:s text:c="6"/>| 3.18 <text:s text:c="5"/></text:p>
      <text:p text:style-name="P29">3 <text:s text:c="5"/>| 129 <text:s text:c="4"/>| 185 <text:s text:c="6"/>| 16 <text:s text:c="8"/>| 16.9 <text:s text:c="6"/>| 3.06 <text:s text:c="5"/></text:p>
      <text:p text:style-name="P29">4 <text:s text:c="5"/>| 73 <text:s text:c="5"/>| 186 <text:s text:c="6"/>| 16 <text:s text:c="8"/>| 16.9 <text:s text:c="6"/>| 2.69 <text:s text:c="5"/></text:p>
      <text:p text:style-name="P29">5 <text:s text:c="5"/>| 142 <text:s text:c="4"/>| 193 <text:s text:c="6"/>| 16 <text:s text:c="8"/>| 14.1 <text:s text:c="6"/>| 3.3 <text:s text:c="6"/></text:p>
      <text:p text:style-name="P29">6 <text:s text:c="5"/>| 132 <text:s text:c="4"/>| 205 <text:s text:c="6"/>| 16 <text:s text:c="8"/>| 15.4 <text:s text:c="6"/>| 3.24 <text:s text:c="5"/></text:p>
      <text:p text:style-name="P29">7 <text:s text:c="5"/>| 140 <text:s text:c="4"/>| 210 <text:s text:c="6"/>| 16 <text:s text:c="8"/>| 10.2 <text:s text:c="6"/>| 4.23 <text:s text:c="5"/></text:p>
      <text:p text:style-name="P29">8 <text:s text:c="5"/>| 126 <text:s text:c="4"/>| 211 <text:s text:c="6"/>| 16 <text:s text:c="8"/>| 15.8 <text:s text:c="6"/>| 3.05 <text:s text:c="5"/></text:p>
      <text:p text:style-name="P29">9 <text:s text:c="5"/>| 127 <text:s text:c="4"/>| 215 <text:s text:c="6"/>| 16 <text:s text:c="8"/>| 16.6 <text:s text:c="6"/>| 2.94 <text:s text:c="5"/></text:p>
      <text:p text:style-name="P29">10 <text:s text:c="4"/>| 78 <text:s text:c="5"/>| 217 <text:s text:c="6"/>| 16 <text:s text:c="8"/>| 13.8 <text:s text:c="6"/>| 3.67 <text:s text:c="5"/></text:p>
      <text:p text:style-name="P29">11 <text:s text:c="4"/>| 128 <text:s text:c="4"/>| 217 <text:s text:c="6"/>| 16 <text:s text:c="8"/>| 15 <text:s text:c="8"/>| 3.13 <text:s text:c="5"/></text:p>
      <text:p text:style-name="P29">12 <text:s text:c="4"/>| 118 <text:s text:c="4"/>| 221 <text:s text:c="6"/>| 16 <text:s text:c="8"/>| 12.5 <text:s text:c="6"/>| 3.49 <text:s text:c="5"/></text:p>
      <text:p text:style-name="P29">13 <text:s text:c="4"/>| 144 <text:s text:c="4"/>| 222 <text:s text:c="6"/>| 32 <text:s text:c="8"/>| 14.1 <text:s text:c="6"/>| 3.46 <text:s text:c="5"/></text:p>
      <text:p text:style-name="P29">14 <text:s text:c="4"/>| 122 <text:s text:c="4"/>| 229 <text:s text:c="6"/>| 16 <text:s text:c="8"/>| 11.6 <text:s text:c="6"/>| 4.24 <text:s text:c="5"/></text:p>
      <text:p text:style-name="P29">15 <text:s text:c="4"/>| 141 <text:s text:c="4"/>| 233 <text:s text:c="6"/>| 32 <text:s text:c="8"/>| 14.1 <text:s text:c="6"/>| 3.47 <text:s text:c="5"/></text:p>
      <text:p text:style-name="P29">=====================================================================</text:p>
      <text:p text:style-name="P29"/>
      <text:p text:style-name="P29">max@MAX-MINT ~/voxl-px4-sitl % python3 get_best_results.py baseline </text:p>
      <text:p text:style-name="P29">[*] Loading study 'phase2_baseline_optimization' from sqlite:///phase2_baseline.db...</text:p>
      <text:p text:style-name="P29"/>
      <text:p text:style-name="P29">========================================</text:p>
      <text:p text:style-name="P29">🏆 BEST TRIAL 🏆</text:p>
      <text:p text:style-name="P29">========================================</text:p>
      <text:p text:style-name="P29">Trial Number : 108</text:p>
      <text:p text:style-name="P29">ITAE Cost <text:s text:c="3"/>: 224.6790</text:p>
      <text:p text:style-name="P29">Parameters <text:s text:c="2"/>:</text:p>
      <text:p text:style-name="P29"><text:s text:c="4"/>hidden_width: 16</text:p>
      <text:p text:style-name="P29"><text:s text:c="4"/>gamma: 0.7723368178093489</text:p>
      <text:p text:style-name="P29"><text:s text:c="4"/>sigma_mod: 2.2560451011608462</text:p>
      <text:p text:style-name="P29"/>
      <text:p text:style-name="P29">=====================================================================</text:p>
      <text:p text:style-name="P29">Rank <text:s text:c="2"/>| Trial <text:s text:c="2"/>| Cost <text:s text:c="5"/>| hidden_width | gamma <text:s text:c="5"/>| sigma_mod </text:p>
      <text:p text:style-name="P29">---------------------------------------------------------------------</text:p>
      <text:p text:style-name="P29">1 <text:s text:c="5"/>| 108 <text:s text:c="4"/>| 225 <text:s text:c="6"/>| 16 <text:s text:c="8"/>| 0.772 <text:span text:style-name="T40">­</text:span> <text:s text:c="4"/>| 2.26 <text:s text:c="5"/></text:p>
      <text:p text:style-name="P29">2 <text:s text:c="5"/>| 123 <text:s text:c="4"/>| 229 <text:s text:c="6"/>| 16 <text:s text:c="8"/>| 0.742 <text:s text:c="5"/>| 2.29 <text:s text:c="5"/></text:p>
      <text:p text:style-name="P29">3 <text:s text:c="5"/>| 147 <text:s text:c="4"/>| 229 <text:s text:c="6"/>| 16 <text:s text:c="8"/>| 0.673 <text:s text:c="5"/>| 2.38 <text:s text:c="5"/></text:p>
      <text:p text:style-name="P29">4 <text:s text:c="5"/>| 128 <text:s text:c="4"/>| 230 <text:s text:c="6"/>| 16 <text:s text:c="8"/>| 0.613 <text:s text:c="5"/>| 2.35 <text:s text:c="5"/></text:p>
      <text:p text:style-name="P29">5 <text:s text:c="5"/>| 133 <text:s text:c="4"/>| 230 <text:s text:c="6"/>| 16 <text:s text:c="8"/>| 0.876 <text:s text:c="5"/>| 2.39 <text:s text:c="5"/></text:p>
      <text:p text:style-name="P29">6 <text:s text:c="5"/>| 79 <text:s text:c="5"/>| 230 <text:s text:c="6"/>| 16 <text:s text:c="8"/>| 0.958 <text:s text:c="5"/>| 2.66 <text:s text:c="5"/></text:p>
      <text:p text:style-name="P29">7 <text:s text:c="5"/>| 81 <text:s text:c="5"/>| 232 <text:s text:c="6"/>| 16 <text:s text:c="8"/>| 1.11 <text:s text:c="6"/>| 2.86 <text:s text:c="5"/></text:p>
      <text:p text:style-name="P29">8 <text:s text:c="5"/>| 125 <text:s text:c="4"/>| 233 <text:s text:c="6"/>| 16 <text:s text:c="8"/>| <text:span text:style-name="T40">­</text:span>0.777 <text:s text:c="5"/>| 2.26 <text:s text:c="5"/></text:p>
      <text:p text:style-name="P29">9 <text:s text:c="5"/>| 40 <text:s text:c="5"/>| 233 <text:s text:c="6"/>| 16 <text:s text:c="8"/>| 1.31 <text:s text:c="6"/>| 2.44 <text:s text:c="5"/></text:p>
      <text:p text:style-name="P29">10 <text:s text:c="4"/>| 94 <text:s text:c="5"/>| 233 <text:s text:c="6"/>| 16 <text:s text:c="8"/>| 0.872 <text:s text:c="5"/>| 2.48 <text:s text:c="5"/></text:p>
      <text:p text:style-name="P29">11 <text:s text:c="4"/>| 103 <text:s text:c="4"/>| 234 <text:s text:c="6"/>| 16 <text:s text:c="8"/>| 0.993 <text:s text:c="5"/>| 2.32 <text:s text:c="5"/></text:p>
      <text:p text:style-name="P29">12 <text:s text:c="4"/>| 122 <text:s text:c="4"/>| 234 <text:s text:c="6"/>| 16 <text:s text:c="8"/>| 0.649 <text:s text:c="5"/>| 2.51 <text:s text:c="5"/></text:p>
      <text:p text:style-name="P29">13 <text:s text:c="4"/>| 42 <text:s text:c="5"/>| 234 <text:s text:c="6"/>| 16 <text:s text:c="8"/>| 0.8 <text:s text:c="7"/>| 2.19 <text:s text:c="5"/></text:p>
      <text:p text:style-name="P29"><text:soft-page-break/>14 <text:s text:c="4"/>| 157 <text:s text:c="4"/>| 234 <text:s text:c="6"/>| 16 <text:s text:c="8"/>| 0.941 <text:s text:c="5"/>| 2.57 <text:s text:c="5"/></text:p>
      <text:p text:style-name="P29">15 <text:s text:c="4"/>| 104 <text:s text:c="4"/>| 234 <text:s text:c="6"/>| 16 <text:s text:c="8"/>| 0.848 <text:s text:c="5"/>| 2.32 <text:s text:c="5"/></text:p>
      <text:p text:style-name="P30">=====================================================================</text:p>
      <text:p text:style-name="P30"/>
      <text:p text:style-name="P36">Running the best ones:</text:p>
      <text:p text:style-name="P36">“NO_FF” means that there is no feedforward term qd_ddot.</text:p>
      <text:p text:style-name="P36"/>
      <text:p text:style-name="P36">======================================================================</text:p>
      <text:p text:style-name="P36">Controller <text:s text:c="8"/>| ITAE Cost <text:s text:c="3"/>| Tracking RMS (m) <text:s text:c="2"/>| Effort RMS (m/s^2)</text:p>
      <text:p text:style-name="P36">----------------------------------------------------------------------</text:p>
      <text:p text:style-name="P36">noresnet <text:s text:c="10"/>| 31.4746 <text:s text:c="5"/>| 0.5394 <text:s text:c="12"/>| 0.9746 <text:s text:c="8"/></text:p>
      <text:p text:style-name="P36">noresnet_no_ff <text:s text:c="4"/>| 297.0451 <text:s text:c="4"/>| 0.6369 <text:s text:c="12"/>| 1.0858 <text:s text:c="8"/></text:p>
      <text:p text:style-name="P36">baseline <text:s text:c="10"/>| 237.0074 <text:s text:c="4"/>| 0.6942 <text:s text:c="12"/>| 1.6116 <text:s text:c="8"/></text:p>
      <text:p text:style-name="P36">developed <text:s text:c="9"/>| 177.7252 <text:s text:c="4"/>| 0.6012 <text:s text:c="12"/>| 1.1556 <text:s text:c="8"/></text:p>
      <text:p text:style-name="P36">======================================================================<text:line-break/></text:p>
      <text:p text:style-name="P38"><text:span text:style-name="T45">Technically the best </text:span><text:span text:style-name="T42">DEVELOPED </text:span><text:span text:style-name="T45">had Gamma = 23.7807 and sigma_mod = 2.0029 </text:span><text:span text:style-name="T46">and a</text:span><text:span text:style-name="T42"> Cost </text:span><text:span text:style-name="T46">of</text:span><text:span text:style-name="T42"> 389.1152 </text:span><text:span text:style-name="T46">even Optuna said it 116 ish</text:span><text:span text:style-name="T42">. RMS Error is 0.8688. Effort RMS is 1.1805. </text:span><text:span text:style-name="T46">Above was the second best one Optuna found. I image the spike in cost was because it was marginally numerically stable.</text:span></text:p>
      <text:p text:style-name="P37"><text:span text:style-name="T14"/></text:p>
      <text:p text:style-name="P30"/>
      <text:p text:style-name="P31">PHASE 2 (TAKE 3)</text:p>
      <text:p text:style-name="P31"/>
      <text:p text:style-name="P31">I propose we <text:span text:style-name="T44">do this for 1000 trials with 200 trials of patience next for each controller. Should we or should we not?</text:span></text:p>
      <text:p text:style-name="P31"/>
      <text:p text:style-name="P34"><text:span text:style-name="T8">initial_weight_scale_factor</text:span> <text:span text:style-name="T6">=</text:span> <text:s/><text:span text:style-name="T8">trial</text:span>.<text:span text:style-name="T10">suggest_categorical</text:span>(<text:span text:style-name="T3">"</text:span><text:span text:style-name="T8">initial_weight_scale_factor</text:span><text:span text:style-name="T3">"</text:span>, [<text:span text:style-name="T12">0.2, 1</text:span>])</text:p>
      <text:p text:style-name="P35"/>
      <text:p text:style-name="P33"><text:span text:style-name="T8">param_dict</text:span>[<text:span text:style-name="T3">'num_blocks'</text:span>] <text:span text:style-name="T6">=</text:span> <text:span text:style-name="T8">trial</text:span>.<text:span text:style-name="T10">suggest_categorical</text:span>(<text:span text:style-name="T3">"</text:span><text:span text:style-name="T4">num_blocks</text:span><text:span text:style-name="T3">"</text:span>, [<text:span text:style-name="T15">1, 2, 4</text:span>])</text:p>
      <text:p text:style-name="P33"><text:span text:style-name="T8">param_dict</text:span>[<text:span text:style-name="T3">'k_0'</text:span>] <text:span text:style-name="T6">= </text:span><text:span text:style-name="T8">trial</text:span>.<text:span text:style-name="T10">suggest_categorical</text:span>(<text:span text:style-name="T3">"</text:span><text:span text:style-name="T5">k_0</text:span><text:span text:style-name="T3">"</text:span>, [<text:span text:style-name="T15">1, 2, 4</text:span>]) </text:p>
      <text:p text:style-name="P33"><text:span text:style-name="T8">param_dict</text:span>[<text:span text:style-name="T3">'k_i'</text:span>] <text:span text:style-name="T6">= </text:span><text:span text:style-name="T9">trial</text:span><text:span text:style-name="T41">.</text:span><text:span text:style-name="T11">suggest_categorical</text:span><text:span text:style-name="T41">(</text:span><text:span text:style-name="T4">"</text:span><text:span text:style-name="T5">k_i</text:span><text:span text:style-name="T4">"</text:span><text:span text:style-name="T41">, [</text:span><text:span text:style-name="T15">1, 2, 4</text:span><text:span text:style-name="T41">])</text:span></text:p>
      <text:p text:style-name="P35"/>
      <text:p text:style-name="P1"><text:span text:style-name="T8">param_dict</text:span>[<text:span text:style-name="T3">'hidden_width'</text:span>] <text:span text:style-name="T6">=</text:span> <text:span text:style-name="T8">trial</text:span>.<text:span text:style-name="T10">suggest_categorical</text:span>(<text:span text:style-name="T3">"hidden_width"</text:span>, [<text:span text:style-name="T41">4, 8</text:span><text:span text:style-name="T12">, </text:span><text:span text:style-name="T15">16</text:span>])</text:p>
      <text:p text:style-name="P1"><text:span text:style-name="T8">param_dict</text:span>[<text:span text:style-name="T3">'gamma'</text:span>] <text:span text:style-name="T6">=</text:span> <text:span text:style-name="T24">float</text:span>(<text:span text:style-name="T8">trial</text:span>.<text:span text:style-name="T10">suggest_float</text:span>(<text:span text:style-name="T3">"gamma"</text:span>, <text:span text:style-name="T12">0.</text:span><text:span text:style-name="T16">1</text:span>, <text:span text:style-name="T43">1</text:span><text:span text:style-name="T44">0</text:span><text:span text:style-name="T12">.0</text:span>, <text:span text:style-name="T8">log</text:span><text:span text:style-name="T6">=</text:span><text:span text:style-name="T18">True</text:span>))</text:p>
      <text:p text:style-name="P1"><text:span text:style-name="T8">param_dict</text:span>[<text:span text:style-name="T3">'sigma_mod'</text:span>] <text:span text:style-name="T6">=</text:span> <text:span text:style-name="T24">float</text:span>(<text:span text:style-name="T8">trial</text:span>.<text:span text:style-name="T10">suggest_float</text:span>(<text:span text:style-name="T3">"sigma_mod"</text:span>, <text:span text:style-name="T12">0.</text:span><text:span text:style-name="T17">5</text:span>, <text:span text:style-name="T12">5.0</text:span>, <text:span text:style-name="T8">log</text:span><text:span text:style-name="T6">=</text:span><text:span text:style-name="T18">True</text:span>))</text:p>
      <text:p text:style-name="P31"/>
      <text:p text:style-name="P17"/>
      <text:p text:style-name="P16"/>
      <text:p text:style-name="P14"/>
      <text:p text:style-name="P13"/>
      <text:p text:style-name="Standard"/>
      <text:p text:style-name="P2"/>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Mono" svg:font-family="'Droid Sans Mono', monospac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6-15T08:58:59.506469531</meta:creation-date>
    <dc:date>2026-06-21T13:51:46.585828914</dc:date>
    <meta:editing-duration>P2DT2H56M12S</meta:editing-duration>
    <meta:editing-cycles>34</meta:editing-cycles>
    <meta:generator>LibreOffice/7.3.7.2$Linux_X86_64 LibreOffice_project/30$Build-2</meta:generator>
    <meta:document-statistic meta:table-count="0" meta:image-count="0" meta:object-count="0" meta:page-count="8" meta:paragraph-count="242" meta:word-count="2150" meta:character-count="15363" meta:non-whitespace-character-count="10936"/>
  </office:meta>
</office:document-meta>
</file>