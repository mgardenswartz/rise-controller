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nlo" svg:font-family="Menl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Standard">
      <style:paragraph-properties style:line-height-at-least="0.198in"/>
    </style:style>
    <style:style style:name="P3" style:family="paragraph" style:parent-style-name="Standard">
      <style:paragraph-properties style:line-height-at-least="0.198in"/>
      <style:text-properties fo:color="#bbbebf" loext:opacity="100%" style:font-name="Droid Sans Mono" fo:font-size="10.5pt" fo:background-color="#121314" style:font-size-asian="10.5pt"/>
    </style:style>
    <style:style style:name="P4" style:family="paragraph" style:parent-style-name="Normal">
      <loext:graphic-properties draw:fill="solid" draw:fill-color="#1f1f1f" draw:opacity="100%"/>
      <style:paragraph-properties style:line-height-at-least="0.1874in" fo:hyphenation-ladder-count="no-limit" fo:hyphenation-keep="auto" loext:hyphenation-keep-type="column" loext:hyphenation-keep-line="false" fo:background-color="#1f1f1f" style:vertical-align="auto"/>
      <style:text-properties fo:hyphenate="true" loext:hyphenation-no-caps="false" loext:hyphenation-no-last-word="false" loext:hyphenation-word-char-count="no-limit" loext:hyphenation-zone="no-limit"/>
    </style:style>
    <style:style style:name="P5" style:family="paragraph" style:parent-style-name="Normal">
      <style:text-properties style:language-complex="ar" style:country-complex="SA"/>
    </style:style>
    <style:style style:name="P6" style:family="paragraph" style:parent-style-name="Standard">
      <style:paragraph-properties style:border-line-width-bottom="0.0102in 0.0102in 0.0102in" fo:padding-left="0in" fo:padding-right="0in" fo:padding-top="0in" fo:padding-bottom="0.0138in" fo:border-left="none" fo:border-right="none" fo:border-top="none" fo:border-bottom="2.24pt double #000000" style:shadow="none"/>
    </style:style>
    <style:style style:name="P7" style:family="paragraph" style:parent-style-name="Normal">
      <loext:graphic-properties draw:fill="solid" draw:fill-color="#121314" draw:opacity="100%"/>
      <style:paragraph-properties style:line-height-at-least="0.1874in" fo:hyphenation-ladder-count="no-limit" fo:hyphenation-keep="auto" loext:hyphenation-keep-type="column" loext:hyphenation-keep-line="false" fo:background-color="#121314" style:vertical-align="auto"/>
      <style:text-properties fo:color="#bbbebf" loext:opacity="100%" style:font-name="Menlo" fo:font-size="9pt" style:letter-kerning="false" style:font-name-asian="Times New Roman" style:font-size-asian="9pt" style:language-asian="en" style:country-asian="US" style:font-name-complex="Menlo" style:font-size-complex="9pt" style:language-complex="ar" style:country-complex="SA" fo:hyphenate="true" loext:hyphenation-no-caps="false" loext:hyphenation-no-last-word="false" loext:hyphenation-word-char-count="no-limit" loext:hyphenation-zone="no-limit"/>
    </style:style>
    <style:style style:name="P8" style:family="paragraph" style:parent-style-name="Normal">
      <loext:graphic-properties draw:fill="solid" draw:fill-color="#121314" draw:opacity="100%"/>
      <style:paragraph-properties style:line-height-at-least="0.1874in" fo:hyphenation-ladder-count="no-limit" fo:hyphenation-keep="auto" loext:hyphenation-keep-type="column" loext:hyphenation-keep-line="false" fo:background-color="#121314" style:vertical-align="auto"/>
      <style:text-properties fo:hyphenate="true" loext:hyphenation-no-caps="false" loext:hyphenation-no-last-word="false" loext:hyphenation-word-char-count="no-limit" loext:hyphenation-zone="no-limit"/>
    </style:style>
    <style:style style:name="P9" style:family="paragraph" style:parent-style-name="Standard">
      <style:text-properties officeooo:rsid="0018a5a1" officeooo:paragraph-rsid="0018a5a1"/>
    </style:style>
    <style:style style:name="P10" style:family="paragraph" style:parent-style-name="Standard">
      <style:text-properties officeooo:rsid="001a1448" officeooo:paragraph-rsid="001a1448"/>
    </style:style>
    <style:style style:name="T1" style:family="text">
      <style:text-properties fo:color="#c9d1d9" loext:opacity="100%" style:font-name="Droid Sans Mono" fo:font-size="10.5pt" fo:background-color="#121314" loext:char-shading-value="0" style:font-size-asian="10.5pt"/>
    </style:style>
    <style:style style:name="T2" style:family="text">
      <style:text-properties fo:color="#bbbebf" loext:opacity="100%" style:font-name="Droid Sans Mono" fo:font-size="10.5pt" fo:background-color="#121314" loext:char-shading-value="0" style:font-size-asian="10.5pt"/>
    </style:style>
    <style:style style:name="T3" style:family="text">
      <style:text-properties fo:color="#a5d6ff" loext:opacity="100%" style:font-name="Droid Sans Mono" fo:font-size="10.5pt" fo:background-color="#121314" loext:char-shading-value="0" style:font-size-asian="10.5pt"/>
    </style:style>
    <style:style style:name="T4" style:family="text">
      <style:text-properties fo:color="#d4d4d4" loext:opacity="100%" style:font-name="Droid Sans Mono" fo:font-size="10.5pt" fo:background-color="#121314" loext:char-shading-value="0" style:font-size-asian="10.5pt"/>
    </style:style>
    <style:style style:name="T5" style:family="text">
      <style:text-properties fo:color="#ffa657" loext:opacity="100%" style:font-name="Droid Sans Mono" fo:font-size="10.5pt" fo:background-color="#121314" loext:char-shading-value="0" style:font-size-asian="10.5pt"/>
    </style:style>
    <style:style style:name="T6" style:family="text">
      <style:text-properties fo:color="#d2a8ff" loext:opacity="100%" style:font-name="Droid Sans Mono" fo:font-size="10.5pt" fo:background-color="#121314" loext:char-shading-value="0" style:font-size-asian="10.5pt"/>
    </style:style>
    <style:style style:name="T7" style:family="text">
      <style:text-properties fo:color="#b5cea8" loext:opacity="100%" style:font-name="Droid Sans Mono" fo:font-size="10.5pt" fo:background-color="#121314" loext:char-shading-value="0" style:font-size-asian="10.5pt"/>
    </style:style>
    <style:style style:name="T8" style:family="text">
      <style:text-properties fo:color="#569cd6" loext:opacity="100%" style:font-name="Droid Sans Mono" fo:font-size="10.5pt" fo:background-color="#121314" loext:char-shading-value="0" style:font-size-asian="10.5pt"/>
    </style:style>
    <style:style style:name="T9" style:family="text">
      <style:text-properties fo:color="#ff7b72" loext:opacity="100%" style:font-name="Droid Sans Mono" fo:font-size="10.5pt" fo:background-color="#121314" loext:char-shading-value="0" style:font-size-asian="10.5pt"/>
    </style:style>
    <style:style style:name="T10" style:family="text">
      <style:text-properties fo:color="#4ec9b0" loext:opacity="100%" style:font-name="Droid Sans Mono" fo:font-size="10.5pt" fo:background-color="#121314" loext:char-shading-value="0" style:font-size-asian="10.5pt"/>
    </style:style>
    <style:style style:name="T11" style:family="text">
      <style:text-properties fo:color="#c586c0" loext:opacity="100%" style:font-name="Droid Sans Mono" fo:font-size="10.5pt" fo:background-color="#121314" loext:char-shading-value="0" style:font-size-asian="10.5pt"/>
    </style:style>
    <style:style style:name="T12" style:family="text">
      <style:text-properties fo:color="#79c0ff" loext:opacity="100%" style:font-name="Droid Sans Mono" fo:font-size="10.5pt" fo:background-color="#121314" loext:char-shading-value="0" style:font-size-asian="10.5pt"/>
    </style:style>
    <style:style style:name="T1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4" style:family="text">
      <style:text-properties fo:color="#8b949e" loext:opacity="100%" style:font-name="Droid Sans Mono" fo:font-size="10.5pt" fo:background-color="#121314" loext:char-shading-value="0" style:font-size-asian="10.5pt"/>
    </style:style>
    <style:style style:name="T15" style:family="text">
      <style:text-properties fo:color="#cccccc"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6" style:family="text">
      <style:text-properties fo:color="#ce9178"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7" style:family="text">
      <style:text-properties fo:color="#b5cea8"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8" style:family="text">
      <style:text-properties fo:color="#d4d4d4"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9" style:family="text">
      <style:text-properties fo:color="#9cdcfe"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0" style:family="text">
      <style:text-properties fo:color="#dcdcaa"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1" style:family="text">
      <style:text-properties fo:color="#569cd6"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2" style:family="text">
      <style:text-properties fo:font-family="'Apple Color Emoji'" style:font-family-generic="system" style:font-pitch="variable" style:font-family-complex="'Apple Color Emoji'" style:font-family-generic-complex="system" style:font-pitch-complex="variable" style:language-complex="ar" style:country-complex="SA"/>
    </style:style>
    <style:style style:name="T23" style:family="text">
      <style:text-properties style:language-complex="ar" style:country-complex="SA"/>
    </style:style>
    <style:style style:name="T24" style:family="text">
      <style:text-properties fo:color="#e0e0e0" loext:opacity="100%" style:font-name="Menlo" style:letter-kerning="false" style:font-name-complex="Menlo" style:language-complex="ar" style:country-complex="SA"/>
    </style:style>
    <style:style style:name="T25" style:family="text">
      <style:text-properties fo:font-family="'Apple Color Emoji'" style:font-family-generic="system" style:font-pitch="variable" style:font-family-complex="'Apple Color Emoji'" style:font-family-generic-complex="system" style:font-pitch-complex="variable"/>
    </style:style>
    <style:style style:name="T26" style:family="text">
      <style:text-properties fo:color="#bbbebf"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7" style:family="text">
      <style:text-properties fo:color="#c9d1d9"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8" style:family="text">
      <style:text-properties fo:color="#ffa657"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9" style:family="text">
      <style:text-properties fo:color="#a5d6ff"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30" style:family="text">
      <style:text-properties fo:color="#4ec9b0"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31" style:family="text">
      <style:text-properties officeooo:rsid="001a14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_20_body"/>
      <text:p text:style-name="Text_20_body">Here's what I have done so far…</text:p>
      <text:p text:style-name="Text_20_body">PHASE 1</text:p>
      <text:p text:style-name="Text_20_body">Using seed 42 for jax.random and the cost function</text:p>
      <text:p text:style-name="Standard">J=\intop_{t_0}{t_f}(q_e*t*|e(t)|^2+r_u|u(t)|^2)dt</text:p>
      <text:p text:style-name="Standard"><text:s/></text:p>
      <text:p text:style-name="Standard">where t_f=60 and the search ranges were</text:p>
      <text:p text:style-name="Standard"/>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01</text:span></text:span><text:span text:style-name="Default_20_Paragraph_20_Font"><text:span text:style-name="T2">, </text:span></text:span><text:span text:style-name="Default_20_Paragraph_20_Font"><text:span text:style-name="T7">0.01</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Text_20_body"/>
      <text:p text:style-name="Text_20_body">The desired trajectory was a figure eight with a period of 30 seconds:</text:p>
      <text:p text:style-name="Text_20_body"/>
      <text:p text:style-name="Standard"><text:span text:style-name="Default_20_Paragraph_20_Font"><text:span text:style-name="T9">def</text:span></text:span><text:span text:style-name="Default_20_Paragraph_20_Font"><text:span text:style-name="T2"> </text:span></text:span><text:span text:style-name="Default_20_Paragraph_20_Font"><text:span text:style-name="T6">get_desired_state</text:span></text:span><text:span text:style-name="Default_20_Paragraph_20_Font"><text:span text:style-name="T2">(</text:span></text:span><text:span text:style-name="Default_20_Paragraph_20_Font"><text:span text:style-name="T1">self</text:span></text:span><text:span text:style-name="Default_20_Paragraph_20_Font"><text:span text:style-name="T2">, </text:span></text:span><text:span text:style-name="Default_20_Paragraph_20_Font"><text:span text:style-name="T5">t</text:span></text:span><text:span text:style-name="Default_20_Paragraph_20_Font"><text:span text:style-name="T2">: </text:span></text:span><text:span text:style-name="Default_20_Paragraph_20_Font"><text:span text:style-name="T10">float</text:span></text:span><text:span text:style-name="Default_20_Paragraph_20_Font"><text:span text:style-name="T2">) -&gt; </text:span></text:span><text:span text:style-name="Default_20_Paragraph_20_Font"><text:span text:style-name="T10">tuple</text:span></text:span><text:span text:style-name="Default_20_Paragraph_20_Font"><text:span text:style-name="T2">[</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 </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 </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text:span></text:span></text:p>
      <text:p text:style-name="P2"><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4.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zc</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4.0</text:span></text:span></text:p>
      <text:p text:style-name="P2"><text:span text:style-name="Default_20_Paragraph_20_Font"><text:span text:style-name="T1">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3.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8.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c</text:span></text:span></text:p>
      <text:p text:style-name="P2"><text:span text:style-name="Default_20_Paragraph_20_Font"><text:span text:style-name="T1">v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3.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v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8.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v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a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x</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xd</text:span></text:span></text:p>
      <text:p text:style-name="P2"><text:span text:style-name="Default_20_Paragraph_20_Font"><text:span text:style-name="T1">a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y</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yd</text:span></text:span></text:p>
      <text:p text:style-name="P2"><text:span text:style-name="Default_20_Paragraph_20_Font"><text:span text:style-name="T1">a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z</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c</text:span></text:span><text:span text:style-name="Default_20_Paragraph_20_Font"><text:span text:style-name="T2">)</text:span></text:span></text:p>
      <text:p text:style-name="P2"><text:span text:style-name="Default_20_Paragraph_20_Font"><text:span text:style-name="T11">return</text:span></text:span><text:span text:style-name="Default_20_Paragraph_20_Font"><text:span text:style-name="T2"> (</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xd</text:span></text:span><text:span text:style-name="Default_20_Paragraph_20_Font"><text:span text:style-name="T2">, </text:span></text:span><text:span text:style-name="Default_20_Paragraph_20_Font"><text:span text:style-name="T1">yd</text:span></text:span><text:span text:style-name="Default_20_Paragraph_20_Font"><text:span text:style-name="T2">, </text:span></text:span><text:span text:style-name="Default_20_Paragraph_20_Font"><text:span text:style-name="T1">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vxd</text:span></text:span><text:span text:style-name="Default_20_Paragraph_20_Font"><text:span text:style-name="T2">, </text:span></text:span><text:span text:style-name="Default_20_Paragraph_20_Font"><text:span text:style-name="T1">vyd</text:span></text:span><text:span text:style-name="Default_20_Paragraph_20_Font"><text:span text:style-name="T2">, </text:span></text:span><text:span text:style-name="Default_20_Paragraph_20_Font"><text:span text:style-name="T1">v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axd</text:span></text:span><text:span text:style-name="Default_20_Paragraph_20_Font"><text:span text:style-name="T2">, </text:span></text:span><text:span text:style-name="Default_20_Paragraph_20_Font"><text:span text:style-name="T1">ayd</text:span></text:span><text:span text:style-name="Default_20_Paragraph_20_Font"><text:span text:style-name="T2">, </text:span></text:span><text:span text:style-name="Default_20_Paragraph_20_Font"><text:span text:style-name="T1">a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3"><text:soft-page-break/>)</text:p>
      <text:p text:style-name="Text_20_body"/>
      <text:p text:style-name="Text_20_body">Optuna was given 100 trials to find the gains in these ranges that minimize this cost. In each, the initial condition was always</text:p>
      <text:p text:style-name="Text_20_body"><text:span text:style-name="Default_20_Paragraph_20_Font"><text:span text:style-name="T12">FIXED_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70</text:span></text:span></text:p>
      <text:p text:style-name="P2"><text:span text:style-name="Default_20_Paragraph_20_Font"><text:span text:style-name="T12">FIXED_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2.37</text:span></text:span></text:p>
      <text:p text:style-name="P2"><text:span text:style-name="Default_20_Paragraph_20_Font"><text:span text:style-name="T12">TARGET_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3.0</text:span></text:span></text:p>
      <text:p text:style-name="P3"/>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7">50.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1">k_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7">1</text:span></text:span><text:span text:style-name="Default_20_Paragraph_20_Font"><text:span text:style-name="T2">, </text:span></text:span><text:span text:style-name="Default_20_Paragraph_20_Font"><text:span text:style-name="T7">2</text:span></text:span><text:span text:style-name="Default_20_Paragraph_20_Font"><text:span text:style-name="T2">, </text:span></text:span><text:span text:style-name="Default_20_Paragraph_20_Font"><text:span text:style-name="T7">4</text:span></text:span><text:span text:style-name="Default_20_Paragraph_20_Font"><text:span text:style-name="T2">, </text:span></text:span><text:span text:style-name="Default_20_Paragraph_20_Font"><text:span text:style-name="T7">8</text:span></text:span><text:span text:style-name="Default_20_Paragraph_20_Font"><text:span text:style-name="T2">])</text:span></text:span></text:p>
      <text:p text:style-name="P2"><text:span text:style-name="Default_20_Paragraph_20_Font"><text:span text:style-name="T1">k_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7">1</text:span></text:span><text:span text:style-name="Default_20_Paragraph_20_Font"><text:span text:style-name="T2">, </text:span></text:span><text:span text:style-name="Default_20_Paragraph_20_Font"><text:span text:style-name="T7">2</text:span></text:span><text:span text:style-name="Default_20_Paragraph_20_Font"><text:span text:style-name="T2">, </text:span></text:span><text:span text:style-name="Default_20_Paragraph_20_Font"><text:span text:style-name="T7">4</text:span></text:span><text:span text:style-name="Default_20_Paragraph_20_Font"><text:span text:style-name="T2">, </text:span></text:span><text:span text:style-name="Default_20_Paragraph_20_Font"><text:span text:style-name="T7">8</text:span></text:span><text:span text:style-name="Default_20_Paragraph_20_Font"><text:span text:style-name="T2">])</text:span></text:span></text:p>
      <text:p text:style-name="P2"><text:span text:style-name="Default_20_Paragraph_20_Font"><text:span text:style-name="T1">theta_bar_scal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theta_bar_scale"</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1">b</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1</text:span></text:span></text:p>
      <text:p text:style-name="P2"><text:span text:style-name="Default_20_Paragraph_20_Font"><text:span text:style-name="T1">hidden_width</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16</text:span></text:span></text:p>
      <text:p text:style-name="P3"/>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oft-page-break/><text:span text:style-name="Default_20_Paragraph_20_Font"><text:span text:style-name="T13">I changed the desired trajectory </text:span></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7">8.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5.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5.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01</text:span></text:span><text:span text:style-name="Default_20_Paragraph_20_Font"><text:span text:style-name="T2">, </text:span></text:span><text:span text:style-name="Default_20_Paragraph_20_Font"><text:span text:style-name="T7">0.05</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7">8.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1.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3"/>
      <text:p text:style-name="P2">========================================</text:p>
      <text:p text:style-name="P2">🏆 ABSOLUTE BEST TRIAL 🏆</text:p>
      <text:p text:style-name="P2">========================================</text:p>
      <text:p text:style-name="P2">Trial Number : 479</text:p>
      <text:p text:style-name="P2">ITAE Cost <text:s text:c="3"/>: 45.3812</text:p>
      <text:p text:style-name="P2">Parameters <text:s text:c="2"/>:</text:p>
      <text:p text:style-name="P2"><text:s text:c="4"/>k1: 1.0023023754462224</text:p>
      <text:p text:style-name="P2"><text:s text:c="4"/>k2: 0.47303088708289664</text:p>
      <text:p text:style-name="P2"><text:s text:c="4"/>k3: 0.4876260355061123</text:p>
      <text:p text:style-name="P2"><text:s text:c="4"/>k_rise: 0.08491915751268746</text:p>
      <text:p text:style-name="P2"/>
      <text:p text:style-name="P2">=================================================================</text:p>
      <text:p text:style-name="P2">Rank <text:s text:c="2"/>| Trial <text:s text:c="2"/>| Cost <text:s text:c="5"/>| k1 <text:s text:c="5"/>| k2 <text:s text:c="5"/>| k3 <text:s text:c="5"/>| k_rise <text:s text:c="2"/></text:p>
      <text:p text:style-name="P2">-----------------------------------------------------------------</text:p>
      <text:p text:style-name="P2">1 <text:s text:c="5"/>| 479 <text:s text:c="4"/>| 45.4 <text:s text:c="5"/>| 1 <text:s text:c="6"/>| 0.473 <text:s text:c="2"/>| 0.488 <text:s text:c="2"/>| 0.0849 <text:s text:c="2"/></text:p>
      <text:p text:style-name="P2">2 <text:s text:c="5"/>| 553 <text:s text:c="4"/>| 45.5 <text:s text:c="5"/>| 1.01 <text:s text:c="3"/>| 0.474 <text:s text:c="2"/>| 0.488 <text:s text:c="2"/>| 0.0957 <text:s text:c="2"/></text:p>
      <text:p text:style-name="P2">3 <text:s text:c="5"/>| 540 <text:s text:c="4"/>| 45.5 <text:s text:c="5"/>| 1 <text:s text:c="6"/>| 0.471 <text:s text:c="2"/>| 0.485 <text:s text:c="2"/>| 0.116 <text:s text:c="3"/></text:p>
      <text:p text:style-name="P2">4 <text:s text:c="5"/>| 403 <text:s text:c="4"/>| 45.6 <text:s text:c="5"/>| 1.01 <text:s text:c="3"/>| 0.468 <text:s text:c="2"/>| 0.487 <text:s text:c="2"/>| 0.109 <text:s text:c="3"/></text:p>
      <text:p text:style-name="P2">5 <text:s text:c="5"/>| 411 <text:s text:c="4"/>| 45.7 <text:s text:c="5"/>| 1 <text:s text:c="6"/>| 0.472 <text:s text:c="2"/>| 0.489 <text:s text:c="2"/>| 0.111 <text:s text:c="3"/></text:p>
      <text:p text:style-name="P2">6 <text:s text:c="5"/>| 400 <text:s text:c="4"/>| 45.7 <text:s text:c="5"/>| 1.01 <text:s text:c="3"/>| 0.467 <text:s text:c="2"/>| 0.484 <text:s text:c="2"/>| 0.112 <text:s text:c="3"/></text:p>
      <text:p text:style-name="P2">7 <text:s text:c="5"/>| 549 <text:s text:c="4"/>| 45.8 <text:s text:c="5"/>| 1 <text:s text:c="6"/>| 0.481 <text:s text:c="2"/>| 0.494 <text:s text:c="2"/>| 0.0955 <text:s text:c="2"/></text:p>
      <text:p text:style-name="P2">8 <text:s text:c="5"/>| 424 <text:s text:c="4"/>| 45.8 <text:s text:c="5"/>| 1.01 <text:s text:c="3"/>| 0.483 <text:s text:c="2"/>| 0.513 <text:s text:c="2"/>| 0.103 <text:s text:c="3"/></text:p>
      <text:p text:style-name="P2">9 <text:s text:c="5"/>| 634 <text:s text:c="4"/>| 45.8 <text:s text:c="5"/>| 1.01 <text:s text:c="3"/>| 0.51 <text:s text:c="3"/>| 0.519 <text:s text:c="2"/>| 0.0801 <text:s text:c="2"/></text:p>
      <text:p text:style-name="P2">10 <text:s text:c="4"/>| 409 <text:s text:c="4"/>| 45.9 <text:s text:c="5"/>| 1 <text:s text:c="6"/>| 0.475 <text:s text:c="2"/>| 0.489 <text:s text:c="2"/>| 0.114 <text:s text:c="3"/></text:p>
      <text:p text:style-name="P2"><text:soft-page-break/>11 <text:s text:c="4"/>| 407 <text:s text:c="4"/>| 46 <text:s text:c="7"/>| 1 <text:s text:c="6"/>| 0.473 <text:s text:c="2"/>| 0.489 <text:s text:c="2"/>| 0.115 <text:s text:c="3"/></text:p>
      <text:p text:style-name="P2">12 <text:s text:c="4"/>| 467 <text:s text:c="4"/>| 46.1 <text:s text:c="5"/>| 1.01 <text:s text:c="3"/>| 0.46 <text:s text:c="3"/>| 0.475 <text:s text:c="2"/>| 0.101 <text:s text:c="3"/></text:p>
      <text:p text:style-name="P2">13 <text:s text:c="4"/>| 438 <text:s text:c="4"/>| 46.1 <text:s text:c="5"/>| 1 <text:s text:c="6"/>| 0.466 <text:s text:c="2"/>| 0.48 <text:s text:c="3"/>| 0.0924 <text:s text:c="2"/></text:p>
      <text:p text:style-name="P2">14 <text:s text:c="4"/>| 401 <text:s text:c="4"/>| 46.1 <text:s text:c="5"/>| 1.03 <text:s text:c="3"/>| 0.465 <text:s text:c="2"/>| 0.482 <text:s text:c="2"/>| 0.115 <text:s text:c="3"/></text:p>
      <text:p text:style-name="P2">15 <text:s text:c="4"/>| 574 <text:s text:c="4"/>| 46.1 <text:s text:c="5"/>| 1 <text:s text:c="6"/>| 0.472 <text:s text:c="2"/>| 0.49 <text:s text:c="3"/>| 0.096 <text:s text:c="3"/></text:p>
      <text:p text:style-name="P2">=================================================================</text:p>
      <text:p text:style-name="P2"/>
      <text:p text:style-name="P2">It ran for 679 trials. 1000 limited. Stops after 200 if best one doesn’t improve.</text:p>
      <text:p text:style-name="P2"/>
      <text:p text:style-name="P2">PHASE 1 (TAKE 5)</text:p>
      <text:p text:style-name="P2">Changing to 500 trials limit. Stop after 50</text:p>
      <text:p text:style-name="Standard">New search space is</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3.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1</text:span></text:span><text:span text:style-name="Default_20_Paragraph_20_Font"><text:span text:style-name="T2">, </text:span></text:span><text:span text:style-name="Default_20_Paragraph_20_Font"><text:span text:style-name="T7">10.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3"/>
      <text:p text:style-name="P3">max@MAX-MINT ~/voxl-px4-sitl % python3 get_best_results.py <text:s/></text:p>
      <text:p text:style-name="P3">[*] Loading study 'phase1_noresnet_baseline_tuning' from sqlite:///phase1_tuning.db...</text:p>
      <text:p text:style-name="P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text:soft-page-break/>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oft-page-break/><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 ­ <text:s text:c="4"/>|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 ­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text:soft-page-break/>11 <text:s text:c="4"/>| 103 <text:s text:c="4"/>| 234 <text:s text:c="6"/>| 16 <text:s text:c="8"/>| 0.993 <text:s text:c="5"/>| 2.32 <text:s text:c="5"/></text:p>
      <text:p text:style-name="Standard">12 <text:s text:c="4"/>| 122 <text:s text:c="4"/>| 234 <text:s text:c="6"/>| 16 <text:s text:c="8"/>| 0.649 <text:s text:c="5"/>| 2.51 <text:s text:c="5"/></text:p>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Standard"/>
      <text:p text:style-name="Standard">I have changed the desired trajectory. There are two now. A warped figure eight (trajectory 1) and a 4-petal rose. Below is data for trajectory 1 only. No wind. It finished in 80. 250 trials max with 50 patience (patience means it exits if no improvement in that many trials).</text:p>
      <text:p text:style-name="Standard"><text:s/></text:p>
      <text:p text:style-name="P4"><text:span text:style-name="Default_20_Paragraph_20_Font"><text:span text:style-name="T15"><text:s text:c="8"/></text:span></text:span><text:span text:style-name="Default_20_Paragraph_20_Font"><text:span text:style-name="T16">'traj1_period'</text:span></text:span><text:span text:style-name="Default_20_Paragraph_20_Font"><text:span text:style-name="T15">: </text:span></text:span><text:span text:style-name="Default_20_Paragraph_20_Font"><text:span text:style-name="T17">30.0</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alpha_warp'</text:span></text:span><text:span text:style-name="Default_20_Paragraph_20_Font"><text:span text:style-name="T15">: </text:span></text:span><text:span text:style-name="Default_20_Paragraph_20_Font"><text:span text:style-name="T17">0.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x_amp'</text:span></text:span><text:span text:style-name="Default_20_Paragraph_20_Font"><text:span text:style-name="T15">: </text:span></text:span><text:span text:style-name="Default_20_Paragraph_20_Font"><text:span text:style-name="T17">1.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y_amp'</text:span></text:span><text:span text:style-name="Default_20_Paragraph_20_Font"><text:span text:style-name="T15">: </text:span></text:span><text:span text:style-name="Default_20_Paragraph_20_Font"><text:span text:style-name="T17">3.0</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center_z'</text:span></text:span><text:span text:style-name="Default_20_Paragraph_20_Font"><text:span text:style-name="T15">: </text:span></text:span><text:span text:style-name="Default_20_Paragraph_20_Font"><text:span text:style-name="T18">-</text:span></text:span><text:span text:style-name="Default_20_Paragraph_20_Font"><text:span text:style-name="T17">0.7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z_amp'</text:span></text:span><text:span text:style-name="Default_20_Paragraph_20_Font"><text:span text:style-name="T15">: </text:span></text:span><text:span text:style-name="Default_20_Paragraph_20_Font"><text:span text:style-name="T17">0.25</text:span></text:span><text:span text:style-name="Default_20_Paragraph_20_Font"><text:span text:style-name="T15">,</text:span></text:span></text:p>
      <text:p text:style-name="Standard"/>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1'</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1"</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2.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5.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3'</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3"</text:span></text:span><text:span text:style-name="Default_20_Paragraph_20_Font"><text:span text:style-name="T15">, </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7">5.0</text:span></text:span><text:span text:style-name="Default_20_Paragraph_20_Font"><text:span text:style-name="T15">) </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_rise'</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_rise"</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2.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Standard"/>
      <text:p text:style-name="P5">========================================</text:p>
      <text:p text:style-name="Normal"><text:span text:style-name="Default_20_Paragraph_20_Font"><text:span text:style-name="T22">🏆</text:span></text:span><text:span text:style-name="Default_20_Paragraph_20_Font"><text:span text:style-name="T23"> ABSOLUTE BEST TRIAL </text:span></text:span><text:span text:style-name="Default_20_Paragraph_20_Font"><text:span text:style-name="T22">🏆</text:span></text:span></text:p>
      <text:p text:style-name="P5">========================================</text:p>
      <text:p text:style-name="P5">Trial Number : 24</text:p>
      <text:p text:style-name="P5">ITAE Cost <text:s text:c="3"/>: 23.5345</text:p>
      <text:p text:style-name="P5">Parameters <text:s text:c="2"/>:</text:p>
      <text:p text:style-name="P5"><text:soft-page-break/><text:s text:c="4"/>k1: 1.3073677471294982</text:p>
      <text:p text:style-name="P5"><text:s text:c="4"/>k2: 0.13124007419771933</text:p>
      <text:p text:style-name="P5"><text:s text:c="4"/>k3: 0.8295798439010058</text:p>
      <text:p text:style-name="P5"><text:s text:c="4"/>k_rise: 0.028674499805437688</text:p>
      <text:p text:style-name="P5"/>
      <text:p text:style-name="P5">=================================================================</text:p>
      <text:p text:style-name="P5">Rank <text:s text:c="2"/>| Trial <text:s text:c="2"/>| Cost <text:s text:c="5"/>| k1 <text:s text:c="5"/>| k2 <text:s text:c="5"/>| k3 <text:s text:c="5"/>| k_rise <text:s text:c="2"/></text:p>
      <text:p text:style-name="P5">-----------------------------------------------------------------</text:p>
      <text:p text:style-name="P5">1 <text:s text:c="5"/>| 24 <text:s text:c="5"/>| 23.5 <text:s text:c="5"/>| 1.31 <text:s text:c="3"/>| 0.131 <text:s text:c="2"/>| 0.83 <text:s text:c="3"/>| 0.0287 <text:s text:c="2"/></text:p>
      <text:p text:style-name="P5">2 <text:s text:c="5"/>| 26 <text:s text:c="5"/>| 24.4 <text:s text:c="5"/>| 1.46 <text:s text:c="3"/>| 0.09 <text:s text:c="3"/>| 0.625 <text:s text:c="2"/>| 0.0103 <text:s text:c="2"/></text:p>
      <text:p text:style-name="P5">3 <text:s text:c="5"/>| 70 <text:s text:c="5"/>| 24.7 <text:s text:c="5"/>| 1.06 <text:s text:c="3"/>| 0.365 <text:s text:c="2"/>| 0.659 <text:s text:c="2"/>| 0.0101 <text:s text:c="2"/></text:p>
      <text:p text:style-name="P5">4 <text:s text:c="5"/>| 25 <text:s text:c="5"/>| 24.7 <text:s text:c="5"/>| 1.47 <text:s text:c="3"/>| 0.104 <text:s text:c="2"/>| 0.554 <text:s text:c="2"/>| 0.0108 <text:s text:c="2"/></text:p>
      <text:p text:style-name="P5">5 <text:s text:c="5"/>| 27 <text:s text:c="5"/>| 26.6 <text:s text:c="5"/>| 1.67 <text:s text:c="3"/>| 0.111 <text:s text:c="2"/>| 0.417 <text:s text:c="2"/>| 0.0109 <text:s text:c="2"/></text:p>
      <text:p text:style-name="P5">6 <text:s text:c="5"/>| 23 <text:s text:c="5"/>| 29.5 <text:s text:c="5"/>| 1.03 <text:s text:c="3"/>| 0.1 <text:s text:c="4"/>| 0.63 <text:s text:c="3"/>| 0.0299 <text:s text:c="2"/></text:p>
      <text:p text:style-name="P5">7 <text:s text:c="5"/>| 31 <text:s text:c="5"/>| 30.3 <text:s text:c="5"/>| 1.38 <text:s text:c="3"/>| 0.121 <text:s text:c="2"/>| 0.466 <text:s text:c="2"/>| 0.0145 <text:s text:c="2"/></text:p>
      <text:p text:style-name="P5">8 <text:s text:c="5"/>| 77 <text:s text:c="5"/>| 31.4 <text:s text:c="5"/>| 1.45 <text:s text:c="3"/>| 0.246 <text:s text:c="2"/>| 0.757 <text:s text:c="2"/>| 0.0451 <text:s text:c="2"/></text:p>
      <text:p text:style-name="P5">9 <text:s text:c="5"/>| 80 <text:s text:c="5"/>| 31.9 <text:s text:c="5"/>| 1.52 <text:s text:c="3"/>| 0.16 <text:s text:c="3"/>| 0.782 <text:s text:c="2"/>| 0.0473 <text:s text:c="2"/></text:p>
      <text:p text:style-name="P5">10 <text:s text:c="4"/>| 0 <text:s text:c="6"/>| 32.2 <text:s text:c="5"/>| 0.305 <text:s text:c="2"/>| 0.332 <text:s text:c="2"/>| 2.66 <text:s text:c="3"/>| 0.425 <text:s text:c="3"/></text:p>
      <text:p text:style-name="P5">11 <text:s text:c="4"/>| 60 <text:s text:c="5"/>| 32.3 <text:s text:c="5"/>| 1.61 <text:s text:c="3"/>| 0.375 <text:s text:c="2"/>| 1.01 <text:s text:c="3"/>| 0.068 <text:s text:c="3"/></text:p>
      <text:p text:style-name="P5">12 <text:s text:c="4"/>| 33 <text:s text:c="5"/>| 32.4 <text:s text:c="5"/>| 1.98 <text:s text:c="3"/>| 0.316 <text:s text:c="2"/>| 0.764 <text:s text:c="2"/>| 0.0216 <text:s text:c="2"/></text:p>
      <text:p text:style-name="P5">13 <text:s text:c="4"/>| 78 <text:s text:c="5"/>| 32.6 <text:s text:c="5"/>| 1.38 <text:s text:c="3"/>| 0.097 <text:s text:c="2"/>| 1.25 <text:s text:c="3"/>| 0.024 <text:s text:c="3"/></text:p>
      <text:p text:style-name="P5">14 <text:s text:c="4"/>| 28 <text:s text:c="5"/>| 32.7 <text:s text:c="5"/>| 1.42 <text:s text:c="3"/>| 0.0849 <text:s/>| 1.05 <text:s text:c="3"/>| 0.0175 <text:s text:c="2"/></text:p>
      <text:p text:style-name="P5">15 <text:s text:c="4"/>| 72 <text:s text:c="5"/>| 32.8 <text:s text:c="5"/>| 0.802 <text:s text:c="2"/>| 0.718 <text:s text:c="2"/>| 0.962 <text:s text:c="2"/>| 0.01 <text:s text:c="4"/></text:p>
      <text:p text:style-name="Standard"><text:span text:style-name="Default_20_Paragraph_20_Font"><text:span text:style-name="T24">=================================================================</text:span></text:span></text:p>
      <text:p text:style-name="Standard"/>
      <text:p text:style-name="Standard">COMMENT: There seems to be a tradeoff between K_I (which is dominated by k_1) and \beta.</text:p>
      <text:p text:style-name="Standard"/>
      <text:p text:style-name="Standard">COMMENT: Running the best gains with wind makes the cost go from 22.9 to 90.1. For the #10 gains, it went from 32.95 and 48.5. This suggests more K_RISE is more robust.</text:p>
      <text:p text:style-name="Standard"/>
      <text:p text:style-name="Standard"/>
      <text:p text:style-name="Standard">PHASE 2 (TAKE 3)</text:p>
      <text:p text:style-name="Standard"/>
      <text:p text:style-name="Standard">I propose we do this for 500 trials with 200 trials of patience next for each controller. Should we or should we not?</text:p>
      <text:p text:style-name="Standard"/>
      <text:p text:style-name="Standard"><text:span text:style-name="Default_20_Paragraph_20_Font"><text:span text:style-name="T5">initial_weight_scale_factor</text:span></text:span><text:span text:style-name="Default_20_Paragraph_20_Font"><text:span text:style-name="T2"> </text:span></text:span><text:span text:style-name="Default_20_Paragraph_20_Font"><text:span text:style-name="T4">=</text:span></text:span><text:span text:style-name="Default_20_Paragraph_20_Font"><text:span text:style-name="T2"> <text:s/></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text:span></text:span><text:span text:style-name="Default_20_Paragraph_20_Font"><text:span text:style-name="T5">initial_weight_scale_factor</text:span></text:span><text:span text:style-name="Default_20_Paragraph_20_Font"><text:span text:style-name="T3">"</text:span></text:span><text:span text:style-name="Default_20_Paragraph_20_Font"><text:span text:style-name="T2">, [</text:span></text:span><text:span text:style-name="Default_20_Paragraph_20_Font"><text:span text:style-name="T7">0.2, 1</text:span></text:span><text:span text:style-name="Default_20_Paragraph_20_Font"><text:span text:style-name="T2">])</text:span></text:span></text:p>
      <text:p text:style-name="P2"/>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num_blocks'</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num_blocks"</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4">=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4">=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hidden_width'</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hidden_width"</text:span></text:span><text:span text:style-name="Default_20_Paragraph_20_Font"><text:span text:style-name="T2">, [4, 8</text:span></text:span><text:span text:style-name="Default_20_Paragraph_20_Font"><text:span text:style-name="T7">, 16</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7">0.1</text:span></text:span><text:span text:style-name="Default_20_Paragraph_20_Font"><text:span text:style-name="T2">, 10</text:span></text:span><text:span text:style-name="Default_20_Paragraph_20_Font"><text:span text:style-name="T7">.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7">5.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Standard"/>
      <text:p text:style-name="Standard"><text:soft-page-break/></text:p>
      <text:p text:style-name="Standard">max@Maxs-MacBook-Pro voxl-px4-sitl % python3 get_best_results.py baseline</text:p>
      <text:p text:style-name="Standard">[*] Loading baseline study 'phase2_baseline_wind_optimization' from sqlite:///phase2_baseline_wind.db...</text:p>
      <text:p text:style-name="Standard"/>
      <text:p text:style-name="Standard">========================================</text:p>
      <text:p text:style-name="Standard"><text:span text:style-name="Default_20_Paragraph_20_Font"><text:span text:style-name="T25">🏆</text:span></text:span> ABSOLUTE BEST TRIAL <text:span text:style-name="Default_20_Paragraph_20_Font"><text:span text:style-name="T25">🏆</text:span></text:span></text:p>
      <text:p text:style-name="Standard">========================================</text:p>
      <text:p text:style-name="Standard">Trial Number : 208</text:p>
      <text:p text:style-name="Standard">ITAE Cost <text:s text:c="3"/>: 47.5804</text:p>
      <text:p text:style-name="Standard">Parameters <text:s text:c="2"/>:</text:p>
      <text:p text:style-name="Standard"><text:s text:c="4"/>initial_weight_scale_factor: 0.2</text:p>
      <text:p text:style-name="Standard"><text:s text:c="4"/>num_blocks: 4</text:p>
      <text:p text:style-name="Standard"><text:s text:c="4"/>k_0: 2</text:p>
      <text:p text:style-name="Standard"><text:s text:c="4"/>k_i: 4</text:p>
      <text:p text:style-name="Standard"><text:s text:c="4"/>hidden_width: 8</text:p>
      <text:p text:style-name="Standard"><text:s text:c="4"/>gamma: 6.7362992973814935</text:p>
      <text:p text:style-name="Standard"><text:s text:c="4"/>sigma_mod: 1.0312702653999692</text:p>
      <text:p text:style-name="Standard"/>
      <text:p text:style-name="Standard"/>
      <text:p text:style-name="Standard">BASELINE</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08 <text:s text:c="4"/>| 47.6 <text:s text:c="5"/>| 4 <text:s text:c="9"/>| 8 <text:s text:c="11"/>| 2 <text:s text:c="5"/>| 4 <text:s text:c="5"/>| 6.74 <text:s text:c="3"/>| 1.03 <text:s text:c="5"/>| 0.2 <text:s text:c="2"/></text:p>
      <text:p text:style-name="Standard">2 <text:s text:c="5"/>| 213 <text:s text:c="4"/>| 47.9 <text:s text:c="5"/>| 4 <text:s text:c="9"/>| 8 <text:s text:c="11"/>| 2 <text:s text:c="5"/>| 4 <text:s text:c="5"/>| 8.85 <text:s text:c="3"/>| 0.995 <text:s text:c="4"/>| 0.2 <text:s text:c="2"/></text:p>
      <text:p text:style-name="Standard">3 <text:s text:c="5"/>| 373 <text:s text:c="4"/>| 47.9 <text:s text:c="5"/>| 4 <text:s text:c="9"/>| 8 <text:s text:c="11"/>| 2 <text:s text:c="5"/>| 4 <text:s text:c="5"/>| 6.66 <text:s text:c="3"/>| 1.07 <text:s text:c="5"/>| 0.2 <text:s text:c="2"/></text:p>
      <text:p text:style-name="Standard">4 <text:s text:c="5"/>| 246 <text:s text:c="4"/>| 48.1 <text:s text:c="5"/>| 4 <text:s text:c="9"/>| 8 <text:s text:c="11"/>| 2 <text:s text:c="5"/>| 4 <text:s text:c="5"/>| 6.86 <text:s text:c="3"/>| 1.14 <text:s text:c="5"/>| 0.2 <text:s text:c="2"/></text:p>
      <text:p text:style-name="Standard">5 <text:s text:c="5"/>| 365 <text:s text:c="4"/>| 48.1 <text:s text:c="5"/>| 4 <text:s text:c="9"/>| 8 <text:s text:c="11"/>| 2 <text:s text:c="5"/>| 4 <text:s text:c="5"/>| 5.27 <text:s text:c="3"/>| 1.05 <text:s text:c="5"/>| 0.2 <text:s text:c="2"/></text:p>
      <text:p text:style-name="Standard">6 <text:s text:c="5"/>| 293 <text:s text:c="4"/>| 48.1 <text:s text:c="5"/>| 4 <text:s text:c="9"/>| 8 <text:s text:c="11"/>| 2 <text:s text:c="5"/>| 4 <text:s text:c="5"/>| 8.02 <text:s text:c="3"/>| 1.13 <text:s text:c="5"/>| 0.2 <text:s text:c="2"/></text:p>
      <text:p text:style-name="Standard">7 <text:s text:c="5"/>| 250 <text:s text:c="4"/>| 48.1 <text:s text:c="5"/>| 4 <text:s text:c="9"/>| 8 <text:s text:c="11"/>| 2 <text:s text:c="5"/>| 4 <text:s text:c="5"/>| 7.54 <text:s text:c="3"/>| 1.06 <text:s text:c="5"/>| 0.2 <text:s text:c="2"/></text:p>
      <text:p text:style-name="Standard">8 <text:s text:c="5"/>| 189 <text:s text:c="4"/>| 48.2 <text:s text:c="5"/>| 4 <text:s text:c="9"/>| 8 <text:s text:c="11"/>| 2 <text:s text:c="5"/>| 4 <text:s text:c="5"/>| 4.6 <text:s text:c="4"/>| 1.08 <text:s text:c="5"/>| 0.2 <text:s text:c="2"/></text:p>
      <text:p text:style-name="Standard">9 <text:s text:c="5"/>| 323 <text:s text:c="4"/>| 48.2 <text:s text:c="5"/>| 4 <text:s text:c="9"/>| 8 <text:s text:c="11"/>| 2 <text:s text:c="5"/>| 4 <text:s text:c="5"/>| 8.08 <text:s text:c="3"/>| 1.03 <text:s text:c="5"/>| 0.2 <text:s text:c="2"/></text:p>
      <text:p text:style-name="Standard">10 <text:s text:c="4"/>| 385 <text:s text:c="4"/>| 48.2 <text:s text:c="5"/>| 4 <text:s text:c="9"/>| 8 <text:s text:c="11"/>| 2 <text:s text:c="5"/>| 4 <text:s text:c="5"/>| 7.4 <text:s text:c="4"/>| 1.01 <text:s text:c="5"/>| 0.2 <text:s text:c="2"/></text:p>
      <text:p text:style-name="Standard">11 <text:s text:c="4"/>| 396 <text:s text:c="4"/>| 48.2 <text:s text:c="5"/>| 4 <text:s text:c="9"/>| 8 <text:s text:c="11"/>| 2 <text:s text:c="5"/>| 4 <text:s text:c="5"/>| 6.43 <text:s text:c="3"/>| 1.04 <text:s text:c="5"/>| 0.2 <text:s text:c="2"/></text:p>
      <text:p text:style-name="Standard">12 <text:s text:c="4"/>| 245 <text:s text:c="4"/>| 48.3 <text:s text:c="5"/>| 4 <text:s text:c="9"/>| 8 <text:s text:c="11"/>| 2 <text:s text:c="5"/>| 4 <text:s text:c="5"/>| 7.45 <text:s text:c="3"/>| 1.04 <text:s text:c="5"/>| 0.2 <text:s text:c="2"/></text:p>
      <text:p text:style-name="Standard">13 <text:s text:c="4"/>| 188 <text:s text:c="4"/>| 48.3 <text:s text:c="5"/>| 4 <text:s text:c="9"/>| 8 <text:s text:c="11"/>| 2 <text:s text:c="5"/>| 4 <text:s text:c="5"/>| 4.36 <text:s text:c="3"/>| 1.1 <text:s text:c="6"/>| 0.2 <text:s text:c="2"/></text:p>
      <text:p text:style-name="Standard">14 <text:s text:c="4"/>| 366 <text:s text:c="4"/>| 48.3 <text:s text:c="5"/>| 4 <text:s text:c="9"/>| 8 <text:s text:c="11"/>| 2 <text:s text:c="5"/>| 4 <text:s text:c="5"/>| 7.41 <text:s text:c="3"/>| 1.05 <text:s text:c="5"/>| 0.2 <text:s text:c="2"/></text:p>
      <text:p text:style-name="Standard">15 <text:s text:c="4"/>| 219 <text:s text:c="4"/>| 48.4 <text:s text:c="5"/>| 4 <text:s text:c="9"/>| 8 <text:s text:c="11"/>| 2 <text:s text:c="5"/>| 4 <text:s text:c="5"/>| 6.99 <text:s text:c="3"/>| 1.04 <text:s text:c="5"/>| 0.2 <text:s text:c="2"/></text:p>
      <text:p text:style-name="Standard">=========================================================================================================</text:p>
      <text:p text:style-name="Standard"/>
      <text:p text:style-name="Standard">max@Maxs-MacBook-Pro voxl-px4-sitl % python3 get_best_results.py developed</text:p>
      <text:p text:style-name="Standard">[*] Loading developed study 'phase2_developed_wind_optimization' from sqlite:///phase2_developed_wind.db...</text:p>
      <text:p text:style-name="Standard"/>
      <text:p text:style-name="Standard">========================================</text:p>
      <text:p text:style-name="Standard"><text:soft-page-break/><text:span text:style-name="Default_20_Paragraph_20_Font"><text:span text:style-name="T25">🏆</text:span></text:span> ABSOLUTE BEST TRIAL <text:span text:style-name="Default_20_Paragraph_20_Font"><text:span text:style-name="T25">🏆</text:span></text:span></text:p>
      <text:p text:style-name="Standard">========================================</text:p>
      <text:p text:style-name="Standard">Trial Number : 154</text:p>
      <text:p text:style-name="Standard">ITAE Cost <text:s text:c="3"/>: 48.7975</text:p>
      <text:p text:style-name="Standard">Parameters <text:s text:c="2"/>:</text:p>
      <text:p text:style-name="Standard"><text:s text:c="4"/>initial_weight_scale_factor: 0.2</text:p>
      <text:p text:style-name="Standard"><text:s text:c="4"/>num_blocks: 4</text:p>
      <text:p text:style-name="Standard"><text:s text:c="4"/>k_0: 4</text:p>
      <text:p text:style-name="Standard"><text:s text:c="4"/>k_i: 4</text:p>
      <text:p text:style-name="Standard"><text:s text:c="4"/>hidden_width: 8</text:p>
      <text:p text:style-name="Standard"><text:s text:c="4"/>gamma: 6.670745862501159</text:p>
      <text:p text:style-name="Standard"><text:s text:c="4"/>sigma_mod: 2.1893280520971734</text:p>
      <text:p text:style-name="Standard"/>
      <text:p text:style-name="Standard">DEVELOPED</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54 <text:s text:c="4"/>| 48.8 <text:s text:c="5"/>| 4 <text:s text:c="9"/>| 8 <text:s text:c="11"/>| 4 <text:s text:c="5"/>| 4 <text:s text:c="5"/>| 6.67 <text:s text:c="3"/>| 2.19 <text:s text:c="5"/>| 0.2 <text:s text:c="2"/></text:p>
      <text:p text:style-name="Standard">2 <text:s text:c="5"/>| 246 <text:s text:c="4"/>| 48.8 <text:s text:c="5"/>| 4 <text:s text:c="9"/>| 8 <text:s text:c="11"/>| 4 <text:s text:c="5"/>| 4 <text:s text:c="5"/>| 9.16 <text:s text:c="3"/>| 2.28 <text:s text:c="5"/>| 0.2 <text:s text:c="2"/></text:p>
      <text:p text:style-name="Standard">3 <text:s text:c="5"/>| 272 <text:s text:c="4"/>| 49 <text:s text:c="7"/>| 4 <text:s text:c="9"/>| 4 <text:s text:c="11"/>| 4 <text:s text:c="5"/>| 4 <text:s text:c="5"/>| 9.31 <text:s text:c="3"/>| 2.01 <text:s text:c="5"/>| 0.2 <text:s text:c="2"/></text:p>
      <text:p text:style-name="Standard">4 <text:s text:c="5"/>| 269 <text:s text:c="4"/>| 49 <text:s text:c="7"/>| 4 <text:s text:c="9"/>| 4 <text:s text:c="11"/>| 4 <text:s text:c="5"/>| 4 <text:s text:c="5"/>| 9.27 <text:s text:c="3"/>| 1.95 <text:s text:c="5"/>| 0.2 <text:s text:c="2"/></text:p>
      <text:p text:style-name="Standard">5 <text:s text:c="5"/>| 203 <text:s text:c="4"/>| 49.2 <text:s text:c="5"/>| 4 <text:s text:c="9"/>| 8 <text:s text:c="11"/>| 4 <text:s text:c="5"/>| 4 <text:s text:c="5"/>| 8.76 <text:s text:c="3"/>| 1.98 <text:s text:c="5"/>| 0.2 <text:s text:c="2"/></text:p>
      <text:p text:style-name="Standard">6 <text:s text:c="5"/>| 277 <text:s text:c="4"/>| 49.3 <text:s text:c="5"/>| 4 <text:s text:c="9"/>| 4 <text:s text:c="11"/>| 4 <text:s text:c="5"/>| 4 <text:s text:c="5"/>| 9.38 <text:s text:c="3"/>| 2.1 <text:s text:c="6"/>| 0.2 <text:s text:c="2"/></text:p>
      <text:p text:style-name="Standard">7 <text:s text:c="5"/>| 337 <text:s text:c="4"/>| 49.8 <text:s text:c="5"/>| 4 <text:s text:c="9"/>| 4 <text:s text:c="11"/>| 4 <text:s text:c="5"/>| 4 <text:s text:c="5"/>| 7.07 <text:s text:c="3"/>| 2.32 <text:s text:c="5"/>| 0.2 <text:s text:c="2"/></text:p>
      <text:p text:style-name="Standard">8 <text:s text:c="5"/>| 167 <text:s text:c="4"/>| 49.9 <text:s text:c="5"/>| 4 <text:s text:c="9"/>| 8 <text:s text:c="11"/>| 4 <text:s text:c="5"/>| 4 <text:s text:c="5"/>| 8.26 <text:s text:c="3"/>| 2.13 <text:s text:c="5"/>| 0.2 <text:s text:c="2"/></text:p>
      <text:p text:style-name="Standard">9 <text:s text:c="5"/>| 322 <text:s text:c="4"/>| 50.1 <text:s text:c="5"/>| 4 <text:s text:c="9"/>| 4 <text:s text:c="11"/>| 4 <text:s text:c="5"/>| 4 <text:s text:c="5"/>| 8.67 <text:s text:c="3"/>| 2.03 <text:s text:c="5"/>| 0.2 <text:s text:c="2"/></text:p>
      <text:p text:style-name="Standard">10 <text:s text:c="4"/>| 82 <text:s text:c="5"/>| 50.2 <text:s text:c="5"/>| 4 <text:s text:c="9"/>| 8 <text:s text:c="11"/>| 4 <text:s text:c="5"/>| 4 <text:s text:c="5"/>| 9.13 <text:s text:c="3"/>| 2.42 <text:s text:c="5"/>| 0.2 <text:s text:c="2"/></text:p>
      <text:p text:style-name="Standard">11 <text:s text:c="4"/>| 200 <text:s text:c="4"/>| 50.3 <text:s text:c="5"/>| 4 <text:s text:c="9"/>| 8 <text:s text:c="11"/>| 4 <text:s text:c="5"/>| 4 <text:s text:c="5"/>| 8.54 <text:s text:c="3"/>| 2.12 <text:s text:c="5"/>| 0.2 <text:s text:c="2"/></text:p>
      <text:p text:style-name="Standard">12 <text:s text:c="4"/>| 184 <text:s text:c="4"/>| 50.3 <text:s text:c="5"/>| 4 <text:s text:c="9"/>| 8 <text:s text:c="11"/>| 4 <text:s text:c="5"/>| 4 <text:s text:c="5"/>| 8.88 <text:s text:c="3"/>| 2.25 <text:s text:c="5"/>| 0.2 <text:s text:c="2"/></text:p>
      <text:p text:style-name="Standard">13 <text:s text:c="4"/>| 323 <text:s text:c="4"/>| 50.5 <text:s text:c="5"/>| 4 <text:s text:c="9"/>| 4 <text:s text:c="11"/>| 4 <text:s text:c="5"/>| 4 <text:s text:c="5"/>| 8.66 <text:s text:c="3"/>| 2.32 <text:s text:c="5"/>| 0.2 <text:s text:c="2"/></text:p>
      <text:p text:style-name="Standard">14 <text:s text:c="4"/>| 202 <text:s text:c="4"/>| 50.5 <text:s text:c="5"/>| 4 <text:s text:c="9"/>| 8 <text:s text:c="11"/>| 4 <text:s text:c="5"/>| 4 <text:s text:c="5"/>| 9.02 <text:s text:c="3"/>| 1.99 <text:s text:c="5"/>| 0.2 <text:s text:c="2"/></text:p>
      <text:p text:style-name="P6">15 <text:s text:c="4"/>| 326 <text:s text:c="4"/>| 50.5 <text:s text:c="5"/>| 4 <text:s text:c="9"/>| 4 <text:s text:c="11"/>| 4 <text:s text:c="5"/>| 4 <text:s text:c="5"/>| 8.95 <text:s text:c="3"/>| 2.46 <text:s text:c="5"/>| 0.2 <text:s text:c="2"/></text:p>
      <text:p text:style-name="Standard"/>
      <text:p text:style-name="Standard"/>
      <text:p text:style-name="Standard"/>
      <text:p text:style-name="Standard">PHASE 2 (TAKE 4)</text:p>
      <text:p text:style-name="P7"/>
      <text:p text:style-name="P8"><text:span text:style-name="Default_20_Paragraph_20_Font"><text:span text:style-name="T26"><text:s text:c="8"/></text:span></text:span><text:span text:style-name="Default_20_Paragraph_20_Font"><text:span text:style-name="T27">initial_weight_scale_factor</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initial_weight_scale_factor"</text:span></text:span><text:span text:style-name="Default_20_Paragraph_20_Font"><text:span text:style-name="T26">, [0.1, </text:span></text:span><text:span text:style-name="Default_20_Paragraph_20_Font"><text:span text:style-name="T17">0.2</text:span></text:span><text:span text:style-name="Default_20_Paragraph_20_Font"><text:span text:style-name="T26">, </text:span></text:span><text:span text:style-name="Default_20_Paragraph_20_Font"><text:span text:style-name="T17">0.4</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num_blocks'</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num_blocks"</text:span></text:span><text:span text:style-name="Default_20_Paragraph_20_Font"><text:span text:style-name="T26">, [</text:span></text:span><text:span text:style-name="Default_20_Paragraph_20_Font"><text:span text:style-name="T17">4, 6,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k_0'</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k_0"</text:span></text:span><text:span text:style-name="Default_20_Paragraph_20_Font"><text:span text:style-name="T26">, [</text:span></text:span><text:span text:style-name="Default_20_Paragraph_20_Font"><text:span text:style-name="T17">2</text:span></text:span><text:span text:style-name="Default_20_Paragraph_20_Font"><text:span text:style-name="T26">, </text:span></text:span><text:span text:style-name="Default_20_Paragraph_20_Font"><text:span text:style-name="T17">4,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k_i'</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k_i"</text:span></text:span><text:span text:style-name="Default_20_Paragraph_20_Font"><text:span text:style-name="T26">, [</text:span></text:span><text:span text:style-name="Default_20_Paragraph_20_Font"><text:span text:style-name="T17">2</text:span></text:span><text:span text:style-name="Default_20_Paragraph_20_Font"><text:span text:style-name="T26">, </text:span></text:span><text:span text:style-name="Default_20_Paragraph_20_Font"><text:span text:style-name="T17">4,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hidden_width'</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hidden_width"</text:span></text:span><text:span text:style-name="Default_20_Paragraph_20_Font"><text:span text:style-name="T26">, [</text:span></text:span><text:span text:style-name="Default_20_Paragraph_20_Font"><text:span text:style-name="T17">4</text:span></text:span><text:span text:style-name="Default_20_Paragraph_20_Font"><text:span text:style-name="T26">, </text:span></text:span><text:span text:style-name="Default_20_Paragraph_20_Font"><text:span text:style-name="T17">8, 12</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gamma'</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30">float</text:span></text:span><text:span text:style-name="Default_20_Paragraph_20_Font"><text:span text:style-name="T26">(</text:span></text:span><text:span text:style-name="Default_20_Paragraph_20_Font"><text:span text:style-name="T28">trial</text:span></text:span><text:span text:style-name="Default_20_Paragraph_20_Font"><text:span text:style-name="T26">.suggest_float(</text:span></text:span><text:span text:style-name="Default_20_Paragraph_20_Font"><text:span text:style-name="T29">"gamma"</text:span></text:span><text:span text:style-name="Default_20_Paragraph_20_Font"><text:span text:style-name="T26">, </text:span></text:span><text:span text:style-name="Default_20_Paragraph_20_Font"><text:span text:style-name="T17">0.1</text:span></text:span><text:span text:style-name="Default_20_Paragraph_20_Font"><text:span text:style-name="T26">, </text:span></text:span><text:span text:style-name="Default_20_Paragraph_20_Font"><text:span text:style-name="T17">10.0</text:span></text:span><text:span text:style-name="Default_20_Paragraph_20_Font"><text:span text:style-name="T26">, </text:span></text:span><text:span text:style-name="Default_20_Paragraph_20_Font"><text:span text:style-name="T28">log</text:span></text:span><text:span text:style-name="Default_20_Paragraph_20_Font"><text:span text:style-name="T18">=</text:span></text:span><text:span text:style-name="Default_20_Paragraph_20_Font"><text:span text:style-name="T21">True</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sigma_mod'</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30">float</text:span></text:span><text:span text:style-name="Default_20_Paragraph_20_Font"><text:span text:style-name="T26">(</text:span></text:span><text:span text:style-name="Default_20_Paragraph_20_Font"><text:span text:style-name="T28">trial</text:span></text:span><text:span text:style-name="Default_20_Paragraph_20_Font"><text:span text:style-name="T26">.suggest_float(</text:span></text:span><text:span text:style-name="Default_20_Paragraph_20_Font"><text:span text:style-name="T29">"sigma_mod"</text:span></text:span><text:span text:style-name="Default_20_Paragraph_20_Font"><text:span text:style-name="T26">, </text:span></text:span><text:span text:style-name="Default_20_Paragraph_20_Font"><text:span text:style-name="T17">0.5</text:span></text:span><text:span text:style-name="Default_20_Paragraph_20_Font"><text:span text:style-name="T26">, </text:span></text:span><text:span text:style-name="Default_20_Paragraph_20_Font"><text:span text:style-name="T17">5.0</text:span></text:span><text:span text:style-name="Default_20_Paragraph_20_Font"><text:span text:style-name="T26">, </text:span></text:span><text:span text:style-name="Default_20_Paragraph_20_Font"><text:span text:style-name="T28">log</text:span></text:span><text:span text:style-name="Default_20_Paragraph_20_Font"><text:span text:style-name="T18">=</text:span></text:span><text:span text:style-name="Default_20_Paragraph_20_Font"><text:span text:style-name="T21">True</text:span></text:span><text:span text:style-name="Default_20_Paragraph_20_Font"><text:span text:style-name="T26">))</text:span></text:span></text:p>
      <text:p text:style-name="Standard"/>
      <text:p text:style-name="Standard"><text:soft-page-break/>Let’s do 500 trials maximum with 100 trials of patience. Developed phase finished in 130 trials. Baseline phase finished in 227 trials. </text:p>
      <text:p text:style-name="Standard"/>
      <text:p text:style-name="Standard">========================================</text:p>
      <text:p text:style-name="Standard"><text:span text:style-name="Default_20_Paragraph_20_Font"><text:span text:style-name="T25">🏆</text:span></text:span> ABSOLUTE BEST TRIAL: BASELINE WITH WIND <text:span text:style-name="Default_20_Paragraph_20_Font"><text:span text:style-name="T25">🏆</text:span></text:span></text:p>
      <text:p text:style-name="Standard">========================================</text:p>
      <text:p text:style-name="Standard">Trial Number : 114</text:p>
      <text:p text:style-name="Standard">ITAE Cost <text:s text:c="3"/>: 43.3076</text:p>
      <text:p text:style-name="Standard">Parameters <text:s text:c="2"/>:</text:p>
      <text:p text:style-name="Standard"><text:s text:c="4"/>initial_weight_scale_factor: 0.1</text:p>
      <text:p text:style-name="Standard"><text:s text:c="4"/>num_blocks: 8</text:p>
      <text:p text:style-name="Standard"><text:s text:c="4"/>k_0: 2</text:p>
      <text:p text:style-name="Standard"><text:s text:c="4"/>k_i: 2</text:p>
      <text:p text:style-name="Standard"><text:s text:c="4"/>hidden_width: 4</text:p>
      <text:p text:style-name="Standard"><text:s text:c="4"/>gamma: 0.3849012074610113</text:p>
      <text:p text:style-name="Standard"><text:s text:c="4"/>sigma_mod: 0.6522018776022119</text:p>
      <text:p text:style-name="Standard">User Attrs <text:s text:c="2"/>:</text:p>
      <text:p text:style-name="Standard"><text:s text:c="4"/>rms_control_effort: 1.6667</text:p>
      <text:p text:style-name="Standard"><text:s text:c="4"/>rms_error: 0.3881</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14 <text:s text:c="4"/>| 43.3 <text:s text:c="5"/>| 8 <text:s text:c="9"/>| 4 <text:s text:c="11"/>| 2 <text:s text:c="5"/>| 2 <text:s text:c="5"/>| 0.385 <text:s text:c="2"/>| 0.652 <text:s text:c="4"/>| 0.1 <text:s text:c="2"/></text:p>
      <text:p text:style-name="Standard">2 <text:s text:c="5"/>| 77 <text:s text:c="5"/>| 43.7 <text:s text:c="5"/>| 8 <text:s text:c="9"/>| 4 <text:s text:c="11"/>| 2 <text:s text:c="5"/>| 2 <text:s text:c="5"/>| 0.361 <text:s text:c="2"/>| 0.529 <text:s text:c="4"/>| 0.1 <text:s text:c="2"/></text:p>
      <text:p text:style-name="Standard">3 <text:s text:c="5"/>| 84 <text:s text:c="5"/>| 44.3 <text:s text:c="5"/>| 8 <text:s text:c="9"/>| 4 <text:s text:c="11"/>| 2 <text:s text:c="5"/>| 2 <text:s text:c="5"/>| 0.331 <text:s text:c="2"/>| 0.563 <text:s text:c="4"/>| 0.1 <text:s text:c="2"/></text:p>
      <text:p text:style-name="Standard">4 <text:s text:c="5"/>| 142 <text:s text:c="4"/>| 44.8 <text:s text:c="5"/>| 8 <text:s text:c="9"/>| 4 <text:s text:c="11"/>| 2 <text:s text:c="5"/>| 2 <text:s text:c="5"/>| 0.346 <text:s text:c="2"/>| 0.554 <text:s text:c="4"/>| 0.1 <text:s text:c="2"/></text:p>
      <text:p text:style-name="Standard">5 <text:s text:c="5"/>| 87 <text:s text:c="5"/>| 44.9 <text:s text:c="5"/>| 8 <text:s text:c="9"/>| 4 <text:s text:c="11"/>| 2 <text:s text:c="5"/>| 2 <text:s text:c="5"/>| 0.309 <text:s text:c="2"/>| 0.633 <text:s text:c="4"/>| 0.1 <text:s text:c="2"/></text:p>
      <text:p text:style-name="Standard">6 <text:s text:c="5"/>| 134 <text:s text:c="4"/>| 45.3 <text:s text:c="5"/>| 6 <text:s text:c="9"/>| 4 <text:s text:c="11"/>| 2 <text:s text:c="5"/>| 2 <text:s text:c="5"/>| 0.454 <text:s text:c="2"/>| 0.705 <text:s text:c="4"/>| 0.2 <text:s text:c="2"/></text:p>
      <text:p text:style-name="Standard">7 <text:s text:c="5"/>| 113 <text:s text:c="4"/>| 45.3 <text:s text:c="5"/>| 8 <text:s text:c="9"/>| 4 <text:s text:c="11"/>| 2 <text:s text:c="5"/>| 2 <text:s text:c="5"/>| 0.377 <text:s text:c="2"/>| 0.706 <text:s text:c="4"/>| 0.1 <text:s text:c="2"/></text:p>
      <text:p text:style-name="Standard">8 <text:s text:c="5"/>| 162 <text:s text:c="4"/>| 45.3 <text:s text:c="5"/>| 6 <text:s text:c="9"/>| 4 <text:s text:c="11"/>| 2 <text:s text:c="5"/>| 2 <text:s text:c="5"/>| 0.361 <text:s text:c="2"/>| 0.554 <text:s text:c="4"/>| 0.2 <text:s text:c="2"/></text:p>
      <text:p text:style-name="Standard">9 <text:s text:c="5"/>| 107 <text:s text:c="4"/>| 45.5 <text:s text:c="5"/>| 8 <text:s text:c="9"/>| 4 <text:s text:c="11"/>| 2 <text:s text:c="5"/>| 2 <text:s text:c="5"/>| 0.366 <text:s text:c="2"/>| 0.606 <text:s text:c="4"/>| 0.1 <text:s text:c="2"/></text:p>
      <text:p text:style-name="Standard">10 <text:s text:c="4"/>| 64 <text:s text:c="5"/>| 45.7 <text:s text:c="5"/>| 6 <text:s text:c="9"/>| 8 <text:s text:c="11"/>| 2 <text:s text:c="5"/>| 2 <text:s text:c="5"/>| 0.464 <text:s text:c="2"/>| 0.628 <text:s text:c="4"/>| 0.2 <text:s text:c="2"/></text:p>
      <text:p text:style-name="Standard">11 <text:s text:c="4"/>| 56 <text:s text:c="5"/>| 45.9 <text:s text:c="5"/>| 6 <text:s text:c="9"/>| 8 <text:s text:c="11"/>| 2 <text:s text:c="5"/>| 2 <text:s text:c="5"/>| 0.466 <text:s text:c="2"/>| 0.657 <text:s text:c="4"/>| 0.2 <text:s text:c="2"/></text:p>
      <text:p text:style-name="Standard">12 <text:s text:c="4"/>| 182 <text:s text:c="4"/>| 46.1 <text:s text:c="5"/>| 6 <text:s text:c="9"/>| 4 <text:s text:c="11"/>| 2 <text:s text:c="5"/>| 2 <text:s text:c="5"/>| 0.39 <text:s text:c="3"/>| 0.501 <text:s text:c="4"/>| 0.2 <text:s text:c="2"/></text:p>
      <text:p text:style-name="Standard">13 <text:s text:c="4"/>| 70 <text:s text:c="5"/>| 46.2 <text:s text:c="5"/>| 8 <text:s text:c="9"/>| 4 <text:s text:c="11"/>| 2 <text:s text:c="5"/>| 2 <text:s text:c="5"/>| 0.304 <text:s text:c="2"/>| 0.5 <text:s text:c="6"/>| 0.2 <text:s text:c="2"/></text:p>
      <text:p text:style-name="Standard">14 <text:s text:c="4"/>| 160 <text:s text:c="4"/>| 46.2 <text:s text:c="5"/>| 6 <text:s text:c="9"/>| 4 <text:s text:c="11"/>| 2 <text:s text:c="5"/>| 2 <text:s text:c="5"/>| 0.365 <text:s text:c="2"/>| 0.52 <text:s text:c="5"/>| 0.2 <text:s text:c="2"/></text:p>
      <text:p text:style-name="Standard">15 <text:s text:c="4"/>| 143 <text:s text:c="4"/>| 46.2 <text:s text:c="5"/>| 8 <text:s text:c="9"/>| 4 <text:s text:c="11"/>| 2 <text:s text:c="5"/>| 2 <text:s text:c="5"/>| 0.357 <text:s text:c="2"/>| 0.562 <text:s text:c="4"/>| 0.1 <text:s text:c="2"/></text:p>
      <text:p text:style-name="Standard">=========================================================================================================</text:p>
      <text:p text:style-name="Standard"/>
      <text:p text:style-name="Standard">========================================</text:p>
      <text:p text:style-name="Standard"><text:span text:style-name="Default_20_Paragraph_20_Font"><text:span text:style-name="T25">🏆</text:span></text:span> ABSOLUTE BEST TRIAL: DEVELOPED WITH WIND <text:span text:style-name="Default_20_Paragraph_20_Font"><text:span text:style-name="T25">🏆</text:span></text:span></text:p>
      <text:p text:style-name="Standard">========================================</text:p>
      <text:p text:style-name="Standard">Trial Number : 27</text:p>
      <text:p text:style-name="Standard">ITAE Cost <text:s text:c="3"/>: 46.2504</text:p>
      <text:p text:style-name="Standard">Parameters <text:s text:c="2"/>:</text:p>
      <text:p text:style-name="Standard"><text:soft-page-break/><text:s text:c="4"/>initial_weight_scale_factor: 0.4</text:p>
      <text:p text:style-name="Standard"><text:s text:c="4"/>num_blocks: 8</text:p>
      <text:p text:style-name="Standard"><text:s text:c="4"/>k_0: 4</text:p>
      <text:p text:style-name="Standard"><text:s text:c="4"/>k_i: 4</text:p>
      <text:p text:style-name="Standard"><text:s text:c="4"/>hidden_width: 8</text:p>
      <text:p text:style-name="Standard"><text:s text:c="4"/>gamma: 6.279702110164697</text:p>
      <text:p text:style-name="Standard"><text:s text:c="4"/>sigma_mod: 3.927479881666684</text:p>
      <text:p text:style-name="Standard">User Attrs <text:s text:c="2"/>:</text:p>
      <text:p text:style-name="Standard"><text:s text:c="4"/>rms_control_effort: 1.6217</text:p>
      <text:p text:style-name="Standard"><text:s text:c="4"/>rms_error: 0.3962</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7 <text:s text:c="5"/>| 46.3 <text:s text:c="5"/>| 8 <text:s text:c="9"/>| 8 <text:s text:c="11"/>| 4 <text:s text:c="5"/>| 4 <text:s text:c="5"/>| 6.28 <text:s text:c="3"/>| 3.93 <text:s text:c="5"/>| 0.4 <text:s text:c="2"/></text:p>
      <text:p text:style-name="Standard">2 <text:s text:c="5"/>| 125 <text:s text:c="4"/>| 46.6 <text:s text:c="5"/>| 8 <text:s text:c="9"/>| 4 <text:s text:c="11"/>| 4 <text:s text:c="5"/>| 4 <text:s text:c="5"/>| 7.45 <text:s text:c="3"/>| 4.04 <text:s text:c="5"/>| 0.4 <text:s text:c="2"/></text:p>
      <text:p text:style-name="Standard">3 <text:s text:c="5"/>| 126 <text:s text:c="4"/>| 47.3 <text:s text:c="5"/>| 8 <text:s text:c="9"/>| 4 <text:s text:c="11"/>| 4 <text:s text:c="5"/>| 4 <text:s text:c="5"/>| 7.52 <text:s text:c="3"/>| 3.7 <text:s text:c="6"/>| 0.4 <text:s text:c="2"/></text:p>
      <text:p text:style-name="Standard">4 <text:s text:c="5"/>| 61 <text:s text:c="5"/>| 48.2 <text:s text:c="5"/>| 8 <text:s text:c="9"/>| 4 <text:s text:c="11"/>| 4 <text:s text:c="5"/>| 4 <text:s text:c="5"/>| 9.16 <text:s text:c="3"/>| 3.82 <text:s text:c="5"/>| 0.4 <text:s text:c="2"/></text:p>
      <text:p text:style-name="Standard">5 <text:s text:c="5"/>| 119 <text:s text:c="4"/>| 48.2 <text:s text:c="5"/>| 8 <text:s text:c="9"/>| 8 <text:s text:c="11"/>| 4 <text:s text:c="5"/>| 2 <text:s text:c="5"/>| 8.31 <text:s text:c="3"/>| 4.06 <text:s text:c="5"/>| 0.4 <text:s text:c="2"/></text:p>
      <text:p text:style-name="Standard">6 <text:s text:c="5"/>| 51 <text:s text:c="5"/>| 49.2 <text:s text:c="5"/>| 8 <text:s text:c="9"/>| 4 <text:s text:c="11"/>| 2 <text:s text:c="5"/>| 4 <text:s text:c="5"/>| 8.36 <text:s text:c="3"/>| 3.8 <text:s text:c="6"/>| 0.4 <text:s text:c="2"/></text:p>
      <text:p text:style-name="Standard">7 <text:s text:c="5"/>| 102 <text:s text:c="4"/>| 49.3 <text:s text:c="5"/>| 8 <text:s text:c="9"/>| 8 <text:s text:c="11"/>| 8 <text:s text:c="5"/>| 2 <text:s text:c="5"/>| 6.68 <text:s text:c="3"/>| 3.78 <text:s text:c="5"/>| 0.4 <text:s text:c="2"/></text:p>
      <text:p text:style-name="Standard">8 <text:s text:c="5"/>| 68 <text:s text:c="5"/>| 49.4 <text:s text:c="5"/>| 8 <text:s text:c="9"/>| 4 <text:s text:c="11"/>| 8 <text:s text:c="5"/>| 4 <text:s text:c="5"/>| 4.73 <text:s text:c="3"/>| 3.12 <text:s text:c="5"/>| 0.1 <text:s text:c="2"/></text:p>
      <text:p text:style-name="Standard">9 <text:s text:c="5"/>| 41 <text:s text:c="5"/>| 49.4 <text:s text:c="5"/>| 8 <text:s text:c="9"/>| 8 <text:s text:c="11"/>| 8 <text:s text:c="5"/>| 2 <text:s text:c="5"/>| 3.23 <text:s text:c="3"/>| 4.25 <text:s text:c="5"/>| 0.4 <text:s text:c="2"/></text:p>
      <text:p text:style-name="Standard">10 <text:s text:c="4"/>| 17 <text:s text:c="5"/>| 49.7 <text:s text:c="5"/>| 8 <text:s text:c="9"/>| 4 <text:s text:c="11"/>| 4 <text:s text:c="5"/>| 4 <text:s text:c="5"/>| 9.54 <text:s text:c="3"/>| 3.8 <text:s text:c="6"/>| 0.4 <text:s text:c="2"/></text:p>
      <text:p text:style-name="Standard">11 <text:s text:c="4"/>| 42 <text:s text:c="5"/>| 49.9 <text:s text:c="5"/>| 8 <text:s text:c="9"/>| 8 <text:s text:c="11"/>| 8 <text:s text:c="5"/>| 2 <text:s text:c="5"/>| 5.43 <text:s text:c="3"/>| 4.41 <text:s text:c="5"/>| 0.4 <text:s text:c="2"/></text:p>
      <text:p text:style-name="Standard">12 <text:s text:c="4"/>| 25 <text:s text:c="5"/>| 49.9 <text:s text:c="5"/>| 8 <text:s text:c="9"/>| 8 <text:s text:c="11"/>| 4 <text:s text:c="5"/>| 4 <text:s text:c="5"/>| 7.08 <text:s text:c="3"/>| 4.11 <text:s text:c="5"/>| 0.4 <text:s text:c="2"/></text:p>
      <text:p text:style-name="Standard">13 <text:s text:c="4"/>| 120 <text:s text:c="4"/>| 50.1 <text:s text:c="5"/>| 8 <text:s text:c="9"/>| 4 <text:s text:c="11"/>| 4 <text:s text:c="5"/>| 4 <text:s text:c="5"/>| 8.26 <text:s text:c="3"/>| 3.42 <text:s text:c="5"/>| 0.4 <text:s text:c="2"/></text:p>
      <text:p text:style-name="Standard">14 <text:s text:c="4"/>| 122 <text:s text:c="4"/>| 50.2 <text:s text:c="5"/>| 8 <text:s text:c="9"/>| 4 <text:s text:c="11"/>| 4 <text:s text:c="5"/>| 4 <text:s text:c="5"/>| 6.63 <text:s text:c="3"/>| 3.49 <text:s text:c="5"/>| 0.4 <text:s text:c="2"/></text:p>
      <text:p text:style-name="Standard">15 <text:s text:c="4"/>| 67 <text:s text:c="5"/>| 50.2 <text:s text:c="5"/>| 8 <text:s text:c="9"/>| 8 <text:s text:c="11"/>| 4 <text:s text:c="5"/>| 4 <text:s text:c="5"/>| 5.63 <text:s text:c="3"/>| 3.89 <text:s text:c="5"/>| 0.4 <text:s text:c="2"/></text:p>
      <text:p text:style-name="Standard">=========================================================================================================</text:p>
      <text:p text:style-name="Standard"/>
      <text:p text:style-name="Standard">COMMENT: Even though the num_blocks was maxed out, I will not rerun since the cost reduction in Take 3 to Take 4 wasn’t that big.</text:p>
      <text:p text:style-name="Standard"><text:s/></text:p>
      <text:p text:style-name="P9">SUPER-TWISTING CONTROLLER <text:span text:style-name="T31">(TAKE 1)</text:span></text:p>
      <text:p text:style-name="P10">300 trials with 50 trials of patience. </text:p>
      <text:p text:style-name="P10"/>
      <text:p text:style-name="P9">k_st_1: 2.1467</text:p>
      <text:p text:style-name="P9">k_st_2: 1.0971</text:p>
      <text:p text:style-name="P9">k_st_3: 0.06267</text:p>
      <text:p text:style-name="P9"/>
      <text:p text:style-name="P9">RMS_ERROR = 1.7567</text:p>
      <text:p text:style-name="P9">RMS_CONTROL_EFFORT = 4.6336</text:p>
      <text:p text:style-name="P10">COST: 3039</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nlo" svg:font-family="Menl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09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meta:creation-date>2026-06-15T08:58:00Z</meta:creation-date>
    <dc:date>2026-07-06T06:54:17.196794000</dc:date>
    <meta:editing-cycles>62</meta:editing-cycles>
    <meta:editing-duration>PT15H21M47S</meta:editing-duration>
    <meta:document-statistic meta:table-count="0" meta:image-count="0" meta:object-count="0" meta:page-count="12" meta:paragraph-count="445" meta:word-count="4040" meta:character-count="28646" meta:non-whitespace-character-count="18456"/>
    <meta:template xlink:type="simple" xlink:actuate="onRequest" xlink:title="" xlink:href="Normal.dotm"/>
  </office:meta>
</office:document-meta>
</file>